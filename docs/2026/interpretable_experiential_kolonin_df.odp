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B7E00000305221BD103.png" manifest:media-type="image/png"/>
  <manifest:file-entry manifest:full-path="Pictures/1000000100000B7A00000305D1A0E4A0.png" manifest:media-type="image/png"/>
  <manifest:file-entry manifest:full-path="Pictures/10000001000002E6000002E6D51B9B10.png" manifest:media-type="image/png"/>
  <manifest:file-entry manifest:full-path="Pictures/100000010000004B00000049605D9169.png" manifest:media-type="image/png"/>
  <manifest:file-entry manifest:full-path="Pictures/10000001000001380000013A8FFC2586.png" manifest:media-type="image/png"/>
  <manifest:file-entry manifest:full-path="Pictures/100000010000020800000177B5D88F53.png" manifest:media-type="image/png"/>
  <manifest:file-entry manifest:full-path="Pictures/10000B1A000005C0000005A5360C17C3.wmf" manifest:media-type="image/x-wmf"/>
  <manifest:file-entry manifest:full-path="Pictures/1000000100000AEA000006F6A976D1AF.png" manifest:media-type="image/png"/>
  <manifest:file-entry manifest:full-path="Pictures/1000000100000748000002B9844AD9A6.png" manifest:media-type="image/png"/>
  <manifest:file-entry manifest:full-path="Pictures/10000001000000210000002198B7C029.png" manifest:media-type="image/png"/>
  <manifest:file-entry manifest:full-path="Pictures/10000001000006A4000004F6415F8BBE.png" manifest:media-type="image/png"/>
  <manifest:file-entry manifest:full-path="Pictures/10000000000002DF00000284AC45C60E.png" manifest:media-type="image/png"/>
  <manifest:file-entry manifest:full-path="Pictures/1000000100000044000000447D42CADB.png" manifest:media-type="image/png"/>
  <manifest:file-entry manifest:full-path="Pictures/10000001000006AC00000778427EFF4E.png" manifest:media-type="image/png"/>
  <manifest:file-entry manifest:full-path="Pictures/1000000100000AE8000006823CF27292.png" manifest:media-type="image/png"/>
  <manifest:file-entry manifest:full-path="Pictures/10000000000000F0000000F03A40411B.png" manifest:media-type="image/png"/>
  <manifest:file-entry manifest:full-path="Pictures/10000000000006AF000002C19623CB58.png" manifest:media-type="image/png"/>
  <manifest:file-entry manifest:full-path="Pictures/10000000000003E8000003E84B0E5855.jpg" manifest:media-type="image/jpe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-Roman" svg:font-family="Times-Roman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1.655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12cm" fo:min-width="19.959cm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20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75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072cm" fo:min-width="15.37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93cm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27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9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72cm" loext:decorative="false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32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3.104cm" loext:decorative="false"/>
      <style:paragraph-properties style:writing-mode="lr-tb"/>
    </style:style>
    <style:style style:name="gr34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46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68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89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44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45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47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48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50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1" style:family="graphic" style:parent-style-name="Default_20_Drawing_20_Style_5f_2">
      <style:graphic-properties draw:stroke="none" svg:stroke-color="#000000" draw:fill="none" draw:fill-color="#ffffff" draw:textarea-horizontal-align="left" draw:auto-grow-height="false" draw:auto-grow-width="false" fo:min-height="1.773cm" fo:min-width="9.025cm" loext:decorative="false"/>
      <style:paragraph-properties style:writing-mode="lr-tb"/>
    </style:style>
    <style:style style:name="gr52" style:family="graphic" style:parent-style-name="Object_20_without_20_fill_5f_3">
      <style:graphic-properties draw:stroke="dash" draw:stroke-dash="Long_20_Dash" svg:stroke-color="#333333" draw:marker-start="" draw:marker-end="" draw:stroke-linejoin="none" draw:fill="none" draw:textarea-vertical-align="middle" loext:decorative="false"/>
    </style:style>
    <style:style style:name="gr53" style:family="graphic" style:parent-style-name="Default_5f_5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645cm" fo:min-width="27.408cm" loext:decorative="false"/>
      <style:paragraph-properties style:writing-mode="lr-tb"/>
    </style:style>
    <style:style style:name="gr54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55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3.556cm" fo:min-width="9.507cm" loext:decorative="false"/>
      <style:paragraph-properties style:writing-mode="lr-tb"/>
    </style:style>
    <style:style style:name="gr56" style:family="graphic" style:parent-style-name="Object_20_without_20_fill_5f_2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57" style:family="graphic" style:parent-style-name="Default_5f_5_5f_1">
      <style:graphic-properties draw:fill-color="#3deb3d" draw:textarea-horizontal-align="justify" draw:textarea-vertical-align="middle" draw:auto-grow-height="false" fo:min-height="0.95cm" fo:min-width="3.175cm" style:writing-mode="lr-tb" loext:decorative="false"/>
      <style:paragraph-properties style:writing-mode="lr-tb"/>
    </style:style>
    <style:style style:name="gr58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9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loext:decorative="false"/>
    </style:style>
    <style:style style:name="gr60" style:family="graphic" style:parent-style-name="Default_5f_5_5f_1">
      <style:graphic-properties draw:fill-color="#ffffff" draw:textarea-horizontal-align="justify" draw:textarea-vertical-align="middle" draw:auto-grow-height="false" fo:min-height="0.74cm" fo:min-width="0.632cm" loext:decorative="false"/>
    </style:style>
    <style:style style:name="gr61" style:family="graphic" style:parent-style-name="Default_5f_5_5f_1">
      <style:graphic-properties draw:fill-color="#000000" draw:textarea-horizontal-align="justify" draw:textarea-vertical-align="middle" draw:auto-grow-height="false" fo:min-height="0.74cm" fo:min-width="0.632cm" loext:decorative="false"/>
    </style:style>
    <style:style style:name="gr62" style:family="graphic" style:parent-style-name="Default_5f_5_5f_1">
      <style:graphic-properties draw:fill-color="#996633" draw:textarea-horizontal-align="justify" draw:textarea-vertical-align="middle" draw:auto-grow-height="false" fo:min-height="0.74cm" fo:min-width="0.632cm" loext:decorative="false"/>
    </style:style>
    <style:style style:name="gr63" style:family="graphic" style:parent-style-name="Default_5f_5_5f_1">
      <style:graphic-properties draw:fill-color="#ff0000" draw:textarea-horizontal-align="justify" draw:textarea-vertical-align="middle" draw:auto-grow-height="false" fo:min-height="0.74cm" fo:min-width="0.632cm" loext:decorative="false"/>
    </style:style>
    <style:style style:name="gr64" style:family="graphic" style:parent-style-name="Default_5f_5_5f_1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9cm" fo:min-width="0.582cm" fo:padding-top="0.15cm" fo:padding-bottom="0.15cm" fo:padding-left="0.275cm" fo:padding-right="0.275cm" style:writing-mode="lr-tb" loext:decorative="false"/>
      <style:paragraph-properties style:writing-mode="lr-tb"/>
    </style:style>
    <style:style style:name="gr65" style:family="graphic" style:parent-style-name="Default_5f_5_5f_1">
      <style:graphic-properties svg:stroke-color="#000000" draw:fill-color="#cccccc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66" style:family="graphic" style:parent-style-name="Object_20_without_20_fill_5f_2_5f_1">
      <style:graphic-properties svg:stroke-width="0cm" svg:stroke-color="#999999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67" style:family="graphic" style:parent-style-name="Object_20_without_20_fill_5f_2_5f_1">
      <style:graphic-properties svg:stroke-width="0cm" svg:stroke-color="#808080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68" style:family="graphic" style:parent-style-name="Object_20_without_20_fill_5f_2_5f_1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69" style:family="graphic" style:parent-style-name="Object_20_without_20_fill_5f_2_5f_1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0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.763cm" fo:min-width="0.887cm" loext:decorative="false"/>
      <style:paragraph-properties style:writing-mode="lr-tb"/>
    </style:style>
    <style:style style:name="gr71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72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66cm" fo:min-width="18.835cm" loext:decorative="false"/>
      <style:paragraph-properties style:writing-mode="lr-tb"/>
    </style:style>
    <style:style style:name="gr73" style:family="graphic" style:parent-style-name="Default_20_Drawing_20_Style_5f_4">
      <style:graphic-properties draw:stroke="none" svg:stroke-color="#000000" draw:fill="none" draw:fill-color="#ffffff" draw:textarea-horizontal-align="left" draw:auto-grow-height="true" draw:auto-grow-width="true" fo:min-height="0.869cm" fo:min-width="3.747cm" loext:decorative="false"/>
      <style:paragraph-properties style:writing-mode="lr-tb"/>
    </style:style>
    <style:style style:name="gr74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75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7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0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85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666cm" fo:min-width="11.7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157cm" loext:decorative="false"/>
      <style:paragraph-properties style:writing-mode="lr-tb"/>
    </style:style>
    <style:style style:name="gr87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533cm" fo:min-width="27.5cm" loext:decorative="false"/>
      <style:paragraph-properties style:writing-mode="lr-tb"/>
    </style:style>
    <style:style style:name="gr88" style:family="graphic" style:parent-style-name="Object_20_without_20_fill_5f_2_5f_1">
      <style:graphic-properties svg:stroke-color="#000000" draw:marker-end="Arrowheads_20_71" draw:marker-end-width="0.3cm" draw:fill="none" draw:textarea-vertical-align="middle" loext:decorative="false"/>
    </style:style>
    <style:style style:name="gr89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945cm" fo:min-width="2.826cm" loext:decorative="false"/>
      <style:paragraph-properties style:writing-mode="lr-tb"/>
    </style:style>
    <style:style style:name="gr90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945cm" fo:min-width="3.202cm" loext:decorative="false"/>
      <style:paragraph-properties style:writing-mode="lr-tb"/>
    </style:style>
    <style:style style:name="gr91" style:family="graphic" style:parent-style-name="Default_20_Drawing_20_Style_5f_3">
      <style:graphic-properties draw:stroke="none" draw:fill="none" fo:min-height="0.713cm" loext:decorative="false"/>
      <style:paragraph-properties style:writing-mode="lr-tb"/>
    </style:style>
    <style:style style:name="gr92" style:family="graphic" style:parent-style-name="Default_20_Drawing_20_Style_5f_3">
      <style:graphic-properties draw:stroke="none" draw:fill="none" fo:min-height="0.712cm" loext:decorative="false"/>
      <style:paragraph-properties style:writing-mode="lr-tb"/>
    </style:style>
    <style:style style:name="gr93" style:family="graphic" style:parent-style-name="Default_20_Drawing_20_Style_5f_3">
      <style:graphic-properties draw:stroke="none" draw:fill-color="#ffffff" draw:textarea-horizontal-align="justify" draw:textarea-vertical-align="middle" draw:auto-grow-height="false" fo:min-height="3.56cm" fo:min-width="2.04cm" loext:decorative="false"/>
    </style:style>
    <style:style style:name="gr94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945cm" fo:min-width="2.636cm" loext:decorative="false"/>
      <style:paragraph-properties style:writing-mode="lr-tb"/>
    </style:style>
    <style:style style:name="gr95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945cm" fo:min-width="2.144cm" loext:decorative="false"/>
      <style:paragraph-properties style:writing-mode="lr-tb"/>
    </style:style>
    <style:style style:name="gr96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889cm" fo:min-width="4.499cm" loext:decorative="false"/>
      <style:paragraph-properties style:writing-mode="lr-tb"/>
    </style:style>
    <style:style style:name="gr97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Default_20_Drawing_20_Style_5f_3">
      <style:graphic-properties draw:stroke="none" draw:fill="none" fo:min-height="1.423cm" loext:decorative="false"/>
      <style:paragraph-properties style:writing-mode="lr-tb"/>
    </style:style>
    <style:style style:name="gr99" style:family="graphic" style:parent-style-name="Default_20_Drawing_20_Style_5f_3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6.33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Default_20_Drawing_20_Style_5f_3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2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Default_20_Drawing_20_Style_5f_3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482cm" loext:decorative="false"/>
      <style:paragraph-properties style:writing-mode="lr-tb"/>
    </style:style>
    <style:style style:name="gr10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10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05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06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07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08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09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04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23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08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17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18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19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20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57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3cm" loext:decorative="false"/>
      <style:paragraph-properties style:writing-mode="lr-tb"/>
    </style:style>
    <style:style style:name="gr1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68cm" loext:decorative="false"/>
      <style:paragraph-properties style:writing-mode="lr-tb"/>
    </style:style>
    <style:style style:name="gr126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8.323cm" loext:decorative="false"/>
      <style:paragraph-properties style:writing-mode="lr-tb"/>
    </style:style>
    <style:style style:name="gr13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3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3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34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35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36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6.222cm" loext:decorative="false"/>
      <style:paragraph-properties style:writing-mode="lr-tb"/>
    </style:style>
    <style:style style:name="gr139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19.585cm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6.101cm" style:writing-mode="lr-tb" loext:decorative="false"/>
      <style:paragraph-properties style:writing-mode="lr-tb"/>
    </style:style>
    <style:style style:name="gr142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143" style:family="graphic" style:parent-style-name="standard">
      <style:graphic-properties svg:stroke-color="#666666" draw:fill="solid" draw:fill-color="#cccccc" draw:opacity="100%" draw:textarea-horizontal-align="justify" draw:textarea-vertical-align="middle" draw:auto-grow-height="false" fo:min-height="2.361cm" fo:min-width="14.77cm" draw:shadow-opacity="100%" style:writing-mode="lr-tb" loext:decorative="false"/>
      <style:paragraph-properties style:writing-mode="lr-tb"/>
    </style:style>
    <style:style style:name="gr144" style:family="graphic" style:parent-style-name="standard">
      <style:graphic-properties draw:fill-color="#ffff00" draw:opacity="50%" draw:textarea-horizontal-align="justify" draw:textarea-vertical-align="middle" draw:auto-grow-height="false" fo:min-height="1.283cm" fo:min-width="4.296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13cm" loext:decorative="false"/>
      <style:paragraph-properties style:writing-mode="lr-tb"/>
    </style:style>
    <style:style style:name="gr146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6.101cm" style:writing-mode="lr-tb" loext:decorative="false"/>
      <style:paragraph-properties style:writing-mode="lr-tb"/>
    </style:style>
    <style:style style:name="gr148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8.42cm" style:writing-mode="lr-tb" loext:decorative="false"/>
      <style:paragraph-properties style:writing-mode="lr-tb"/>
    </style:style>
    <style:style style:name="gr149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5.246cm" style:writing-mode="lr-tb" loext:decorative="false"/>
      <style:paragraph-properties style:writing-mode="lr-tb"/>
    </style:style>
    <style:style style:name="gr150" style:family="graphic" style:parent-style-name="standard">
      <style:graphic-properties draw:fill-color="#ffff00" draw:opacity="50%" draw:textarea-horizontal-align="justify" draw:textarea-vertical-align="middle" draw:auto-grow-height="false" fo:min-height="1.322cm" fo:min-width="4.288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5.745cm" loext:decorative="false"/>
      <style:paragraph-properties style:writing-mode="lr-tb"/>
    </style:style>
    <style:style style:name="gr152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153" style:family="graphic" style:parent-style-name="standard">
      <style:graphic-properties svg:stroke-color="#666666" draw:fill="solid" draw:fill-color="#cccccc" draw:opacity="100%" draw:textarea-horizontal-align="justify" draw:textarea-vertical-align="middle" draw:auto-grow-height="false" fo:min-height="2.361cm" fo:min-width="6.75cm" draw:shadow-opacity="100%" style:writing-mode="lr-tb" loext:decorative="false"/>
      <style:paragraph-properties style:writing-mode="lr-tb"/>
    </style:style>
    <style:style style:name="gr154" style:family="graphic" style:parent-style-name="standard">
      <style:graphic-properties svg:stroke-color="#666666" draw:fill="solid" draw:fill-color="#cccccc" draw:opacity="100%" draw:textarea-horizontal-align="justify" draw:textarea-vertical-align="middle" draw:auto-grow-height="false" fo:min-height="2.361cm" fo:min-width="6.595cm" draw:shadow-opacity="100%" style:writing-mode="lr-tb" loext:decorative="false"/>
      <style:paragraph-properties style:writing-mode="lr-tb"/>
    </style:style>
    <style:style style:name="gr155" style:family="graphic" style:parent-style-name="standard">
      <style:graphic-properties draw:fill-color="#ffff00" draw:opacity="50%" draw:textarea-horizontal-align="justify" draw:textarea-vertical-align="middle" draw:auto-grow-height="false" fo:min-height="1.283cm" fo:min-width="2.778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156" style:family="graphic" style:parent-style-name="standard">
      <style:graphic-properties draw:fill-color="#ffff00" draw:opacity="50%" draw:textarea-horizontal-align="justify" draw:textarea-vertical-align="middle" draw:auto-grow-height="false" fo:min-height="1.322cm" fo:min-width="2.925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157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0.838cm" fo:min-width="3.154cm" fo:padding-left="-0.051cm" fo:padding-right="-0.051cm" draw:shadow-opacity="50%" style:writing-mode="lr-tb" loext:decorative="false"/>
      <style:paragraph-properties style:writing-mode="lr-tb"/>
    </style:style>
    <style:style style:name="gr158" style:family="graphic" style:parent-style-name="standard">
      <style:graphic-properties draw:fill-color="#ffff00" draw:opacity="50%" draw:textarea-horizontal-align="justify" draw:textarea-vertical-align="middle" draw:auto-grow-height="false" fo:min-height="1.022cm" fo:min-width="2.874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159" style:family="graphic" style:parent-style-name="standard">
      <style:graphic-properties draw:fill-color="#ffff00" draw:opacity="50%" draw:textarea-horizontal-align="justify" draw:textarea-vertical-align="middle" draw:auto-grow-height="false" fo:min-height="1.054cm" fo:min-width="2.662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5.733cm" loext:decorative="false"/>
      <style:paragraph-properties style:writing-mode="lr-tb"/>
    </style:style>
    <style:style style:name="gr161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162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811cm" loext:decorative="false"/>
      <style:paragraph-properties style:writing-mode="lr-tb"/>
    </style:style>
    <style:style style:name="gr163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1.315cm" fo:min-width="5.464cm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1.315cm" fo:min-width="8.508cm" fo:padding-left="-0.102cm" fo:padding-right="-0.102cm" style:writing-mode="lr-tb" loext:decorative="false"/>
      <style:paragraph-properties style:writing-mode="lr-tb"/>
    </style:style>
    <style:style style:name="gr165" style:family="graphic" style:parent-style-name="standard">
      <style:graphic-properties svg:stroke-color="#666666" draw:fill="solid" draw:fill-color="#cccccc" draw:opacity="25%" draw:textarea-horizontal-align="justify" draw:textarea-vertical-align="middle" draw:auto-grow-height="false" fo:min-height="2.361cm" fo:min-width="15.005cm" draw:shadow-opacity="25%" style:writing-mode="lr-tb" loext:decorative="false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3.139cm" loext:decorative="false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168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995cm" fo:min-width="3.541cm" draw:shadow-opacity="40%" loext:decorative="false"/>
    </style:style>
    <style:style style:name="gr169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170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995cm" fo:min-width="3.405cm" draw:shadow-opacity="40%" loext:decorative="false"/>
    </style:style>
    <style:style style:name="gr171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559cm" draw:shadow-opacity="40%" loext:decorative="false"/>
    </style:style>
    <style:style style:name="gr172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911cm" fo:padding-left="0cm" fo:padding-right="0cm" loext:decorative="false"/>
      <style:paragraph-properties style:writing-mode="lr-tb"/>
    </style:style>
    <style:style style:name="gr175" style:family="graphic" style:parent-style-name="objectwithoutfill">
      <style:graphic-properties svg:stroke-width="0.203cm" svg:stroke-color="#ffff00" draw:marker-start-width="0.508cm" draw:marker-end="Arrow_20_large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177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178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7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in-height="1.655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28cm" loext:decorative="false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cm" loext:decorative="false"/>
      <style:paragraph-properties style:writing-mode="lr-tb"/>
    </style:style>
    <style:style style:name="gr182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8.732cm" fo:min-width="9.829cm" draw:shadow-opacity="40%" loext:decorative="false"/>
    </style:style>
    <style:style style:name="gr18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4" style:family="graphic" style:parent-style-name="objectwithoutfill">
      <style:graphic-properties draw:stroke="dash" draw:stroke-dash="Long_20_Dash_20__28_Rounded_29_" svg:stroke-width="0.051cm" svg:stroke-color="#ffffff" draw:marker-start-width="0.279cm" draw:marker-end-width="0.279cm" svg:stroke-linecap="round" draw:fill="none" draw:textarea-vertical-align="middle" fo:padding-top="0.15cm" fo:padding-bottom="0.15cm" fo:padding-left="0.275cm" fo:padding-right="0.275cm" loext:decorative="false"/>
    </style:style>
    <style:style style:name="gr185" style:family="graphic" style:parent-style-name="objectwithoutfill">
      <style:graphic-properties draw:stroke="dash" draw:stroke-dash="Long_20_Dash_20__28_Rounded_29_" svg:stroke-width="0.051cm" svg:stroke-color="#ffffff" draw:marker-start="Arrowheads_20_78" draw:marker-start-width="0.279cm" draw:marker-end="" draw:marker-end-width="0.279cm" svg:stroke-linecap="round" draw:fill="none" draw:textarea-vertical-align="middle" fo:padding-top="0.15cm" fo:padding-bottom="0.15cm" fo:padding-left="0.275cm" fo:padding-right="0.275cm" loext:decorative="false"/>
    </style:style>
    <style:style style:name="gr186" style:family="graphic" style:parent-style-name="standard">
      <style:graphic-properties draw:fill-color="#ffffff" draw:textarea-horizontal-align="justify" draw:textarea-vertical-align="middle" draw:auto-grow-height="false" fo:min-height="5.414cm" fo:min-width="5.4cm" loext:decorative="false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188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2.87cm" fo:min-width="3.092cm" fo:padding-left="0cm" fo:padding-right="0cm" draw:shadow-opacity="40%" style:writing-mode="lr-tb" loext:decorative="false"/>
      <style:paragraph-properties style:writing-mode="lr-tb"/>
    </style:style>
    <style:style style:name="gr189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190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698cm" fo:min-width="5.339cm" draw:shadow-opacity="40%" loext:decorative="false"/>
    </style:style>
    <style:style style:name="gr191" style:family="graphic" style:parent-style-name="standard">
      <style:graphic-properties draw:stroke="solid" svg:stroke-color="#666666" draw:fill="solid" draw:fill-color="#dedce6" draw:textarea-vertical-align="middle" draw:auto-grow-height="true" draw:auto-grow-width="false" fo:min-height="0.712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342cm" fo:min-width="3.092cm" draw:shadow-opacity="40%" loext:decorative="false"/>
    </style:style>
    <style:style style:name="gr193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342cm" fo:min-width="3.092cm" draw:shadow-opacity="40%" loext:decorative="false"/>
    </style:style>
    <style:style style:name="gr194" style:family="graphic" style:parent-style-name="objectwithoutfill">
      <style:graphic-properties svg:stroke-width="0.254cm" svg:stroke-color="#666666" draw:marker-start-width="0.584cm" draw:marker-end="Arrowheads_20_79" draw:marker-end-width="0.584cm" draw:fill="none" draw:textarea-vertical-align="middle" fo:padding-top="0.252cm" fo:padding-bottom="0.252cm" fo:padding-left="0.377cm" fo:padding-right="0.377cm" loext:decorative="false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3cm" loext:decorative="false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66cm" loext:decorative="false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4cm" loext:decorative="false"/>
      <style:paragraph-properties style:writing-mode="lr-tb"/>
    </style:style>
    <style:style style:name="gr198" style:family="graphic" style:parent-style-name="standard">
      <style:graphic-properties svg:stroke-color="#333333" draw:fill-color="#666666" draw:textarea-horizontal-align="justify" draw:textarea-vertical-align="middle" draw:auto-grow-height="false" fo:min-height="0.068cm" fo:min-width="0.612cm" loext:decorative="false"/>
    </style:style>
    <style:style style:name="gr199" style:family="graphic" style:parent-style-name="standard">
      <style:graphic-properties svg:stroke-color="#333333" draw:fill-color="#666666" draw:textarea-horizontal-align="justify" draw:textarea-vertical-align="middle" draw:auto-grow-height="false" fo:min-height="0.863cm" fo:min-width="0cm" loext:decorative="false"/>
    </style:style>
    <style:style style:name="gr200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201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07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208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209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210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211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212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13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214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215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216" style:family="graphic" style:parent-style-name="standard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217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218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219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220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221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222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223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224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225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226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227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22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7.287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vertical-align="middle" fo:min-height="1.771cm" loext:decorative="false"/>
      <style:paragraph-properties style:writing-mode="lr-tb"/>
    </style:style>
    <style:style style:name="gr236" style:family="graphic" style:parent-style-name="Default_5f_8">
      <style:graphic-properties draw:stroke="none" draw:fill="none" draw:fill-color="#ffffff" draw:textarea-horizontal-align="center" draw:textarea-vertical-align="middle" draw:auto-grow-height="false" fo:min-height="1.414cm" fo:min-width="28.15cm" fo:padding-top="0.184cm" fo:padding-bottom="0.125cm" fo:padding-left="0.25cm" fo:padding-right="0cm" fo:wrap-option="wrap" style:writing-mode="lr-tb" loext:decorative="false"/>
      <style:paragraph-properties style:writing-mode="lr-tb"/>
    </style:style>
    <style:style style:name="gr237" style:family="graphic" style:parent-style-name="Default_5f_6">
      <style:graphic-properties draw:textarea-horizontal-align="justify" draw:textarea-vertical-align="middle" draw:auto-grow-height="false" fo:min-height="0.403cm" fo:min-width="0.696cm" style:writing-mode="lr-tb" loext:decorative="false"/>
      <style:paragraph-properties style:writing-mode="lr-tb"/>
    </style:style>
    <style:style style:name="gr238" style:family="graphic" style:parent-style-name="Default_5f_6">
      <style:graphic-properties draw:textarea-horizontal-align="justify" draw:textarea-vertical-align="middle" draw:auto-grow-height="false" fo:min-height="0.403cm" fo:min-width="0.768cm" style:writing-mode="lr-tb" loext:decorative="false"/>
      <style:paragraph-properties style:writing-mode="lr-tb"/>
    </style:style>
    <style:style style:name="gr239" style:family="graphic" style:parent-style-name="Default_5f_6">
      <style:graphic-properties draw:textarea-horizontal-align="justify" draw:textarea-vertical-align="middle" draw:auto-grow-height="false" fo:min-height="0.403cm" fo:min-width="1.364cm" style:writing-mode="lr-tb" loext:decorative="false"/>
      <style:paragraph-properties style:writing-mode="lr-tb"/>
    </style:style>
    <style:style style:name="gr240" style:family="graphic" style:parent-style-name="Default_5f_6">
      <style:graphic-properties draw:textarea-horizontal-align="justify" draw:textarea-vertical-align="middle" draw:auto-grow-height="false" fo:min-height="0.403cm" fo:min-width="1.36cm" style:writing-mode="lr-tb" loext:decorative="false"/>
      <style:paragraph-properties style:writing-mode="lr-tb"/>
    </style:style>
    <style:style style:name="gr241" style:family="graphic" style:parent-style-name="Default_5f_6">
      <style:graphic-properties draw:textarea-horizontal-align="justify" draw:textarea-vertical-align="middle" draw:auto-grow-height="false" fo:min-height="0.403cm" fo:min-width="1.032cm" style:writing-mode="lr-tb" loext:decorative="false"/>
      <style:paragraph-properties style:writing-mode="lr-tb"/>
    </style:style>
    <style:style style:name="gr242" style:family="graphic" style:parent-style-name="Object_20_without_20_fill_5f_2_5f_1">
      <style:graphic-properties svg:stroke-color="#000000" draw:marker-start="Arrow" draw:fill="none" draw:textarea-vertical-align="middle" loext:decorative="false"/>
    </style:style>
    <style:style style:name="gr243" style:family="graphic" style:parent-style-name="Default_5f_6">
      <style:graphic-properties draw:textarea-horizontal-align="justify" draw:textarea-vertical-align="middle" draw:auto-grow-height="false" fo:min-height="0.403cm" fo:min-width="0.532cm" style:writing-mode="lr-tb" loext:decorative="false"/>
      <style:paragraph-properties style:writing-mode="lr-tb"/>
    </style:style>
    <style:style style:name="gr244" style:family="graphic" style:parent-style-name="Default_5f_6">
      <style:graphic-properties draw:textarea-horizontal-align="justify" draw:textarea-vertical-align="middle" draw:auto-grow-height="false" fo:min-height="0.403cm" fo:min-width="0.383cm" style:writing-mode="lr-tb" loext:decorative="false"/>
      <style:paragraph-properties style:writing-mode="lr-tb"/>
    </style:style>
    <style:style style:name="gr245" style:family="graphic" style:parent-style-name="Object_20_without_20_fill_5f_2_5f_1">
      <style:graphic-properties draw:stroke="dash" draw:stroke-dash="Ultrafine_20_2_20_Dots_20_3_20_Dashes" svg:stroke-color="#000000" draw:marker-start="Arrow" draw:fill="none" draw:textarea-vertical-align="middle" loext:decorative="false"/>
    </style:style>
    <style:style style:name="gr246" style:family="graphic" style:parent-style-name="Object_20_without_20_fill_5f_2_5f_1">
      <style:graphic-properties draw:stroke="dash" draw:stroke-dash="Fine_20_Dashed" svg:stroke-color="#000000" draw:marker-start="Arrow" draw:fill="none" draw:textarea-vertical-align="middle" loext:decorative="false"/>
    </style:style>
    <style:style style:name="gr247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2.833cm" fo:min-width="0cm" loext:decorative="false"/>
      <style:paragraph-properties style:writing-mode="lr-tb"/>
    </style:style>
    <style:style style:name="gr248" style:family="graphic" style:parent-style-name="Default_5f_6">
      <style:graphic-properties draw:textarea-horizontal-align="justify" draw:textarea-vertical-align="middle" draw:auto-grow-height="false" fo:min-height="0.403cm" fo:min-width="1.22cm" style:writing-mode="lr-tb" loext:decorative="false"/>
      <style:paragraph-properties style:writing-mode="lr-tb"/>
    </style:style>
    <style:style style:name="gr249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556cm" fo:min-width="3.66cm" loext:decorative="false"/>
      <style:paragraph-properties style:writing-mode="lr-tb"/>
    </style:style>
    <style:style style:name="gr250" style:family="graphic" style:parent-style-name="Default_5f_8">
      <style:graphic-properties draw:fill-color="#0000ff" draw:textarea-horizontal-align="justify" draw:textarea-vertical-align="middle" draw:auto-grow-height="false" fo:min-height="0.058cm" fo:min-width="0.224cm" loext:decorative="false"/>
    </style:style>
    <style:style style:name="gr251" style:family="graphic" style:parent-style-name="Default_5f_6">
      <style:graphic-properties draw:fill="none" draw:textarea-horizontal-align="justify" draw:textarea-vertical-align="middle" draw:auto-grow-height="false" fo:min-height="2.604cm" fo:min-width="4.063cm" loext:decorative="false"/>
    </style:style>
    <style:style style:name="gr252" style:family="graphic" style:parent-style-name="Default_5f_6">
      <style:graphic-properties draw:fill-color="#bc8f8f" draw:textarea-horizontal-align="justify" draw:textarea-vertical-align="middle" draw:auto-grow-height="false" fo:min-height="0cm" fo:min-width="0.53cm" loext:decorative="false"/>
    </style:style>
    <style:style style:name="gr253" style:family="graphic" style:parent-style-name="Default_5f_6">
      <style:graphic-properties draw:fill="gradient" draw:fill-color="#ffa500" draw:fill-gradient-name="Sunshine" draw:gradient-step-count="0" draw:textarea-horizontal-align="justify" draw:textarea-vertical-align="middle" draw:auto-grow-height="false" fo:min-height="0.054cm" fo:min-width="0cm" loext:decorative="false"/>
    </style:style>
    <style:style style:name="gr254" style:family="graphic" style:parent-style-name="Object_20_without_20_fill_5f_2_5f_1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255" style:family="graphic" style:parent-style-name="Default_5f_6">
      <style:graphic-properties draw:fill="none" draw:textarea-horizontal-align="justify" draw:textarea-vertical-align="middle" draw:auto-grow-height="false" fo:min-height="2.604cm" fo:min-width="4.073cm" loext:decorative="false"/>
    </style:style>
    <style:style style:name="gr256" style:family="graphic" style:parent-style-name="Default_5f_6">
      <style:graphic-properties draw:fill-color="#bc8f8f" draw:textarea-horizontal-align="justify" draw:textarea-vertical-align="middle" draw:auto-grow-height="false" fo:min-height="0cm" fo:min-width="0.532cm" loext:decorative="false"/>
    </style:style>
    <style:style style:name="gr257" style:family="graphic" style:parent-style-name="Default_5f_6">
      <style:graphic-properties draw:fill="none" draw:textarea-horizontal-align="justify" draw:textarea-vertical-align="middle" draw:auto-grow-height="false" fo:min-height="2.604cm" fo:min-width="4.081cm" loext:decorative="false"/>
    </style:style>
    <style:style style:name="gr258" style:family="graphic" style:parent-style-name="Default_5f_6">
      <style:graphic-properties draw:fill-color="#bc8f8f" draw:textarea-horizontal-align="justify" draw:textarea-vertical-align="middle" draw:auto-grow-height="false" fo:min-height="0cm" fo:min-width="0.529cm" loext:decorative="false"/>
    </style:style>
    <style:style style:name="gr259" style:family="graphic" style:parent-style-name="Default_5f_6">
      <style:graphic-properties draw:fill="none" draw:textarea-horizontal-align="justify" draw:textarea-vertical-align="middle" draw:auto-grow-height="false" fo:min-height="2.604cm" fo:min-width="4.064cm" loext:decorative="false"/>
    </style:style>
    <style:style style:name="gr260" style:family="graphic" style:parent-style-name="Default_5f_8">
      <style:graphic-properties draw:fill-color="#0000ff" draw:textarea-horizontal-align="justify" draw:textarea-vertical-align="middle" draw:auto-grow-height="false" fo:min-height="0.058cm" fo:min-width="0.225cm" loext:decorative="false"/>
    </style:style>
    <style:style style:name="gr261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556cm" fo:min-width="3.56cm" loext:decorative="false"/>
      <style:paragraph-properties style:writing-mode="lr-tb"/>
    </style:style>
    <style:style style:name="gr262" style:family="graphic" style:parent-style-name="Default_5f_6">
      <style:graphic-properties draw:textarea-horizontal-align="justify" draw:textarea-vertical-align="middle" draw:auto-grow-height="false" fo:min-height="0.403cm" fo:min-width="1.229cm" style:writing-mode="lr-tb" loext:decorative="false"/>
      <style:paragraph-properties style:writing-mode="lr-tb"/>
    </style:style>
    <style:style style:name="gr263" style:family="graphic" style:parent-style-name="Default_5f_6">
      <style:graphic-properties draw:stroke="dash" draw:stroke-dash="Ultrafine_20_Dashed" svg:stroke-color="#808080" draw:fill="none" draw:fill-color="#ffffff" draw:textarea-horizontal-align="justify" draw:textarea-vertical-align="middle" draw:auto-grow-height="false" fo:min-height="0.403cm" fo:min-width="1.614cm" loext:decorative="false"/>
    </style:style>
    <style:style style:name="gr264" style:family="graphic" style:parent-style-name="Object_20_without_20_fill_5f_2_5f_1">
      <style:graphic-properties svg:stroke-color="#708090" draw:fill="none" draw:textarea-vertical-align="middle" loext:decorative="false"/>
    </style:style>
    <style:style style:name="gr265" style:family="graphic" style:parent-style-name="Default_5f_6">
      <style:graphic-properties draw:textarea-horizontal-align="justify" draw:textarea-vertical-align="middle" draw:auto-grow-height="false" fo:min-height="0.403cm" fo:min-width="0.706cm" style:writing-mode="lr-tb" loext:decorative="false"/>
      <style:paragraph-properties style:writing-mode="lr-tb"/>
    </style:style>
    <style:style style:name="gr266" style:family="graphic" style:parent-style-name="Default_5f_6">
      <style:graphic-properties draw:textarea-horizontal-align="justify" draw:textarea-vertical-align="middle" draw:auto-grow-height="false" fo:min-height="0.403cm" fo:min-width="0.87cm" style:writing-mode="lr-tb" loext:decorative="false"/>
      <style:paragraph-properties style:writing-mode="lr-tb"/>
    </style:style>
    <style:style style:name="gr267" style:family="graphic" style:parent-style-name="Default_5f_6">
      <style:graphic-properties draw:textarea-horizontal-align="justify" draw:textarea-vertical-align="middle" draw:auto-grow-height="false" fo:min-height="0.403cm" fo:min-width="1.034cm" style:writing-mode="lr-tb" loext:decorative="false"/>
      <style:paragraph-properties style:writing-mode="lr-tb"/>
    </style:style>
    <style:style style:name="gr268" style:family="graphic" style:parent-style-name="Object_20_without_20_fill_5f_4">
      <style:graphic-properties svg:stroke-width="0.102cm" svg:stroke-color="#32cd32" draw:marker-start-width="0.356cm" draw:marker-end="Arrow" draw:marker-end-width="0.356cm" draw:fill="none" draw:textarea-vertical-align="middle" fo:padding-top="0.175cm" fo:padding-bottom="0.175cm" fo:padding-left="0.3cm" fo:padding-right="0.3cm" loext:decorative="false"/>
    </style:style>
    <style:style style:name="gr269" style:family="graphic" style:parent-style-name="Default_20_Drawing_20_Style_5f_5">
      <style:graphic-properties draw:stroke="none" svg:stroke-color="#000000" draw:fill="none" draw:fill-color="#ffffff" draw:textarea-horizontal-align="left" draw:auto-grow-height="true" draw:auto-grow-width="true" fo:min-height="1.423cm" fo:min-width="2.925cm" loext:decorative="false"/>
      <style:paragraph-properties style:writing-mode="lr-tb"/>
    </style:style>
    <style:style style:name="gr270" style:family="graphic" style:parent-style-name="Default_20_Drawing_20_Style_5f_5">
      <style:graphic-properties draw:stroke="none" svg:stroke-color="#000000" draw:fill="none" draw:fill-color="#ffffff" draw:textarea-horizontal-align="left" draw:auto-grow-height="true" draw:auto-grow-width="true" fo:min-height="0.433cm" fo:min-width="8.543cm" loext:decorative="false"/>
      <style:paragraph-properties style:writing-mode="lr-tb"/>
    </style:style>
    <style:style style:name="gr271" style:family="graphic" style:parent-style-name="Default_5f_8">
      <style:graphic-properties draw:stroke="none" draw:fill="none" draw:fill-color="#ffffff" draw:textarea-horizontal-align="center" draw:textarea-vertical-align="middle" draw:auto-grow-height="false" fo:min-height="1.414cm" fo:min-width="27.75cm" fo:padding-top="0.184cm" fo:padding-bottom="0.125cm" fo:padding-left="0.25cm" fo:padding-right="0cm" fo:wrap-option="wrap" style:writing-mode="lr-tb" loext:decorative="false"/>
      <style:paragraph-properties style:writing-mode="lr-tb"/>
    </style:style>
    <style:style style:name="gr272" style:family="graphic" style:parent-style-name="Default_5f_6">
      <style:graphic-properties draw:textarea-horizontal-align="justify" draw:textarea-vertical-align="middle" draw:auto-grow-height="false" fo:min-height="0.403cm" fo:min-width="0.717cm" style:writing-mode="lr-tb" loext:decorative="false"/>
      <style:paragraph-properties style:writing-mode="lr-tb"/>
    </style:style>
    <style:style style:name="gr273" style:family="graphic" style:parent-style-name="Default_5f_6">
      <style:graphic-properties draw:textarea-horizontal-align="justify" draw:textarea-vertical-align="middle" draw:auto-grow-height="false" fo:min-height="0.403cm" fo:min-width="0.791cm" style:writing-mode="lr-tb" loext:decorative="false"/>
      <style:paragraph-properties style:writing-mode="lr-tb"/>
    </style:style>
    <style:style style:name="gr274" style:family="graphic" style:parent-style-name="Default_5f_6">
      <style:graphic-properties draw:textarea-horizontal-align="justify" draw:textarea-vertical-align="middle" draw:auto-grow-height="false" fo:min-height="0.403cm" fo:min-width="1.397cm" style:writing-mode="lr-tb" loext:decorative="false"/>
      <style:paragraph-properties style:writing-mode="lr-tb"/>
    </style:style>
    <style:style style:name="gr275" style:family="graphic" style:parent-style-name="Default_5f_6">
      <style:graphic-properties draw:textarea-horizontal-align="justify" draw:textarea-vertical-align="middle" draw:auto-grow-height="false" fo:min-height="0.403cm" fo:min-width="1.393cm" style:writing-mode="lr-tb" loext:decorative="false"/>
      <style:paragraph-properties style:writing-mode="lr-tb"/>
    </style:style>
    <style:style style:name="gr276" style:family="graphic" style:parent-style-name="Default_5f_6">
      <style:graphic-properties draw:textarea-horizontal-align="justify" draw:textarea-vertical-align="middle" draw:auto-grow-height="false" fo:min-height="0.403cm" fo:min-width="0.949cm" style:writing-mode="lr-tb" loext:decorative="false"/>
      <style:paragraph-properties style:writing-mode="lr-tb"/>
    </style:style>
    <style:style style:name="gr277" style:family="graphic" style:parent-style-name="Default_5f_6">
      <style:graphic-properties draw:textarea-horizontal-align="justify" draw:textarea-vertical-align="middle" draw:auto-grow-height="false" fo:min-height="0.403cm" fo:min-width="1.06cm" style:writing-mode="lr-tb" loext:decorative="false"/>
      <style:paragraph-properties style:writing-mode="lr-tb"/>
    </style:style>
    <style:style style:name="gr278" style:family="graphic" style:parent-style-name="Default_5f_6">
      <style:graphic-properties draw:textarea-horizontal-align="justify" draw:textarea-vertical-align="middle" draw:auto-grow-height="false" fo:min-height="0.403cm" fo:min-width="0.902cm" style:writing-mode="lr-tb" loext:decorative="false"/>
      <style:paragraph-properties style:writing-mode="lr-tb"/>
    </style:style>
    <style:style style:name="gr279" style:family="graphic" style:parent-style-name="Default_5f_6">
      <style:graphic-properties draw:textarea-horizontal-align="justify" draw:textarea-vertical-align="middle" draw:auto-grow-height="false" fo:min-height="0.403cm" fo:min-width="1.059cm" style:writing-mode="lr-tb" loext:decorative="false"/>
      <style:paragraph-properties style:writing-mode="lr-tb"/>
    </style:style>
    <style:style style:name="gr280" style:family="graphic" style:parent-style-name="Default_5f_6">
      <style:graphic-properties draw:textarea-horizontal-align="justify" draw:textarea-vertical-align="middle" draw:auto-grow-height="false" fo:min-height="0.403cm" fo:min-width="0.551cm" style:writing-mode="lr-tb" loext:decorative="false"/>
      <style:paragraph-properties style:writing-mode="lr-tb"/>
    </style:style>
    <style:style style:name="gr281" style:family="graphic" style:parent-style-name="Default_5f_6">
      <style:graphic-properties draw:textarea-horizontal-align="justify" draw:textarea-vertical-align="middle" draw:auto-grow-height="false" fo:min-height="0.403cm" fo:min-width="0.398cm" style:writing-mode="lr-tb" loext:decorative="false"/>
      <style:paragraph-properties style:writing-mode="lr-tb"/>
    </style:style>
    <style:style style:name="gr282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1.713cm" fo:min-width="0cm" loext:decorative="false"/>
      <style:paragraph-properties style:writing-mode="lr-tb"/>
    </style:style>
    <style:style style:name="gr283" style:family="graphic" style:parent-style-name="Default_5f_6">
      <style:graphic-properties draw:textarea-horizontal-align="justify" draw:textarea-vertical-align="middle" draw:auto-grow-height="false" fo:min-height="0.403cm" fo:min-width="1.251cm" style:writing-mode="lr-tb" loext:decorative="false"/>
      <style:paragraph-properties style:writing-mode="lr-tb"/>
    </style:style>
    <style:style style:name="gr284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331cm" fo:min-width="4.415cm" loext:decorative="false"/>
      <style:paragraph-properties style:writing-mode="lr-tb"/>
    </style:style>
    <style:style style:name="gr285" style:family="graphic" style:parent-style-name="Default_5f_8">
      <style:graphic-properties draw:fill-color="#0000ff" draw:textarea-horizontal-align="justify" draw:textarea-vertical-align="middle" draw:auto-grow-height="false" fo:min-height="0.058cm" fo:min-width="0.237cm" loext:decorative="false"/>
    </style:style>
    <style:style style:name="gr286" style:family="graphic" style:parent-style-name="Default_5f_6">
      <style:graphic-properties draw:fill="none" draw:textarea-horizontal-align="justify" draw:textarea-vertical-align="middle" draw:auto-grow-height="false" fo:min-height="2.604cm" fo:min-width="4.145cm" loext:decorative="false"/>
    </style:style>
    <style:style style:name="gr287" style:family="graphic" style:parent-style-name="Default_5f_6">
      <style:graphic-properties draw:fill-color="#bc8f8f" draw:textarea-horizontal-align="justify" draw:textarea-vertical-align="middle" draw:auto-grow-height="false" fo:min-height="0cm" fo:min-width="0.549cm" loext:decorative="false"/>
    </style:style>
    <style:style style:name="gr288" style:family="graphic" style:parent-style-name="Default_5f_6">
      <style:graphic-properties draw:fill="none" draw:textarea-horizontal-align="justify" draw:textarea-vertical-align="middle" draw:auto-grow-height="false" fo:min-height="2.604cm" fo:min-width="4.157cm" loext:decorative="false"/>
    </style:style>
    <style:style style:name="gr289" style:family="graphic" style:parent-style-name="Default_5f_6">
      <style:graphic-properties draw:fill="none" draw:textarea-horizontal-align="justify" draw:textarea-vertical-align="middle" draw:auto-grow-height="false" fo:min-height="2.604cm" fo:min-width="4.164cm" loext:decorative="false"/>
    </style:style>
    <style:style style:name="gr290" style:family="graphic" style:parent-style-name="Default_5f_6">
      <style:graphic-properties draw:fill-color="#bc8f8f" draw:textarea-horizontal-align="justify" draw:textarea-vertical-align="middle" draw:auto-grow-height="false" fo:min-height="0cm" fo:min-width="0.547cm" loext:decorative="false"/>
    </style:style>
    <style:style style:name="gr291" style:family="graphic" style:parent-style-name="Default_5f_8">
      <style:graphic-properties draw:fill-color="#0000ff" draw:textarea-horizontal-align="justify" draw:textarea-vertical-align="middle" draw:auto-grow-height="false" fo:min-height="0.058cm" fo:min-width="0.238cm" loext:decorative="false"/>
    </style:style>
    <style:style style:name="gr292" style:family="graphic" style:parent-style-name="Default_5f_6">
      <style:graphic-properties draw:fill-color="#bc8f8f" draw:textarea-horizontal-align="justify" draw:textarea-vertical-align="middle" draw:auto-grow-height="false" fo:min-height="0cm" fo:min-width="0.55cm" loext:decorative="false"/>
    </style:style>
    <style:style style:name="gr293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331cm" fo:min-width="4.554cm" loext:decorative="false"/>
      <style:paragraph-properties style:writing-mode="lr-tb"/>
    </style:style>
    <style:style style:name="gr294" style:family="graphic" style:parent-style-name="Default_5f_6">
      <style:graphic-properties draw:textarea-horizontal-align="justify" draw:textarea-vertical-align="middle" draw:auto-grow-height="false" fo:min-height="0.403cm" fo:min-width="0.79cm" style:writing-mode="lr-tb" loext:decorative="false"/>
      <style:paragraph-properties style:writing-mode="lr-tb"/>
    </style:style>
    <style:style style:name="gr295" style:family="graphic" style:parent-style-name="Default_5f_6">
      <style:graphic-properties draw:textarea-horizontal-align="justify" draw:textarea-vertical-align="middle" draw:auto-grow-height="false" fo:min-height="0.403cm" fo:min-width="0.838cm" style:writing-mode="lr-tb" loext:decorative="false"/>
      <style:paragraph-properties style:writing-mode="lr-tb"/>
    </style:style>
    <style:style style:name="gr296" style:family="graphic" style:parent-style-name="Default_5f_6">
      <style:graphic-properties draw:textarea-horizontal-align="justify" draw:textarea-vertical-align="middle" draw:auto-grow-height="false" fo:min-height="0.403cm" fo:min-width="1.262cm" style:writing-mode="lr-tb" loext:decorative="false"/>
      <style:paragraph-properties style:writing-mode="lr-tb"/>
    </style:style>
    <style:style style:name="gr297" style:family="graphic" style:parent-style-name="Default_5f_6">
      <style:graphic-properties draw:stroke="dash" draw:stroke-dash="Ultrafine_20_Dashed" svg:stroke-color="#808080" draw:fill="none" draw:fill-color="#ffffff" draw:textarea-horizontal-align="justify" draw:textarea-vertical-align="middle" draw:auto-grow-height="false" fo:min-height="0.403cm" fo:min-width="1.651cm" loext:decorative="false"/>
    </style:style>
    <style:style style:name="gr298" style:family="graphic" style:parent-style-name="Default_5f_6">
      <style:graphic-properties draw:stroke="dash" draw:stroke-dash="Ultrafine_20_Dashed" svg:stroke-color="#808080" draw:fill="none" draw:fill-color="#ffffff" draw:textarea-horizontal-align="justify" draw:textarea-vertical-align="middle" draw:auto-grow-height="false" fo:min-height="0.403cm" fo:min-width="1.652cm" loext:decorative="false"/>
    </style:style>
    <style:style style:name="gr299" style:family="graphic" style:parent-style-name="objectwithoutfill">
      <style:graphic-properties svg:stroke-color="#000000" draw:marker-end="Arrowheads_20_71" draw:marker-end-width="0.3cm" draw:fill="none" draw:textarea-vertical-align="middle" loext:decorative="false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7cm" loext:decorative="false"/>
      <style:paragraph-properties style:writing-mode="lr-tb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22cm" loext:decorative="false"/>
      <style:paragraph-properties style:writing-mode="lr-tb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7cm" loext:decorative="false"/>
      <style:paragraph-properties style:writing-mode="lr-tb"/>
    </style:style>
    <style:style style:name="gr30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97cm" loext:decorative="false"/>
      <style:paragraph-properties style:writing-mode="lr-tb"/>
    </style:style>
    <style:style style:name="gr305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0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28cm" loext:decorative="false"/>
      <style:paragraph-properties style:writing-mode="lr-tb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92cm" loext:decorative="false"/>
      <style:paragraph-properties style:writing-mode="lr-tb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14cm" loext:decorative="false"/>
      <style:paragraph-properties style:writing-mode="lr-tb"/>
    </style:style>
    <style:style style:name="gr310" style:family="graphic" style:parent-style-name="objectwithoutfill">
      <style:graphic-properties svg:stroke-width="0.203cm" svg:stroke-color="#ff8000" draw:marker-start-width="0.508cm" draw:marker-end="Arrowheads_20_72" draw:marker-end-width="0.61cm" draw:fill="none" draw:fill-color="#ff972f" draw:textarea-vertical-align="middle" fo:padding-top="0.226cm" fo:padding-bottom="0.226cm" fo:padding-left="0.351cm" fo:padding-right="0.351cm" loext:decorative="false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91cm" loext:decorative="false"/>
      <style:paragraph-properties style:writing-mode="lr-tb"/>
    </style:style>
    <style:style style:name="gr3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74cm" loext:decorative="false"/>
      <style:paragraph-properties style:writing-mode="lr-tb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 loext:decorative="false"/>
      <style:paragraph-properties style:writing-mode="lr-tb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377cm" loext:decorative="false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8.027cm" loext:decorative="false"/>
      <style:paragraph-properties style:writing-mode="lr-tb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37cm" loext:decorative="false"/>
      <style:paragraph-properties style:writing-mode="lr-tb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14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319" style:family="graphic" style:parent-style-name="objectwithoutfill">
      <style:graphic-properties svg:stroke-width="0.051cm" svg:stroke-color="#ff0000" draw:marker-start="Arrowheads_20_74" draw:marker-start-width="0.279cm" draw:marker-end="" draw:marker-end-width="0.279cm" draw:fill="none" draw:textarea-vertical-align="middle" fo:padding-top="0.15cm" fo:padding-bottom="0.15cm" fo:padding-left="0.275cm" fo:padding-right="0.275cm" loext:decorative="false"/>
    </style:style>
    <style:style style:name="gr3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1cm" loext:decorative="false"/>
      <style:paragraph-properties style:writing-mode="lr-tb"/>
    </style:style>
    <style:style style:name="gr32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712cm" fo:min-width="5.956cm" loext:decorative="false"/>
      <style:paragraph-properties style:writing-mode="lr-tb"/>
    </style:style>
    <style:style style:name="gr322" style:family="graphic" style:parent-style-name="objectwithoutfill">
      <style:graphic-properties svg:stroke-width="0.203cm" svg:stroke-color="#808080" draw:marker-start-width="0.508cm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91cm" fo:min-width="0cm" loext:decorative="false"/>
      <style:paragraph-properties style:writing-mode="lr-tb"/>
    </style:style>
    <style:style style:name="gr324" style:family="graphic" style:parent-style-name="standard">
      <style:graphic-properties draw:stroke="none" draw:fill="solid" draw:fill-color="#ff972f" draw:opacity="100%" draw:textarea-horizontal-align="justify" draw:textarea-vertical-align="middle" draw:auto-grow-height="false" fo:min-height="1.125cm" fo:min-width="1.559cm" draw:shadow-opacity="100%" loext:decorative="false"/>
    </style:style>
    <style:style style:name="gr325" style:family="graphic" style:parent-style-name="standard">
      <style:graphic-properties draw:stroke="none" draw:fill="solid" draw:fill-color="#ffd8ce" draw:opacity="100%" draw:textarea-horizontal-align="justify" draw:textarea-vertical-align="middle" draw:auto-grow-height="false" fo:min-height="1.125cm" fo:min-width="1.296cm" draw:shadow-opacity="100%" loext:decorative="false"/>
    </style:style>
    <style:style style:name="gr326" style:family="graphic" style:parent-style-name="standard" style:list-style-name="L2">
      <style:graphic-properties draw:stroke="solid" svg:stroke-color="#158466" draw:fill="solid" draw:fill-color="#dde8cb" draw:textarea-vertical-align="middle" draw:auto-grow-height="true" draw:auto-grow-width="false" fo:min-height="1.655cm" fo:padding-left="0cm" fo:padding-right="0cm" loext:decorative="false"/>
      <style:paragraph-properties style:writing-mode="lr-tb"/>
    </style:style>
    <style:style style:name="gr327" style:family="graphic" style:parent-style-name="objectwithoutfill">
      <style:graphic-properties svg:stroke-width="0.102cm" svg:stroke-color="#ff8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328" style:family="graphic" style:parent-style-name="objectwithoutfill">
      <style:graphic-properties svg:stroke-width="0.102cm" svg:stroke-color="#ffa6a6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329" style:family="graphic" style:parent-style-name="objectwithoutfill">
      <style:graphic-properties draw:stroke="dash" draw:stroke-dash="Dash" svg:stroke-width="0.102cm" svg:stroke-color="#d62e4e" draw:marker-start-width="0.356cm" draw:marker-end="Arrowheads_20_81" draw:marker-end-width="0.356cm" draw:fill="none" draw:textarea-vertical-align="middle" fo:padding-top="0.175cm" fo:padding-bottom="0.175cm" fo:padding-left="0.3cm" fo:padding-right="0.3cm" loext:decorative="false"/>
    </style:style>
    <style:style style:name="gr330" style:family="graphic" style:parent-style-name="objectwithoutfill">
      <style:graphic-properties draw:stroke="solid" draw:stroke-dash="Dash" svg:stroke-width="0.102cm" svg:stroke-color="#d62e4e" draw:marker-start-width="0.356cm" draw:marker-end="Arrowheads_20_81" draw:marker-end-width="0.356cm" draw:fill="none" draw:textarea-vertical-align="middle" fo:padding-top="0.175cm" fo:padding-bottom="0.175cm" fo:padding-left="0.3cm" fo:padding-right="0.3cm" loext:decorative="false"/>
    </style:style>
    <style:style style:name="gr3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866cm" loext:decorative="false"/>
      <style:paragraph-properties style:writing-mode="lr-tb"/>
    </style:style>
    <style:style style:name="gr3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941cm" loext:decorative="false"/>
      <style:paragraph-properties style:writing-mode="lr-tb"/>
    </style:style>
    <style:style style:name="gr3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17cm" fo:min-width="0cm" loext:decorative="false"/>
      <style:paragraph-properties style:writing-mode="lr-tb"/>
    </style:style>
    <style:style style:name="gr334" style:family="graphic" style:parent-style-name="objectwithoutfill">
      <style:graphic-properties svg:stroke-width="0.102cm" svg:stroke-color="#d62e4e" draw:marker-start-width="0.356cm" draw:marker-end="Arrowheads_20_82" draw:marker-end-width="0.356cm" draw:fill="none" draw:textarea-vertical-align="middle" fo:padding-top="0.176cm" fo:padding-bottom="0.176cm" fo:padding-left="0.301cm" fo:padding-right="0.301cm" loext:decorative="false"/>
    </style:style>
    <style:style style:name="gr335" style:family="graphic" style:parent-style-name="standard" style:list-style-name="L2">
      <style:graphic-properties draw:stroke="solid" svg:stroke-color="#158466" draw:fill="solid" draw:fill-color="#dde8cb" draw:textarea-vertical-align="middle" draw:auto-grow-height="true" draw:auto-grow-width="false" fo:min-height="1.655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37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38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cm" fo:margin-bottom="0cm" fo:text-align="center" style:text-autospace="none"/>
    </style:style>
    <style:style style:name="P2" style:family="paragraph">
      <loext:graphic-properties draw:fill="none" draw:fill-color="#ffffff"/>
      <style:paragraph-properties fo:margin-top="0cm" fo:margin-bottom="0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0pt" fo:language="en" fo:country="US" fo:font-style="normal" fo:font-weight="normal" style:font-name-asian="Monaco" style:font-size-asian="40pt" style:font-style-asian="normal" style:font-weight-asian="normal" style:font-name-complex="Monaco" style:font-size-complex="40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lef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lef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/>
    </style:style>
    <style:style style:name="P18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19" style:family="paragraph">
      <loext:graphic-properties draw:fill="none" draw:fill-color="#ffffff"/>
      <style:text-properties fo:font-size="28pt" style:font-size-asian="28pt" style:font-size-complex="28pt"/>
    </style:style>
    <style:style style:name="P20" style:family="paragraph">
      <loext:graphic-properties draw:fill-color="#ffffff"/>
      <style:text-properties fo:font-size="20pt" fo:language="en" fo:country="US"/>
    </style:style>
    <style:style style:name="P21" style:family="paragraph">
      <loext:graphic-properties draw:fill="solid" draw:fill-color="#eeeeee"/>
      <style:paragraph-properties fo:text-align="center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solid" draw:fill-color="#81d41a"/>
      <style:paragraph-properties fo:text-align="center"/>
    </style:style>
    <style:style style:name="P26" style:family="paragraph">
      <loext:graphic-properties draw:fill="solid" draw:fill-color="#ffff00"/>
      <style:text-properties fo:font-size="18pt"/>
    </style:style>
    <style:style style:name="P27" style:family="paragraph">
      <loext:graphic-properties draw:fill="solid" draw:fill-color="#b2b2b2"/>
      <style:text-properties fo:font-size="18pt"/>
    </style:style>
    <style:style style:name="P28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9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30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31" style:family="paragraph">
      <loext:graphic-properties draw:fill="solid" draw:fill-color="#ffd8ce"/>
      <style:text-properties fo:font-size="18pt"/>
    </style:style>
    <style:style style:name="P32" style:family="paragraph">
      <loext:graphic-properties draw:fill="solid" draw:fill-color="#ffb66c"/>
      <style:text-properties fo:font-size="18pt"/>
    </style:style>
    <style:style style:name="P33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34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37" style:family="paragraph">
      <style:paragraph-properties fo:margin-top="0cm" fo:margin-bottom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8" style:family="paragraph">
      <loext:graphic-properties draw:fill="none" draw:fill-color="#ffffff"/>
      <style:paragraph-properties fo:margin-top="0cm" fo:margin-bottom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1" fo:font-size="10pt" style:font-size-asian="10pt" style:font-size-complex="10pt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41" style:family="paragraph"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42" style:family="paragraph">
      <loext:graphic-properties draw:fill-color="#e6e6e6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43" style:family="paragraph">
      <loext:graphic-properties draw:fill="none" draw:fill-color="#ffffff"/>
      <style:text-properties style:use-window-font-color="true" loext:opacity="0%" fo:font-size="48pt" fo:language="en" fo:country="US" style:font-size-asian="48pt" style:font-size-complex="48pt"/>
    </style:style>
    <style:style style:name="P44" style:family="paragraph">
      <loext:graphic-properties draw:fill="none"/>
      <style:text-properties fo:language="en" fo:country="US"/>
    </style:style>
    <style:style style:name="P45" style:family="paragraph">
      <style:paragraph-properties fo:text-align="center"/>
      <style:text-properties fo:color="#000000" loext:opacity="100%" fo:font-size="26pt" fo:language="en" fo:country="US" style:font-size-asian="26pt" style:font-size-complex="26pt"/>
    </style:style>
    <style:style style:name="P46" style:family="paragraph">
      <loext:graphic-properties draw:fill-color="#3deb3d"/>
      <style:paragraph-properties fo:text-align="center" style:writing-mode="lr-tb"/>
      <style:text-properties fo:color="#000000" loext:opacity="100%" fo:font-size="26pt" fo:language="en" fo:country="US" style:font-size-asian="26pt" style:font-size-complex="26pt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26pt" fo:language="en" fo:country="US" style:font-size-asian="26pt" style:font-size-complex="26pt"/>
    </style:style>
    <style:style style:name="P48" style:family="paragraph">
      <loext:graphic-properties draw:fill-color="#3deb3d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26pt" fo:language="en" fo:country="US" style:font-size-asian="26pt" style:font-size-complex="26pt"/>
    </style:style>
    <style:style style:name="P49" style:family="paragraph">
      <loext:graphic-properties draw:fill-color="#e6e6e6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0" style:family="paragraph">
      <loext:graphic-properties draw:fill-color="#ffffff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1" style:family="paragraph">
      <loext:graphic-properties draw:fill-color="#00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2" style:family="paragraph">
      <loext:graphic-properties draw:fill-color="#996633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3" style:family="paragraph">
      <loext:graphic-properties draw:fill-color="#ff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4" style:family="paragraph">
      <style:paragraph-properties fo:text-align="center"/>
      <style:text-properties style:use-window-font-color="true" loext:opacity="0%" fo:font-size="20pt" fo:language="en" fo:country="US" style:font-size-asian="20pt" style:font-size-complex="20pt"/>
    </style:style>
    <style:style style:name="P55" style:family="paragraph">
      <loext:graphic-properties draw:fill-color="#cccccc"/>
      <style:paragraph-properties fo:text-align="center" style:writing-mode="lr-tb"/>
      <style:text-properties style:use-window-font-color="true" loext:opacity="0%" fo:font-size="20pt" fo:language="en" fo:country="US" style:font-size-asian="20pt" style:font-size-complex="20pt"/>
    </style:style>
    <style:style style:name="P56" style:family="paragraph">
      <style:paragraph-properties fo:text-align="center"/>
      <style:text-properties style:use-window-font-color="true" loext:opacity="0%" fo:font-size="16pt" fo:language="en" fo:country="US" style:font-size-asian="16pt" style:font-size-complex="16pt"/>
    </style:style>
    <style:style style:name="P57" style:family="paragraph">
      <loext:graphic-properties draw:fill-color="#cccccc"/>
      <style:paragraph-properties fo:text-align="center" style:writing-mode="lr-tb"/>
      <style:text-properties style:use-window-font-color="true" loext:opacity="0%" fo:font-size="16pt" fo:language="en" fo:country="US" style:font-size-asian="16pt" style:font-size-complex="16pt"/>
    </style:style>
    <style:style style:name="P58" style:family="paragraph">
      <loext:graphic-properties draw:fill-color="#cccccc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59" style:family="paragraph">
      <style:paragraph-properties fo:margin-top="0cm" fo:margin-bottom="0.1cm"/>
    </style:style>
    <style:style style:name="P60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61" style:family="paragraph">
      <loext:graphic-properties draw:fill="none" draw:fill-color="#ffffff"/>
      <style:text-properties fo:color="#666666" loext:opacity="100%" fo:font-size="22pt" style:font-size-asian="22pt" style:font-size-complex="22pt"/>
    </style:style>
    <style:style style:name="P62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63" style:family="paragraph">
      <style:paragraph-properties fo:margin-top="0cm" fo:margin-bottom="0cm"/>
    </style:style>
    <style:style style:name="P64" style:family="paragraph">
      <loext:graphic-properties draw:fill="none" draw:fill-color="#ffffff"/>
      <style:text-properties fo:color="#666666" loext:opacity="100%"/>
    </style:style>
    <style:style style:name="P65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66" style:family="paragraph">
      <loext:graphic-properties draw:fill="none" draw:fill-color="#ffffff"/>
      <style:text-properties fo:font-size="24pt" style:font-size-asian="24pt" style:font-size-complex="24pt"/>
    </style:style>
    <style:style style:name="P67" style:family="paragraph">
      <loext:graphic-properties draw:fill="none"/>
      <style:text-properties fo:font-size="18pt"/>
    </style:style>
    <style:style style:name="P68" style:family="paragraph">
      <loext:graphic-properties draw:fill-color="#ffffff"/>
      <style:paragraph-properties fo:text-align="center"/>
    </style:style>
    <style:style style:name="P6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none"/>
      <style:text-properties fo:color="#808080" loext:opacity="100%" fo:font-size="18pt"/>
    </style:style>
    <style:style style:name="P71" style:family="paragraph">
      <style:paragraph-properties fo:margin-left="0cm" fo:margin-right="0cm" fo:margin-top="0cm" fo:margin-bottom="0cm" fo:line-height="100%" fo:text-align="left" fo:text-indent="0cm"/>
      <style:text-properties fo:font-size="18pt"/>
    </style:style>
    <style:style style:name="P72" style:family="paragraph">
      <loext:graphic-properties draw:fill="none"/>
      <style:paragraph-properties fo:margin-left="0cm" fo:margin-right="0cm" fo:margin-top="0cm" fo:margin-bottom="0cm" fo:line-height="100%" fo:text-align="left" fo:text-indent="0cm" style:writing-mode="lr-tb" style:font-independent-line-spacing="true"/>
      <style:text-properties fo:font-size="18pt"/>
    </style:style>
    <style:style style:name="P73" style:family="paragraph">
      <loext:graphic-properties draw:fill="solid" draw:fill-color="#dddddd"/>
      <style:paragraph-properties fo:text-align="center"/>
    </style:style>
    <style:style style:name="P74" style:family="paragraph">
      <loext:graphic-properties draw:fill="none" draw:fill-color="#ffffff"/>
      <style:text-properties fo:font-size="16pt" style:font-size-asian="16pt" style:font-size-complex="16pt"/>
    </style:style>
    <style:style style:name="P75" style:family="paragraph">
      <style:paragraph-properties fo:margin-left="0cm" fo:margin-right="0cm" fo:margin-top="0cm" fo:margin-bottom="0cm" fo:line-height="100%" fo:text-indent="0cm"/>
    </style:style>
    <style:style style:name="P76" style:family="paragraph">
      <loext:graphic-properties draw:fill="none" draw:fill-color="#ffffff"/>
      <style:text-properties fo:font-size="14pt" style:font-size-asian="14pt" style:font-size-complex="14pt"/>
    </style:style>
    <style:style style:name="P77" style:family="paragraph">
      <loext:graphic-properties draw:fill="solid" draw:fill-color="#ffd8ce"/>
      <style:text-properties fo:font-size="12pt" style:font-size-asian="12pt" style:font-size-complex="12pt"/>
    </style:style>
    <style:style style:name="P78" style:family="paragraph">
      <loext:graphic-properties draw:fill="solid" draw:fill-color="#ffff00"/>
      <style:text-properties fo:font-size="12pt" style:font-size-asian="12pt" style:font-size-complex="12pt"/>
    </style:style>
    <style:style style:name="P79" style:family="paragraph">
      <loext:graphic-properties draw:fill="solid" draw:fill-color="#ffb66c"/>
      <style:text-properties fo:font-size="12pt" style:font-size-asian="12pt" style:font-size-complex="12pt"/>
    </style:style>
    <style:style style:name="P80" style:family="paragraph">
      <loext:graphic-properties draw:fill="solid" draw:fill-color="#cccccc"/>
      <style:text-properties fo:font-size="12pt" style:font-size-asian="12pt" style:font-size-complex="12pt"/>
    </style:style>
    <style:style style:name="P81" style:family="paragraph">
      <style:paragraph-properties fo:margin-top="0cm" fo:margin-bottom="0cm" fo:text-align="center"/>
    </style:style>
    <style:style style:name="P82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83" style:family="paragraph">
      <style:paragraph-properties fo:text-align="center"/>
      <style:text-properties fo:font-size="12pt" style:font-size-asian="12pt" style:font-size-complex="12pt"/>
    </style:style>
    <style:style style:name="P84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85" style:family="paragraph">
      <style:paragraph-properties fo:margin-left="0cm" fo:margin-right="0cm" fo:margin-top="0cm" fo:margin-bottom="0cm" fo:line-height="100%" fo:text-align="lef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6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87" style:family="paragraph">
      <style:paragraph-properties fo:text-align="center"/>
      <style:text-properties fo:font-size="18pt"/>
    </style:style>
    <style:style style:name="P88" style:family="paragraph">
      <loext:graphic-properties draw:fill-color="#cccccc"/>
      <style:paragraph-properties fo:text-align="center" style:writing-mode="lr-tb"/>
      <style:text-properties fo:font-size="18pt"/>
    </style:style>
    <style:style style:name="P8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90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1" style:family="paragraph">
      <loext:graphic-properties draw:fill="solid" draw:fill-color="#cccccc" draw:opacity="100%"/>
      <style:paragraph-properties fo:text-align="center" style:writing-mode="lr-tb"/>
      <style:text-properties fo:font-size="18pt"/>
    </style:style>
    <style:style style:name="P92" style:family="paragraph">
      <style:paragraph-properties fo:text-align="center"/>
      <style:text-properties fo:font-size="16pt" fo:background-color="transparent" style:font-size-asian="16pt" style:font-size-complex="16pt"/>
    </style:style>
    <style:style style:name="P93" style:family="paragraph">
      <loext:graphic-properties draw:fill-color="#ffff00" draw:opacity="50%"/>
      <style:paragraph-properties fo:text-align="center" style:writing-mode="lr-tb"/>
      <style:text-properties fo:font-size="16pt" fo:background-color="transparent" style:font-size-asian="16pt" style:font-size-complex="16pt"/>
    </style:style>
    <style:style style:name="P94" style:family="paragraph">
      <style:paragraph-properties fo:text-align="center"/>
      <style:text-properties fo:font-size="16pt" style:font-size-asian="16pt" style:font-size-complex="16pt"/>
    </style:style>
    <style:style style:name="P95" style:family="paragraph">
      <loext:graphic-properties draw:fill="solid" draw:fill-color="#ffff00" draw:opacity="50%"/>
      <style:paragraph-properties fo:text-align="center" style:writing-mode="lr-tb"/>
      <style:text-properties fo:font-size="16pt" style:font-size-asian="16pt" style:font-size-complex="16pt"/>
    </style:style>
    <style:style style:name="P96" style:family="paragraph">
      <style:paragraph-properties fo:text-align="center"/>
      <style:text-properties fo:color="#333333" loext:opacity="100%" fo:font-size="18pt"/>
    </style:style>
    <style:style style:name="P97" style:family="paragraph">
      <loext:graphic-properties draw:fill="solid" draw:fill-color="#cccccc" draw:opacity="25%"/>
      <style:paragraph-properties fo:text-align="center" style:writing-mode="lr-tb"/>
      <style:text-properties fo:color="#333333" loext:opacity="100%" fo:font-size="18pt"/>
    </style:style>
    <style:style style:name="P98" style:family="paragraph">
      <loext:graphic-properties draw:fill="solid" draw:fill-color="#81d41a" draw:opacity="40%"/>
      <style:paragraph-properties fo:text-align="center"/>
    </style:style>
    <style:style style:name="P99" style:family="paragraph">
      <loext:graphic-properties draw:fill="solid" draw:fill-color="#ffff00" draw:opacity="40%"/>
      <style:paragraph-properties fo:text-align="center"/>
    </style:style>
    <style:style style:name="P100" style:family="paragraph">
      <loext:graphic-properties draw:fill="solid" draw:fill-color="#729fcf" draw:opacity="40%"/>
      <style:paragraph-properties fo:text-align="center"/>
    </style:style>
    <style:style style:name="P101" style:family="paragraph">
      <loext:graphic-properties draw:fill="solid" draw:fill-color="#ff972f" draw:opacity="40%"/>
      <style:paragraph-properties fo:text-align="center"/>
    </style:style>
    <style:style style:name="P102" style:family="paragraph">
      <loext:graphic-properties draw:fill="solid" draw:fill-color="#ffd8ce" draw:opacity="40%"/>
      <style:paragraph-properties fo:text-align="center"/>
    </style:style>
    <style:style style:name="P10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4" style:family="paragraph">
      <style:paragraph-properties fo:margin-top="0.42cm" fo:margin-bottom="0.35cm"/>
    </style:style>
    <style:style style:name="P105" style:family="paragraph">
      <loext:graphic-properties draw:fill="none" draw:fill-color="#ffffff"/>
      <style:text-properties fo:font-size="18pt" style:font-size-asian="18pt" style:font-size-complex="18pt"/>
    </style:style>
    <style:style style:name="P106" style:family="paragraph">
      <loext:graphic-properties draw:fill="none" draw:fill-color="#ffffff"/>
      <style:paragraph-properties fo:text-align="center"/>
    </style:style>
    <style:style style:name="P107" style:family="paragraph">
      <loext:graphic-properties draw:fill="none"/>
      <style:paragraph-properties fo:text-align="left"/>
      <style:text-properties fo:font-size="18pt"/>
    </style:style>
    <style:style style:name="P108" style:family="paragraph">
      <loext:graphic-properties draw:fill="none" draw:fill-color="#ffffff"/>
      <style:text-properties fo:font-size="40pt" style:font-size-asian="40pt" style:font-size-complex="40pt"/>
    </style:style>
    <style:style style:name="P109" style:family="paragraph">
      <loext:graphic-properties draw:fill="solid" draw:fill-color="#ffff00" draw:opacity="40%"/>
      <style:paragraph-properties fo:text-align="center" style:writing-mode="lr-tb"/>
    </style:style>
    <style:style style:name="P110" style:family="paragraph">
      <loext:graphic-properties draw:fill="solid" draw:fill-color="#dedce6"/>
      <style:paragraph-properties fo:text-align="center"/>
    </style:style>
    <style:style style:name="P111" style:family="paragraph">
      <loext:graphic-properties draw:fill-color="#666666"/>
      <style:paragraph-properties fo:text-align="center"/>
    </style:style>
    <style:style style:name="P112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113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114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115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16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117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18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19" style:family="paragraph">
      <loext:graphic-properties draw:fill="none" draw:fill-color="#ffffff"/>
      <style:paragraph-properties style:writing-mode="lr-tb" style:font-independent-line-spacing="true"/>
    </style:style>
    <style:style style:name="P120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21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22" style:family="paragraph">
      <loext:graphic-properties draw:fill-color="#bc8f8f"/>
      <style:paragraph-properties fo:text-align="center"/>
    </style:style>
    <style:style style:name="P123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124" style:family="paragraph">
      <style:paragraph-properties fo:text-align="center"/>
      <style:text-properties fo:color="#000000" loext:opacity="100%" fo:font-size="18pt"/>
    </style:style>
    <style:style style:name="P125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126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127" style:family="paragraph">
      <loext:graphic-properties draw:fill="solid" draw:fill-color="#ff0000"/>
      <style:paragraph-properties style:writing-mode="lr-tb" style:font-independent-line-spacing="true"/>
    </style:style>
    <style:style style:name="P128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129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130" style:family="paragraph">
      <loext:graphic-properties draw:fill="none" draw:fill-color="#ffffff"/>
      <style:text-properties fo:color="#125bf3" loext:opacity="100%" fo:font-size="12pt" style:font-size-asian="12pt" style:font-size-complex="12pt"/>
    </style:style>
    <style:style style:name="P131" style:family="paragraph">
      <loext:graphic-properties draw:fill="none"/>
      <style:text-properties fo:font-size="24pt" style:font-size-asian="24pt" style:font-size-complex="24pt"/>
    </style:style>
    <style:style style:name="P132" style:family="paragraph">
      <loext:graphic-properties draw:fill-color="#ffffff"/>
    </style:style>
    <style:style style:name="P133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P134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P135" style:family="paragraph">
      <style:paragraph-properties fo:text-align="center"/>
      <style:text-properties fo:font-size="13.5pt"/>
    </style:style>
    <style:style style:name="P136" style:family="paragraph">
      <style:paragraph-properties fo:text-align="center" style:writing-mode="lr-tb"/>
      <style:text-properties fo:font-size="13.5pt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38" style:family="paragraph">
      <loext:graphic-properties draw:fill-color="#0000ff"/>
      <style:paragraph-properties fo:text-align="center"/>
    </style:style>
    <style:style style:name="P139" style:family="paragraph">
      <loext:graphic-properties draw:fill="gradient" draw:fill-color="#ffa500" draw:fill-gradient-name="Sunshine" draw:gradient-step-count="0"/>
      <style:paragraph-properties fo:text-align="center"/>
    </style:style>
    <style:style style:name="P140" style:family="paragraph">
      <loext:graphic-properties draw:fill="none" draw:fill-color="#ffffff"/>
      <style:paragraph-properties fo:margin-top="0cm" fo:margin-bottom="0cm"/>
      <style:text-properties fo:color="#32cd32" loext:opacity="100%" fo:font-size="18pt" style:font-size-asian="18pt" style:font-size-complex="18pt"/>
    </style:style>
    <style:style style:name="P141" style:family="paragraph">
      <style:paragraph-properties fo:margin-left="0cm" fo:margin-right="0cm" fo:margin-top="0cm" fo:margin-bottom="0cm" fo:line-height="93%" fo:text-align="center" fo:text-indent="0cm" style:punctuation-wrap="hanging" style:line-break="strict"/>
      <style:text-properties fo:color="#000000" loext:opacity="100%" fo:font-size="31.5pt" fo:font-weight="normal" style:font-size-asian="42pt" style:font-weight-asian="normal" style:font-size-complex="42pt" style:font-weight-complex="normal"/>
    </style:style>
    <style:style style:name="P142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31.5pt" fo:font-weight="normal" style:font-size-asian="42pt" style:font-weight-asian="normal" style:font-size-complex="42pt" style:font-weight-complex="normal"/>
    </style:style>
    <style:style style:name="P143" style:family="paragraph">
      <loext:graphic-properties draw:fill="none" draw:fill-color="#ff972f"/>
      <style:paragraph-properties fo:text-align="center"/>
    </style:style>
    <style:style style:name="P144" style:family="paragraph">
      <loext:graphic-properties draw:fill="none" draw:fill-color="#ffffff"/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P145" style:family="paragraph">
      <loext:graphic-properties draw:fill="none" draw:fill-color="#ffffff"/>
      <style:text-properties fo:color="#666666" loext:opacity="100%" fo:font-size="24pt" style:font-size-asian="24pt" style:font-size-complex="24pt"/>
    </style:style>
    <style:style style:name="P14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147" style:family="paragraph">
      <loext:graphic-properties draw:fill="none" draw:fill-color="#ffffff"/>
      <style:text-properties fo:color="#ff0000" loext:opacity="100%" fo:font-size="18pt"/>
    </style:style>
    <style:style style:name="P14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6pt" style:font-size-asian="26pt" style:font-size-complex="26pt"/>
    </style:style>
    <style:style style:name="P149" style:family="paragraph">
      <loext:graphic-properties draw:fill="none" draw:fill-color="#ffffff"/>
      <style:text-properties fo:color="#808080" loext:opacity="100%" fo:font-size="18pt"/>
    </style:style>
    <style:style style:name="P150" style:family="paragraph">
      <style:paragraph-properties fo:margin-top="0cm" fo:margin-bottom="0.457cm"/>
    </style:style>
    <style:style style:name="P151" style:family="paragraph">
      <style:paragraph-properties fo:margin-left="0cm" fo:margin-right="0cm" fo:margin-top="0cm" fo:margin-bottom="0.457cm" fo:line-height="100%" fo:text-indent="0cm"/>
    </style:style>
    <style:style style:name="P152" style:family="paragraph">
      <loext:graphic-properties draw:fill="none" draw:fill-color="#ffffff"/>
      <style:paragraph-properties fo:margin-top="0cm" fo:margin-bottom="0.457cm"/>
      <style:text-properties fo:font-size="22pt" style:font-size-asian="22pt" style:font-size-complex="22pt"/>
    </style:style>
    <style:style style:name="P153" style:family="paragraph">
      <loext:graphic-properties draw:fill="solid" draw:fill-color="#ff972f" draw:opacity="100%"/>
      <style:paragraph-properties fo:text-align="center"/>
    </style:style>
    <style:style style:name="P154" style:family="paragraph">
      <loext:graphic-properties draw:fill="solid" draw:fill-color="#ffd8ce" draw:opacity="100%"/>
      <style:paragraph-properties fo:text-align="center"/>
    </style:style>
    <style:style style:name="P155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/>
    </style:style>
    <style:style style:name="P156" style:family="paragraph">
      <loext:graphic-properties draw:fill="none" draw:fill-color="#ffffff"/>
      <style:text-properties fo:color="#bf0041" loext:opacity="100%" fo:font-size="16pt" style:font-size-asian="16pt" style:font-size-complex="16pt"/>
    </style:style>
    <style:style style:name="P157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58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59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1" fo:font-size="39pt" fo:language="en" fo:country="US" fo:font-style="normal" fo:text-shadow="none" style:text-underline-style="none" fo:font-weight="normal" style:letter-kerning="true" style:font-name-asian="Helvetica" style:font-size-asian="39pt" style:font-style-asian="normal" style:font-weight-asian="normal" style:font-name-complex="Helvetica" style:font-size-complex="3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bold" style:font-size-asian="44pt" style:font-weight-asian="bold" style:font-size-complex="4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666666" loext:opacity="100%" fo:font-size="28pt" style:font-size-asian="28pt" style:font-size-complex="28pt"/>
    </style:style>
    <style:style style:name="T12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8pt"/>
    </style:style>
    <style:style style:name="T14" style:family="text">
      <style:text-properties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size="15pt" fo:font-style="italic" style:font-size-asian="15pt" style:font-style-asian="italic" style:font-size-complex="15pt" style:font-style-complex="italic"/>
    </style:style>
    <style:style style:name="T16" style:family="text">
      <style:text-properties fo:color="#125bf3" loext:opacity="100%" fo:font-size="11pt" style:font-size-asian="11pt" style:font-size-complex="11pt"/>
    </style:style>
    <style:style style:name="T17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color="#1a32f7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Times-Roman" style:font-size-asian="10pt" style:font-style-asian="normal" style:font-weight-asian="normal" style:font-name-complex="Times-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Times-Roman" style:font-size-asian="10pt" style:font-style-asian="normal" style:font-weight-asian="normal" style:font-name-complex="Times-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enlo" style:font-size-asian="10pt" style:font-style-asian="normal" style:font-weight-asian="normal" style:font-name-complex="Menl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8080" loext:opacity="100%" fo:font-size="28pt" fo:language="en" fo:country="US" style:font-size-asian="28pt" style:font-size-complex="28pt"/>
    </style:style>
    <style:style style:name="T22" style:family="text">
      <style:text-properties style:use-window-font-color="true" loext:opacity="0%" fo:font-size="14pt" fo:language="en" fo:country="US" style:font-size-asian="14pt" style:font-size-complex="14pt"/>
    </style:style>
    <style:style style:name="T23" style:family="text">
      <style:text-properties style:use-window-font-color="true" loext:opacity="0%" fo:font-size="18pt" fo:language="en" fo:country="US" style:font-size-asian="18pt" style:font-size-complex="18pt"/>
    </style:style>
    <style:style style:name="T24" style:family="text">
      <style:text-properties style:use-window-font-color="true" loext:opacity="0%" fo:font-size="48pt" fo:language="en" fo:country="US" style:font-size-asian="48pt" style:font-size-complex="48pt"/>
    </style:style>
    <style:style style:name="T25" style:family="text">
      <style:text-properties fo:color="#000000" loext:opacity="100%" fo:font-size="26pt" fo:language="en" fo:country="US" style:font-size-asian="26pt" style:font-size-complex="26pt"/>
    </style:style>
    <style:style style:name="T26" style:family="text">
      <style:text-properties fo:color="#000000" loext:opacity="100%" style:text-outline="false" style:text-line-through-style="none" style:text-line-through-type="none" style:font-name="Arial2" fo:font-size="26pt" fo:language="en" fo:country="US" fo:font-style="normal" fo:text-shadow="none" style:text-underline-style="none" fo:font-weight="normal" style:letter-kerning="true" style:font-name-asian="Arial Unicode MS1" style:font-size-asian="26pt" style:font-style-asian="normal" style:font-weight-asian="normal" style:font-name-complex="Arial Unicode M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fo:font-size="20pt" fo:language="en" fo:country="US" style:font-size-asian="20pt" style:font-size-complex="20pt"/>
    </style:style>
    <style:style style:name="T28" style:family="text">
      <style:text-properties fo:color="#000000" loext:opacity="100%" fo:font-size="20pt" fo:language="en" fo:country="US" style:font-size-asian="20pt" style:font-size-complex="20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color="#666666" loext:opacity="100%" fo:font-size="22pt" style:font-size-asian="22pt" style:font-size-complex="22pt"/>
    </style:style>
    <style:style style:name="T31" style:family="text">
      <style:text-properties fo:color="#008080" loext:opacity="100%" fo:font-size="36pt" fo:language="en" fo:country="US" style:font-size-asian="36pt" style:font-size-complex="36pt"/>
    </style:style>
    <style:style style:name="T32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33" style:family="text">
      <style:text-properties fo:font-size="18pt" style:text-overline-style="solid" style:text-overline-width="auto" style:text-overline-color="font-color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color="#666666" loext:opacity="100%" fo:font-size="13pt" fo:font-style="italic" style:font-size-asian="13pt" style:font-style-asian="italic" style:font-size-complex="13pt" style:font-style-complex="italic"/>
    </style:style>
    <style:style style:name="T36" style:family="text">
      <style:text-properties fo:color="#008080" loext:opacity="100%" fo:font-size="27pt" fo:language="en" fo:country="US" fo:font-weight="normal" style:font-size-asian="27pt" style:font-weight-asian="normal" style:font-size-complex="27pt" style:font-weight-complex="normal"/>
    </style:style>
    <style:style style:name="T37" style:family="text">
      <style:text-properties fo:color="#008080" loext:opacity="100%" fo:font-size="28pt" fo:language="en" fo:country="US" fo:font-weight="normal" style:font-size-asian="28pt" style:font-weight-asian="normal" style:font-size-complex="28pt" style:font-weight-complex="normal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808080" loext:opacity="100%" fo:font-size="18pt"/>
    </style:style>
    <style:style style:name="T4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size="16pt" fo:font-style="normal" style:font-size-asian="16pt" style:font-style-asian="normal" style:font-size-complex="16pt" style:font-style-complex="normal"/>
    </style:style>
    <style:style style:name="T44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fo:font-style="italic" style:font-size-asian="12pt" style:font-style-asian="italic" style:font-size-complex="12pt" style:font-style-complex="italic"/>
    </style:style>
    <style:style style:name="T49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style:use-window-font-color="true" loext:opacity="0%" style:font-name="Arial1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1" style:font-size-complex="16pt" style:language-complex="hi" style:country-complex="IN" style:font-style-complex="italic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8080" loext:opacity="100%" style:text-outline="false" style:text-line-through-style="none" style:text-line-through-type="none" style:font-name="Arial2" fo:font-size="32pt" fo:language="en" fo:country="US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T72" style:family="text">
      <style:text-properties fo:font-size="16pt" fo:background-color="transparent" style:font-size-asian="16pt" style:font-size-complex="16pt"/>
    </style:style>
    <style:style style:name="T73" style:family="text">
      <style:text-properties fo:color="#333333" loext:opacity="100%" fo:font-size="18pt"/>
    </style:style>
    <style:style style:name="T74" style:family="text">
      <style:text-properties fo:font-size="18pt" style:font-size-asian="18pt" style:font-size-complex="18pt"/>
    </style:style>
    <style:style style:name="T75" style:family="text">
      <style:text-properties fo:font-size="18pt" fo:font-weight="bold" style:font-size-asian="18pt" style:font-weight-asian="bold" style:font-size-complex="18pt" style:font-weight-complex="bold"/>
    </style:style>
    <style:style style:name="T76" style:family="text">
      <style:text-properties fo:font-size="16pt" fo:font-weight="normal" style:font-size-asian="16pt" style:font-weight-asian="normal" style:font-size-complex="16pt" style:font-weight-complex="normal"/>
    </style:style>
    <style:style style:name="T77" style:family="text">
      <style:text-properties fo:font-size="15pt" fo:font-weight="normal" style:font-size-asian="15pt" style:font-weight-asian="normal" style:font-size-complex="15pt" style:font-weight-complex="normal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ize="40pt" style:font-size-asian="40pt" style:font-size-complex="40pt"/>
    </style:style>
    <style:style style:name="T80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81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2" style:family="text">
      <style:text-properties fo:color="#000000" loext:opacity="100%" fo:font-size="18pt"/>
    </style:style>
    <style:style style:name="T83" style:family="text">
      <style:text-properties fo:color="#c9211e" loext:opacity="100%" fo:font-size="18pt" fo:font-weight="bold" style:font-weight-asian="bold" style:font-weight-complex="bold"/>
    </style:style>
    <style:style style:name="T84" style:family="text">
      <style:text-properties fo:color="#32cd32" loext:opacity="100%" fo:font-size="18pt" fo:font-weight="bold" style:font-weight-asian="bold" style:font-weight-complex="bold"/>
    </style:style>
    <style:style style:name="T85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6" style:family="text">
      <style:text-properties fo:color="#125bf3" loext:opacity="100%" fo:font-size="12pt" style:font-size-asian="12pt" style:font-size-complex="12pt"/>
    </style:style>
    <style:style style:name="T87" style:family="text">
      <style:text-properties fo:color="#008080" loext:opacity="100%" fo:font-size="24pt" fo:language="en" fo:country="US" style:font-size-asian="24pt" style:font-size-complex="24pt"/>
    </style:style>
    <style:style style:name="T88" style:family="text">
      <style:text-properties fo:color="#008080" loext:opacity="100%" fo:font-size="21pt" fo:language="en" fo:country="US" style:font-size-asian="21pt" style:font-size-complex="21pt"/>
    </style:style>
    <style:style style:name="T89" style:family="text">
      <style:text-properties fo:color="#008080" loext:opacity="100%" fo:font-size="21pt" fo:language="en" fo:country="US" fo:font-weight="bold" style:font-size-asian="21pt" style:font-weight-asian="bold" style:font-size-complex="21pt" style:font-weight-complex="bold"/>
    </style:style>
    <style:style style:name="T90" style:family="text">
      <style:text-properties fo:font-size="13.5pt"/>
    </style:style>
    <style:style style:name="T91" style:family="text">
      <style:text-properties fo:font-size="14pt" fo:font-weight="bold" style:font-size-asian="14pt" style:font-weight-asian="bold" style:font-size-complex="14pt" style:font-weight-complex="bold"/>
    </style:style>
    <style:style style:name="T92" style:family="text">
      <style:text-properties fo:color="#32cd32" loext:opacity="100%" fo:font-size="14pt" fo:font-weight="bold" style:font-size-asian="14pt" style:font-weight-asian="bold" style:font-size-complex="14pt" style:font-weight-complex="bold"/>
    </style:style>
    <style:style style:name="T93" style:family="text">
      <style:text-properties fo:color="#32cd32" loext:opacity="100%" fo:font-size="18pt" style:font-size-asian="18pt" style:font-size-complex="18pt"/>
    </style:style>
    <style:style style:name="T94" style:family="text"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T95" style:family="text">
      <style:text-properties style:text-position="sub 58%" fo:font-size="24pt" style:font-size-asian="24pt" style:font-size-complex="24pt"/>
    </style:style>
    <style:style style:name="T96" style:family="text">
      <style:text-properties fo:color="#666666" loext:opacity="100%" fo:font-size="24pt" style:font-size-asian="24pt" style:font-size-complex="24pt"/>
    </style:style>
    <style:style style:name="T97" style:family="text">
      <style:text-properties fo:color="#ff0000" loext:opacity="100%" fo:font-size="18pt"/>
    </style:style>
    <style:style style:name="T98" style:family="text">
      <style:text-properties fo:color="#008080" loext:opacity="100%" fo:font-size="22pt" fo:language="en" fo:country="US" style:font-size-asian="22pt" style:font-size-complex="22pt"/>
    </style:style>
    <style:style style:name="T99" style:family="text">
      <style:text-properties fo:color="#008080" loext:opacity="100%" fo:font-size="26pt" fo:language="en" fo:country="US" style:font-size-asian="26pt" style:font-size-complex="26pt"/>
    </style:style>
    <style:style style:name="T100" style:family="text">
      <style:text-properties fo:font-size="22pt" style:font-size-asian="22pt" style:font-size-complex="22pt"/>
    </style:style>
    <style:style style:name="T101" style:family="text">
      <style:text-properties fo:color="#666666" loext:opacity="100%" fo:font-size="22pt" fo:font-style="italic" style:font-size-asian="22pt" style:font-style-asian="italic" style:font-size-complex="22pt" style:font-style-complex="italic"/>
    </style:style>
    <style:style style:name="T102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PingFang SC1" style:font-size-asian="22pt" style:font-style-asian="normal" style:font-weight-asian="normal" style:font-name-complex="Arial Unicode M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PingFang SC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size="14pt" fo:font-weight="normal" style:font-size-asian="14pt" style:font-weight-asian="normal" style:font-size-complex="14pt" style:font-weight-complex="normal"/>
    </style:style>
    <style:style style:name="T106" style:family="text">
      <style:text-properties fo:color="#bf0041" loext:opacity="100%" fo:font-size="16pt" style:font-size-asian="16pt" style:font-size-complex="16pt"/>
    </style:style>
    <style:style style:name="T107" style:family="text">
      <style:text-properties fo:color="#008080" loext:opacity="100%" fo:font-size="44pt" fo:language="en" fo:country="US" style:font-size-asian="44pt" style:font-size-complex="44pt"/>
    </style:style>
    <style:style style:name="T108" style:family="text">
      <style:text-properties fo:color="#008080" loext:opacity="100%"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footer-decl presentation:name="ftr1">Copyright © 2026 Anton Kolonin, Aigents®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Обучение на собственном опыте </text:span></text:p>
            <text:p text:style-name="P1"><text:span text:style-name="T1">с глобальным подкреплением </text:span></text:p>
            <text:p text:style-name="P1"><text:span text:style-name="T1">в пространстве состояний</text:span></text:p>
          </draw:text-box>
        </draw:frame>
        <draw:frame draw:style-name="gr2" draw:text-style-name="P4" draw:layer="layout" svg:width="19.159cm" svg:height="4.702cm" svg:x="4.336cm" svg:y="5.15cm">
          <draw:text-box>
            <text:p text:style-name="P3"><text:span text:style-name="T2">Антон Колонин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67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844AD9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7" draw:text-style-name="P18" draw:layer="layout" svg:width="28.681cm" svg:height="1.964cm" svg:x="-0.589cm" svg:y="-0.059cm">
          <text:list text:style-name="L1">
            <text:list-header>
              <text:p text:style-name="P17"><text:span text:style-name="T9">Есть ли у нас проблемы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19" draw:layer="layout" svg:width="20.459cm" svg:height="12.362cm" svg:x="3.88cm" svg:y="2.326cm">
          <draw:text-box>
            <text:p><text:span text:style-name="T10">Медленно обучаемся? </text:span></text:p>
            <text:p><text:span text:style-name="T10"><text:s text:c="4"/></text:span><text:span text:style-name="T11">=&gt; slow learning</text:span></text:p>
            <text:p><text:span text:style-name="T10"/></text:p>
            <text:p><text:span text:style-name="T10">Не можем объяснить свои решения? </text:span></text:p>
            <text:p><text:span text:style-name="T10"><text:s text:c="4"/></text:span><text:span text:style-name="T11">=&gt; uninterpretable models</text:span></text:p>
            <text:p><text:span text:style-name="T10"/></text:p>
            <text:p><text:span text:style-name="T10">Забываем важное? </text:span></text:p>
            <text:p><text:span text:style-name="T10"><text:s text:c="4"/></text:span><text:span text:style-name="T11">=&gt; catastrophic forgetting</text:span></text:p>
            <text:p><text:span text:style-name="T10"/></text:p>
            <text:p><text:span text:style-name="T10">Тратим много энергии? </text:span></text:p>
            <text:p><text:span text:style-name="T10"><text:s text:c="4"/></text:span><text:span text:style-name="T11">=&gt; expensive, resource-consuming training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presentation:use-footer-name="ftr1">
        <office:forms form:automatic-focus="false" form:apply-design-mode="false"/>
        <draw:custom-shape draw:style-name="gr19" draw:text-style-name="P21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13.251cm" svg:height="1.038cm" svg:x="7.395cm" svg:y="0.705cm">
          <draw:text-box>
            <text:p><text:span text:style-name="T12">Система = Интеллектуальный Агент</text:span></text:p>
          </draw:text-box>
        </draw:frame>
        <draw:custom-shape draw:style-name="gr22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24" draw:text-style-name="P24" draw:layer="layout" svg:width="12.593cm" svg:height="0.962cm" svg:x="7.62cm" svg:y="2.705cm">
          <draw:text-box>
            <text:p><text:span text:style-name="T13">Интеллект = Система принятия решений</text:span></text:p>
          </draw:text-box>
        </draw:frame>
        <draw:custom-shape draw:style-name="gr25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10.631cm" svg:height="0.962cm" svg:x="8.321cm" svg:y="1.705cm">
          <draw:text-box>
            <text:p><text:span text:style-name="T13">Психика = Операционная система</text:span></text:p>
          </draw:text-box>
        </draw:frame>
        <draw:custom-shape draw:style-name="gr27" draw:text-style-name="P25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4.392cm" svg:height="3.095cm" svg:x="8.801cm" svg:y="3.745cm">
          <draw:text-box>
            <text:p><text:span text:style-name="T13">Подсознание</text:span></text:p>
            <text:p><text:span text:style-name="T13">(Интуиция)</text:span></text:p>
            <text:p><text:span text:style-name="T13">“Система 1”</text:span></text:p>
            <text:p><text:span text:style-name="T13">(“Быстро”)</text:span></text:p>
          </draw:text-box>
        </draw:frame>
        <draw:frame draw:style-name="gr29" draw:text-style-name="P24" draw:layer="layout" svg:width="4.372cm" svg:height="3.095cm" svg:x="14.923cm" svg:y="3.745cm">
          <draw:text-box>
            <text:p><text:span text:style-name="T13">Сознание</text:span></text:p>
            <text:p><text:span text:style-name="T13">(Мышление)</text:span></text:p>
            <text:p><text:span text:style-name="T13">“Система 2”</text:span></text:p>
            <text:p><text:span text:style-name="T13">(“Медленно”)</text:span></text:p>
          </draw:text-box>
        </draw:frame>
        <draw:frame draw:style-name="gr30" draw:text-style-name="P26" draw:layer="layout" svg:width="4.318cm" svg:height="0.962cm" svg:x="10.954cm" svg:y="9.71cm">
          <draw:text-box>
            <text:p><text:span text:style-name="T13">Потребности</text:span></text:p>
          </draw:text-box>
        </draw:frame>
        <draw:custom-shape draw:style-name="gr31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32" draw:text-style-name="P27" draw:layer="layout" svg:width="3.152cm" svg:height="0.962cm" svg:x="8.285cm" svg:y="11.796cm">
          <draw:text-box>
            <text:p><text:span text:style-name="T13">Сенсоры</text:span></text:p>
          </draw:text-box>
        </draw:frame>
        <draw:frame draw:style-name="gr33" draw:text-style-name="P27" draw:layer="layout" svg:width="3.604cm" svg:height="0.962cm" svg:x="15.985cm" svg:y="11.797cm">
          <draw:text-box>
            <text:p><text:span text:style-name="T13">Актуаторы</text:span></text:p>
          </draw:text-box>
        </draw:frame>
        <draw:line draw:style-name="gr34" draw:text-style-name="P8" draw:layer="layout" svg:x1="11.695cm" svg:y1="7.325cm" svg:x2="16.14cm" svg:y2="7.325cm">
          <text:p/>
        </draw:line>
        <draw:line draw:style-name="gr34" draw:text-style-name="P8" draw:layer="layout" svg:x1="10.425cm" svg:y1="8.795cm" svg:x2="10.425cm" svg:y2="7.725cm">
          <text:p/>
        </draw:line>
        <draw:frame draw:style-name="gr35" draw:text-style-name="P28" draw:layer="layout" svg:width="2.546cm" svg:height="0.878cm" svg:x="9.085cm" svg:y="6.996cm">
          <draw:text-box>
            <text:p><text:span text:style-name="T14">Эмоции</text:span></text:p>
          </draw:text-box>
        </draw:frame>
        <draw:line draw:style-name="gr34" draw:text-style-name="P8" draw:layer="layout" svg:x1="10.54cm" svg:y1="13.821cm" svg:x2="10.54cm" svg:y2="12.751cm">
          <text:p/>
        </draw:line>
        <draw:frame draw:style-name="gr36" draw:text-style-name="P28" draw:layer="layout" svg:width="3.792cm" svg:height="0.878cm" svg:x="6.648cm" svg:y="10.943cm">
          <draw:text-box>
            <text:p><text:span text:style-name="T14">Восприятия</text:span></text:p>
          </draw:text-box>
        </draw:frame>
        <draw:line draw:style-name="gr34" draw:text-style-name="P8" draw:layer="layout" svg:x1="10.54cm" svg:y1="11.721cm" svg:x2="10.54cm" svg:y2="10.651cm">
          <text:p/>
        </draw:line>
        <draw:frame draw:style-name="gr37" draw:text-style-name="P28" draw:layer="layout" svg:width="3.804cm" svg:height="0.878cm" svg:x="6.936cm" svg:y="12.82cm">
          <draw:text-box>
            <text:p><text:span text:style-name="T14">Ощущения</text:span></text:p>
          </draw:text-box>
        </draw:frame>
        <draw:frame draw:style-name="gr38" draw:text-style-name="P28" draw:layer="layout" svg:width="3.597cm" svg:height="0.878cm" svg:x="12.13cm" svg:y="7.298cm">
          <draw:text-box>
            <text:p><text:span text:style-name="T14">Мотивация</text:span></text:p>
          </draw:text-box>
        </draw:frame>
        <draw:line draw:style-name="gr34" draw:text-style-name="P8" draw:layer="layout" svg:x1="17.51cm" svg:y1="12.759cm" svg:x2="17.51cm" svg:y2="13.829cm">
          <text:p/>
        </draw:line>
        <draw:frame draw:style-name="gr39" draw:text-style-name="P28" draw:layer="layout" svg:width="3.189cm" svg:height="0.878cm" svg:x="16.07cm" svg:y="6.999cm">
          <draw:text-box>
            <text:p><text:span text:style-name="T14">Ожидания</text:span></text:p>
          </draw:text-box>
        </draw:frame>
        <draw:frame draw:style-name="gr40" draw:text-style-name="P28" draw:layer="layout" svg:width="2.889cm" svg:height="0.878cm" svg:x="19.05cm" svg:y="9.525cm">
          <draw:text-box>
            <text:p><text:span text:style-name="T14">Решения</text:span></text:p>
          </draw:text-box>
        </draw:frame>
        <draw:frame draw:style-name="gr41" draw:text-style-name="P29" draw:layer="layout" svg:width="3.033cm" svg:height="0.839cm" svg:x="17.647cm" svg:y="12.859cm">
          <draw:text-box>
            <text:p><text:span text:style-name="T15">Действия</text:span></text:p>
          </draw:text-box>
        </draw:frame>
        <draw:frame draw:style-name="gr42" draw:text-style-name="P24" draw:layer="layout" svg:width="11.521cm" svg:height="0.962cm" svg:x="8.149cm" svg:y="13.698cm">
          <draw:text-box>
            <text:p><text:span text:style-name="T13">Внешний мир = Операционная среда</text:span></text:p>
          </draw:text-box>
        </draw:frame>
        <draw:frame draw:style-name="gr43" draw:text-style-name="P30" draw:layer="layout" svg:width="7.204cm" svg:height="1.979cm" svg:x="0.465cm" svg:y="13.104cm">
          <draw:text-box>
            <text:p><text:span text:style-name="T16">А.Г.Колонин, В.Г.Крюков:</text:span></text:p>
            <text:p><text:span text:style-name="T16">Вычислительная концепция психики,</text:span></text:p>
            <text:p><text:span text:style-name="T16">Статья принята на конференцию</text:span></text:p>
            <text:p><text:span text:style-name="T16">Нейроинформатика-25</text:span></text:p>
          </draw:text-box>
        </draw:frame>
        <draw:frame draw:style-name="gr44" draw:text-style-name="P31" draw:layer="layout" svg:width="3.761cm" svg:height="0.962cm" svg:x="7.106cm" svg:y="9.71cm">
          <draw:text-box>
            <text:p><text:span text:style-name="T13">Ощущения</text:span></text:p>
          </draw:text-box>
        </draw:frame>
        <draw:frame draw:style-name="gr45" draw:text-style-name="P32" draw:layer="layout" svg:width="3.313cm" svg:height="0.962cm" svg:x="15.34cm" svg:y="9.71cm">
          <draw:text-box>
            <text:p><text:span text:style-name="T13">Действия</text:span></text:p>
          </draw:text-box>
        </draw:frame>
        <draw:line draw:style-name="gr34" draw:text-style-name="P8" draw:layer="layout" svg:x1="17.425cm" svg:y1="7.726cm" svg:x2="17.425cm" svg:y2="8.796cm">
          <text:p/>
        </draw:line>
        <draw:line draw:style-name="gr34" draw:text-style-name="P8" draw:layer="layout" svg:x1="18.95cm" svg:y1="8.02cm" svg:x2="18.95cm" svg:y2="11.83cm">
          <text:p/>
        </draw:line>
        <draw:frame draw:style-name="gr46" draw:text-style-name="P24" draw:layer="layout" svg:width="12.593cm" svg:height="0.962cm" svg:x="7.621cm" svg:y="8.705cm">
          <draw:text-box>
            <text:p><text:span text:style-name="T13">Пространство состояний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47" draw:text-style-name="P33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34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49" draw:text-style-name="P36" draw:layer="layout" svg:width="28cm" svg:height="2.415cm" svg:x="0.003cm" svg:y="0.046cm">
          <draw:text-box>
            <text:p text:style-name="P35"><text:span text:style-name="T17">“Быстрое и медленное мышление” – Daniel Kahneman</text:span></text:p>
          </draw:text-box>
        </draw:frame>
        <draw:frame draw:style-name="gr50" draw:text-style-name="P8" draw:layer="layout" svg:width="27.999cm" svg:height="11.535cm" svg:x="0.024cm" svg:y="1.8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51" draw:text-style-name="P38" draw:layer="layout" svg:width="27.305cm" svg:height="2.023cm" svg:x="0.701cm" svg:y="13.328cm">
          <draw:text-box>
            <text:p text:style-name="P37"><text:span text:style-name="T18"><text:a xlink:href="https://www.linkedin.com/pulse/explainable-ai-vs-explaining-part-1-ahmad-haj-mosa/" xlink:type="simple">https://www.linkedin.com/pulse/explainable-ai-vs-explaining-part-1-ahmad-haj-mosa/</text:a></text:span></text:p>
            <text:p text:style-name="P37"><text:span text:style-name="T19">Xing, F., Cambria, E., Welsch, R. (2019). Theoretical Underpinnings on Text Mining. In: Intelligent Asset Management. Socio-Affective Computing, vol 9. Springer, Cham. </text:span></text:p>
            <text:p text:style-name="P37"><text:span text:style-name="T18"><text:a xlink:href="https://doi.org/10.1007/978-3-030-30263-4_3" xlink:type="simple">https://doi.org/10.1007/978-3-030-30263-4_3</text:a></text:span></text:p>
            <text:p text:style-name="P37"><text:span text:style-name="T20">M. Minsky, The Emotion Machine: Commonsense Thinking, Artificial Intelligence, and the Future of the Human Mind (Simon &amp; Schuster Paperbacks, Princeton, 2007)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>
        <office:forms form:automatic-focus="false" form:apply-design-mode="false"/>
        <draw:line draw:style-name="gr52" draw:text-style-name="P8" draw:layer="layout" svg:x1="13.97cm" svg:y1="2.54cm" svg:x2="13.97cm" svg:y2="13.97cm">
          <text:p/>
        </draw:line>
        <draw:frame draw:style-name="gr53" draw:text-style-name="P40" draw:layer="layout" svg:width="27.908cm" svg:height="1.895cm" svg:x="0.055cm" svg:y="0.01cm">
          <draw:text-box>
            <text:p text:style-name="P39"><text:span text:style-name="T21">Нейро-символьная интеграция для интерпретируемого ИИ</text:span></text:p>
          </draw:text-box>
        </draw:frame>
        <draw:g draw:style-name="gr4">
          <draw:custom-shape draw:style-name="gr54" draw:text-style-name="P42" xml:id="id1" draw:id="id1" draw:layer="layout" svg:width="1.6cm" svg:height="1.4cm" svg:x="16.31cm" svg:y="2.199cm">
            <text:p text:style-name="P41"><text:span text:style-name="T22">Hoov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42" xml:id="id3" draw:id="id3" draw:layer="layout" svg:width="1.6cm" svg:height="1.4cm" svg:x="18.112cm" svg:y="2.2cm">
            <text:p text:style-name="P41"><text:span text:style-name="T22">Ta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42" xml:id="id5" draw:id="id5" draw:layer="layout" svg:width="1.6cm" svg:height="1.4cm" svg:x="19.913cm" svg:y="2.201cm">
            <text:p text:style-name="P41"><text:span text:style-name="T22">Whi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42" xml:id="id7" draw:id="id7" draw:layer="layout" svg:width="1.6cm" svg:height="1.4cm" svg:x="21.714cm" svg:y="2.202cm">
            <text:p text:style-name="P41"><text:span text:style-name="T22">Bla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42" xml:id="id8" draw:id="id8" draw:layer="layout" svg:width="1.6cm" svg:height="1.4cm" svg:x="23.515cm" svg:y="2.203cm">
            <text:p text:style-name="P41"><text:span text:style-name="T22">Br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42" xml:id="id2" draw:id="id2" draw:layer="layout" svg:width="1.6cm" svg:height="1.4cm" svg:x="17.313cm" svg:y="4.401cm">
            <text:p text:style-name="P41"><text:span text:style-name="T22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42" xml:id="id6" draw:id="id6" draw:layer="layout" svg:width="1.6cm" svg:height="1.4cm" svg:x="20.714cm" svg:y="4.402cm">
            <text:p text:style-name="P41"><text:span text:style-name="T22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42" xml:id="id4" draw:id="id4" draw:layer="layout" svg:width="1.6cm" svg:height="1.4cm" svg:x="21.31cm" svg:y="8.399cm">
            <text:p text:style-name="P41"><text:span text:style-name="T22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42" xml:id="id9" draw:id="id9" draw:layer="layout" svg:width="1.6cm" svg:height="1.4cm" svg:x="22.516cm" svg:y="6.304cm">
            <text:p text:style-name="P41"><text:span text:style-name="T22">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42" draw:layer="layout" svg:width="1.6cm" svg:height="1.4cm" svg:x="25.317cm" svg:y="2.205cm">
            <text:p text:style-name="P41"><text:span text:style-name="T22">R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" draw:text-style-name="P43" draw:layer="layout" svg:width="10.007cm" svg:height="3.806cm" svg:x="17.89cm" svg:y="10.899cm">
            <draw:text-box>
              <text:p><text:span text:style-name="T23">(Hooves AND Tail) AND NOT Red</text:span></text:p>
              <text:p><text:span text:style-name="T23">((White and Black) OR Brown)</text:span></text:p>
              <text:p><text:span text:style-name="T24"><text:s text:c="2"/>=&gt; Horse</text:span></text:p>
            </draw:text-box>
          </draw:frame>
          <draw:connector draw:style-name="gr56" draw:text-style-name="P44" draw:layer="layout" draw:type="line" svg:x1="17.11cm" svg:y1="3.599cm" svg:x2="17.547cm" svg:y2="4.606cm" draw:start-shape="id1" draw:start-glue-point="8" draw:end-shape="id2" draw:end-glue-point="5" svg:d="M17110 3599l437 1007" svg:viewBox="0 0 438 1008">
            <text:p/>
          </draw:connector>
          <draw:connector draw:style-name="gr56" draw:text-style-name="P44" draw:layer="layout" draw:type="line" svg:x1="18.912cm" svg:y1="3.6cm" svg:x2="18.679cm" svg:y2="4.606cm" draw:start-shape="id3" draw:start-glue-point="8" draw:end-shape="id2" draw:end-glue-point="11" svg:d="M18912 3600l-233 1006" svg:viewBox="0 0 234 1007">
            <text:p/>
          </draw:connector>
          <draw:connector draw:style-name="gr56" draw:text-style-name="P44" draw:layer="layout" draw:type="line" svg:x1="18.679cm" svg:y1="5.596cm" svg:x2="21.544cm" svg:y2="8.604cm" draw:start-shape="id2" draw:start-glue-point="9" draw:end-shape="id4" draw:end-glue-point="5" svg:d="M18679 5596l2865 3008" svg:viewBox="0 0 2866 3009">
            <text:p/>
          </draw:connector>
          <draw:connector draw:style-name="gr56" draw:text-style-name="P44" draw:layer="layout" draw:type="line" svg:x1="20.713cm" svg:y1="3.601cm" svg:x2="20.948cm" svg:y2="4.607cm" draw:start-shape="id5" draw:start-glue-point="8" draw:end-shape="id6" draw:end-glue-point="5" svg:d="M20713 3601l235 1006" svg:viewBox="0 0 236 1007">
            <text:p/>
          </draw:connector>
          <draw:connector draw:style-name="gr56" draw:text-style-name="P44" draw:layer="layout" draw:type="line" svg:x1="22.514cm" svg:y1="3.602cm" svg:x2="22.08cm" svg:y2="4.607cm" draw:start-shape="id7" draw:start-glue-point="8" draw:end-shape="id6" draw:end-glue-point="11" svg:d="M22514 3602l-434 1005" svg:viewBox="0 0 435 1006">
            <text:p/>
          </draw:connector>
          <draw:connector draw:style-name="gr56" draw:text-style-name="P44" draw:layer="layout" draw:type="line" svg:x1="24.315cm" svg:y1="3.603cm" svg:x2="23.316cm" svg:y2="6.304cm" draw:start-shape="id8" draw:start-glue-point="8" draw:end-shape="id9" draw:end-glue-point="4" svg:d="M24315 3603l-999 2701" svg:viewBox="0 0 1000 2702">
            <text:p/>
          </draw:connector>
          <draw:connector draw:style-name="gr56" draw:text-style-name="P44" draw:layer="layout" draw:type="line" svg:x1="22.08cm" svg:y1="5.597cm" svg:x2="22.75cm" svg:y2="6.509cm" draw:start-shape="id6" draw:start-glue-point="9" draw:end-shape="id9" draw:end-glue-point="5" svg:d="M22080 5597l670 912" svg:viewBox="0 0 671 913">
            <text:p/>
          </draw:connector>
          <draw:connector draw:style-name="gr56" draw:text-style-name="P44" draw:layer="layout" draw:type="line" svg:x1="23.316cm" svg:y1="7.704cm" svg:x2="22.676cm" svg:y2="8.604cm" draw:start-shape="id9" draw:start-glue-point="2" draw:end-shape="id4" draw:end-glue-point="11" svg:d="M23316 7704l-640 900" svg:viewBox="0 0 641 901">
            <text:p/>
          </draw:connector>
          <draw:connector draw:style-name="gr56" draw:text-style-name="P44" draw:layer="layout" draw:type="line" svg:x1="22.11cm" svg:y1="9.799cm" svg:x2="22.122cm" svg:y2="11.076cm" draw:start-shape="id4" draw:start-glue-point="8" svg:d="M22110 9799l12 1277" svg:viewBox="0 0 13 1278">
            <text:p/>
          </draw:connector>
        </draw:g>
        <draw:custom-shape draw:style-name="gr57" draw:text-style-name="P46" draw:layer="layout" svg:width="4.2cm" svg:height="2.4cm" svg:x="12cm" svg:y="4.501cm">
          <text:p text:style-name="P45"><text:span text:style-name="T25">Expl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7" draw:text-style-name="P48" draw:layer="layout" svg:width="4.2cm" svg:height="2.4cm" svg:x="11.501cm" svg:y="6.902cm">
          <text:p text:style-name="P47"><text:span text:style-name="T26"><text:s/></text:span><text:span text:style-name="T25">Transfer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58" draw:text-style-name="P44" draw:layer="layout" svg:width="5.035cm" svg:height="3.63cm" svg:x="3.214cm" svg:y="10.74cm">
          <draw:image xlink:href="Pictures/100000010000020800000177B5D88F53.png" xlink:type="simple" xlink:show="embed" xlink:actuate="onLoad" draw:mime-type="image/png">
            <text:p/>
          </draw:image>
        </draw:frame>
        <draw:custom-shape draw:style-name="gr59" draw:text-style-name="P49" draw:layer="layout" svg:width="1.6cm" svg:height="1.4cm" svg:x="1.291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9" draw:layer="layout" svg:width="1.6cm" svg:height="1.4cm" svg:x="3.093cm" svg:y="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0" draw:layer="layout" svg:width="1.6cm" svg:height="1.4cm" svg:x="4.894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1" draw:layer="layout" svg:width="1.6cm" svg:height="1.4cm" svg:x="6.695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draw:layer="layout" svg:width="1.6cm" svg:height="1.4cm" svg:x="8.496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3" draw:layer="layout" svg:width="1.6cm" svg:height="1.4cm" svg:x="10.298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4" draw:layer="layout" svg:width="1cm" svg:height="1cm" svg:x="1.635cm" svg:y="2.394cm">
          <draw:image xlink:href="Pictures/10000001000000210000002198B7C029.png" xlink:type="simple" xlink:show="embed" xlink:actuate="onLoad" draw:mime-type="image/png">
            <text:p/>
          </draw:image>
        </draw:frame>
        <draw:frame draw:style-name="gr58" draw:text-style-name="P44" draw:layer="layout" svg:width="0.997cm" svg:height="0.997cm" svg:x="3.401cm" svg:y="2.394cm">
          <draw:image xlink:href="Pictures/1000000100000044000000447D42CADB.png" xlink:type="simple" xlink:show="embed" xlink:actuate="onLoad" draw:mime-type="image/png">
            <text:p/>
          </draw:image>
        </draw:frame>
        <draw:custom-shape draw:style-name="gr59" draw:text-style-name="P49" draw:layer="layout" svg:width="1.6cm" svg:height="1.4cm" svg:x="1.291cm" svg:y="4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5" draw:layer="layout" svg:width="1.6cm" svg:height="1.4cm" svg:x="3.093cm" svg:y="4.295cm">
          <text:p text:style-name="P54"><text:span text:style-name="T27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9" draw:layer="layout" svg:width="1.6cm" svg:height="1.4cm" svg:x="4.894cm" svg:y="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7" draw:layer="layout" svg:width="1.6cm" svg:height="1.4cm" svg:x="6.695cm" svg:y="4.297cm">
          <text:p text:style-name="P56"><text:span text:style-name="T28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8" draw:layer="layout" svg:width="1.6cm" svg:height="1.4cm" svg:x="8.496cm" svg:y="4.298cm">
          <text:p text:style-name="P41"><text:span text:style-name="T28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9" draw:layer="layout" svg:width="1.6cm" svg:height="1.4cm" svg:x="10.29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8" xml:id="id10" draw:id="id10" draw:layer="layout" svg:width="1.6cm" svg:height="1.4cm" svg:x="3.094cm" svg:y="6.396cm">
          <text:p text:style-name="P41"><text:span text:style-name="T28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9" xml:id="id14" draw:id="id14" draw:layer="layout" svg:width="1.6cm" svg:height="1.4cm" svg:x="4.89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8" xml:id="id16" draw:id="id16" draw:layer="layout" svg:width="1.6cm" svg:height="1.4cm" svg:x="6.696cm" svg:y="6.398cm">
          <text:p text:style-name="P41"><text:span text:style-name="T28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9" xml:id="id18" draw:id="id18" draw:layer="layout" svg:width="1.6cm" svg:height="1.4cm" svg:x="8.497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9" xml:id="id11" draw:id="id11" draw:layer="layout" svg:width="1.6cm" svg:height="1.4cm" svg:x="1.293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9" xml:id="id12" draw:id="id12" draw:layer="layout" svg:width="1.6cm" svg:height="1.4cm" svg:x="3.095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8" xml:id="id13" draw:id="id13" draw:layer="layout" svg:width="1.6cm" svg:height="1.4cm" svg:x="4.896cm" svg:y="8.498cm">
          <text:p text:style-name="P41"><text:span text:style-name="T28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9" xml:id="id15" draw:id="id15" draw:layer="layout" svg:width="1.6cm" svg:height="1.4cm" svg:x="6.697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9" xml:id="id17" draw:id="id17" draw:layer="layout" svg:width="1.6cm" svg:height="1.4cm" svg:x="8.49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9" xml:id="id19" draw:id="id19" draw:layer="layout" svg:width="1.6cm" svg:height="1.4cm" svg:x="10.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44" draw:layer="layout" draw:type="line" svg:x1="3.894cm" svg:y1="7.796cm" svg:x2="2.093cm" svg:y2="8.496cm" draw:start-shape="id10" draw:start-glue-point="8" draw:end-shape="id11" draw:end-glue-point="4" svg:d="M3894 7796l-1801 700" svg:viewBox="0 0 1802 701">
          <text:p/>
        </draw:connector>
        <draw:connector draw:style-name="gr67" draw:text-style-name="P44" draw:layer="layout" draw:type="line" svg:x1="3.894cm" svg:y1="7.796cm" svg:x2="3.895cm" svg:y2="8.497cm" draw:start-shape="id10" draw:start-glue-point="8" draw:end-shape="id12" draw:end-glue-point="4" svg:d="M3894 7796l1 701" svg:viewBox="0 0 2 702">
          <text:p/>
        </draw:connector>
        <draw:connector draw:style-name="gr68" draw:text-style-name="P44" draw:layer="layout" draw:type="line" svg:x1="3.894cm" svg:y1="7.796cm" svg:x2="5.696cm" svg:y2="8.498cm" draw:start-shape="id10" draw:start-glue-point="8" draw:end-shape="id13" draw:end-glue-point="4" svg:d="M3894 7796l1802 702" svg:viewBox="0 0 1803 703">
          <text:p/>
        </draw:connector>
        <draw:connector draw:style-name="gr66" draw:text-style-name="P44" draw:layer="layout" draw:type="line" svg:x1="5.695cm" svg:y1="7.797cm" svg:x2="5.696cm" svg:y2="8.498cm" draw:start-shape="id14" draw:start-glue-point="8" draw:end-shape="id13" draw:end-glue-point="4" svg:d="M5695 7797l1 701" svg:viewBox="0 0 2 702">
          <text:p/>
        </draw:connector>
        <draw:connector draw:style-name="gr66" draw:text-style-name="P44" draw:layer="layout" draw:type="line" svg:x1="5.695cm" svg:y1="7.797cm" svg:x2="3.895cm" svg:y2="8.497cm" draw:start-shape="id14" draw:start-glue-point="8" draw:end-shape="id12" draw:end-glue-point="4" svg:d="M5695 7797l-1800 700" svg:viewBox="0 0 1801 701">
          <text:p/>
        </draw:connector>
        <draw:connector draw:style-name="gr66" draw:text-style-name="P44" draw:layer="layout" draw:type="line" svg:x1="5.695cm" svg:y1="7.797cm" svg:x2="7.497cm" svg:y2="8.499cm" draw:start-shape="id14" draw:start-glue-point="8" draw:end-shape="id15" draw:end-glue-point="4" svg:d="M5695 7797l1802 702" svg:viewBox="0 0 1803 703">
          <text:p/>
        </draw:connector>
        <draw:connector draw:style-name="gr66" draw:text-style-name="P44" draw:layer="layout" draw:type="line" svg:x1="7.496cm" svg:y1="7.798cm" svg:x2="7.497cm" svg:y2="8.499cm" draw:start-shape="id16" draw:start-glue-point="8" draw:end-shape="id15" draw:end-glue-point="4" svg:d="M7496 7798l1 701" svg:viewBox="0 0 2 702">
          <text:p/>
        </draw:connector>
        <draw:connector draw:style-name="gr68" draw:text-style-name="P44" draw:layer="layout" draw:type="line" svg:x1="7.496cm" svg:y1="7.798cm" svg:x2="5.696cm" svg:y2="8.498cm" draw:start-shape="id16" draw:start-glue-point="8" draw:end-shape="id13" draw:end-glue-point="4" svg:d="M7496 7798l-1800 700" svg:viewBox="0 0 1801 701">
          <text:p/>
        </draw:connector>
        <draw:connector draw:style-name="gr66" draw:text-style-name="P44" draw:layer="layout" draw:type="line" svg:x1="7.496cm" svg:y1="7.798cm" svg:x2="9.298cm" svg:y2="8.5cm" draw:start-shape="id16" draw:start-glue-point="8" draw:end-shape="id17" draw:end-glue-point="4" svg:d="M7496 7798l1802 702" svg:viewBox="0 0 1803 703">
          <text:p/>
        </draw:connector>
        <draw:connector draw:style-name="gr66" draw:text-style-name="P44" draw:layer="layout" draw:type="line" svg:x1="9.297cm" svg:y1="7.799cm" svg:x2="7.497cm" svg:y2="8.499cm" draw:start-shape="id18" draw:start-glue-point="8" draw:end-shape="id15" draw:end-glue-point="4" svg:d="M9297 7799l-1800 700" svg:viewBox="0 0 1801 701">
          <text:p/>
        </draw:connector>
        <draw:connector draw:style-name="gr66" draw:text-style-name="P44" draw:layer="layout" draw:type="line" svg:x1="9.297cm" svg:y1="7.799cm" svg:x2="9.298cm" svg:y2="8.5cm" draw:start-shape="id18" draw:start-glue-point="8" draw:end-shape="id17" draw:end-glue-point="4" svg:d="M9297 7799l1 701" svg:viewBox="0 0 2 702">
          <text:p/>
        </draw:connector>
        <draw:connector draw:style-name="gr66" draw:text-style-name="P44" draw:layer="layout" draw:type="line" svg:x1="9.297cm" svg:y1="7.799cm" svg:x2="11.1cm" svg:y2="8.502cm" draw:start-shape="id18" draw:start-glue-point="8" draw:end-shape="id19" draw:end-glue-point="4" svg:d="M9297 7799l1803 703" svg:viewBox="0 0 1804 704">
          <text:p/>
        </draw:connector>
        <draw:connector draw:style-name="gr66" draw:text-style-name="P44" draw:layer="layout" draw:type="line" svg:x1="2.055cm" svg:y1="5.697cm" svg:x2="3.858cm" svg:y2="6.399cm" svg:d="M2055 5697l1803 702" svg:viewBox="0 0 1804 703">
          <text:p/>
        </draw:connector>
        <draw:connector draw:style-name="gr68" draw:text-style-name="P44" draw:layer="layout" draw:type="line" svg:x1="3.857cm" svg:y1="5.698cm" svg:x2="3.858cm" svg:y2="6.399cm" svg:d="M3857 5698l1 701" svg:viewBox="0 0 2 702">
          <text:p/>
        </draw:connector>
        <draw:connector draw:style-name="gr66" draw:text-style-name="P44" draw:layer="layout" draw:type="line" svg:x1="3.857cm" svg:y1="5.698cm" svg:x2="5.659cm" svg:y2="6.4cm" svg:d="M3857 5698l1802 702" svg:viewBox="0 0 1803 703">
          <text:p/>
        </draw:connector>
        <draw:connector draw:style-name="gr66" draw:text-style-name="P44" draw:layer="layout" draw:type="line" svg:x1="5.658cm" svg:y1="5.699cm" svg:x2="5.659cm" svg:y2="6.4cm" svg:d="M5658 5699l1 701" svg:viewBox="0 0 2 702">
          <text:p/>
        </draw:connector>
        <draw:connector draw:style-name="gr66" draw:text-style-name="P44" draw:layer="layout" draw:type="line" svg:x1="5.658cm" svg:y1="5.699cm" svg:x2="3.858cm" svg:y2="6.399cm" svg:d="M5658 5699l-1800 700" svg:viewBox="0 0 1801 701">
          <text:p/>
        </draw:connector>
        <draw:connector draw:style-name="gr66" draw:text-style-name="P44" draw:layer="layout" draw:type="line" svg:x1="5.658cm" svg:y1="5.699cm" svg:x2="7.46cm" svg:y2="6.401cm" svg:d="M5658 5699l1802 702" svg:viewBox="0 0 1803 703">
          <text:p/>
        </draw:connector>
        <draw:connector draw:style-name="gr68" draw:text-style-name="P44" draw:layer="layout" draw:type="line" svg:x1="7.459cm" svg:y1="5.7cm" svg:x2="7.46cm" svg:y2="6.401cm" svg:d="M7459 5700l1 701" svg:viewBox="0 0 2 702">
          <text:p/>
        </draw:connector>
        <draw:connector draw:style-name="gr66" draw:text-style-name="P44" draw:layer="layout" draw:type="line" svg:x1="7.459cm" svg:y1="5.7cm" svg:x2="5.659cm" svg:y2="6.4cm" svg:d="M7459 5700l-1800 700" svg:viewBox="0 0 1801 701">
          <text:p/>
        </draw:connector>
        <draw:connector draw:style-name="gr66" draw:text-style-name="P44" draw:layer="layout" draw:type="line" svg:x1="7.459cm" svg:y1="5.7cm" svg:x2="9.261cm" svg:y2="6.402cm" svg:d="M7459 5700l1802 702" svg:viewBox="0 0 1803 703">
          <text:p/>
        </draw:connector>
        <draw:connector draw:style-name="gr68" draw:text-style-name="P44" draw:layer="layout" draw:type="line" svg:x1="9.26cm" svg:y1="5.701cm" svg:x2="7.46cm" svg:y2="6.401cm" svg:d="M9260 5701l-1800 700" svg:viewBox="0 0 1801 701">
          <text:p/>
        </draw:connector>
        <draw:connector draw:style-name="gr66" draw:text-style-name="P44" draw:layer="layout" draw:type="line" svg:x1="9.26cm" svg:y1="5.701cm" svg:x2="9.261cm" svg:y2="6.402cm" svg:d="M9260 5701l1 701" svg:viewBox="0 0 2 702">
          <text:p/>
        </draw:connector>
        <draw:connector draw:style-name="gr66" draw:text-style-name="P44" draw:layer="layout" draw:type="line" svg:x1="11.062cm" svg:y1="5.703cm" svg:x2="9.261cm" svg:y2="6.402cm" svg:d="M11062 5703l-1801 699" svg:viewBox="0 0 1802 700">
          <text:p/>
        </draw:connector>
        <draw:connector draw:style-name="gr66" draw:text-style-name="P44" draw:layer="layout" draw:type="line" svg:x1="2.08cm" svg:y1="3.597cm" svg:x2="2.081cm" svg:y2="4.298cm" svg:d="M2080 3597l1 701" svg:viewBox="0 0 2 702">
          <text:p/>
        </draw:connector>
        <draw:connector draw:style-name="gr68" draw:text-style-name="P44" draw:layer="layout" draw:type="line" svg:x1="2.08cm" svg:y1="3.597cm" svg:x2="3.883cm" svg:y2="4.299cm" svg:d="M2080 3597l1803 702" svg:viewBox="0 0 1804 703">
          <text:p/>
        </draw:connector>
        <draw:connector draw:style-name="gr69" draw:text-style-name="P44" draw:layer="layout" draw:type="line" svg:x1="3.882cm" svg:y1="3.598cm" svg:x2="2.081cm" svg:y2="4.298cm" svg:d="M3882 3598l-1801 700" svg:viewBox="0 0 1802 701">
          <text:p/>
        </draw:connector>
        <draw:connector draw:style-name="gr68" draw:text-style-name="P44" draw:layer="layout" draw:type="line" svg:x1="3.882cm" svg:y1="3.598cm" svg:x2="3.883cm" svg:y2="4.299cm" svg:d="M3882 3598l1 701" svg:viewBox="0 0 2 702">
          <text:p/>
        </draw:connector>
        <draw:connector draw:style-name="gr66" draw:text-style-name="P44" draw:layer="layout" draw:type="line" svg:x1="3.882cm" svg:y1="3.598cm" svg:x2="5.684cm" svg:y2="4.3cm" svg:d="M3882 3598l1802 702" svg:viewBox="0 0 1803 703">
          <text:p/>
        </draw:connector>
        <draw:connector draw:style-name="gr66" draw:text-style-name="P44" draw:layer="layout" draw:type="line" svg:x1="5.683cm" svg:y1="3.599cm" svg:x2="5.684cm" svg:y2="4.3cm" svg:d="M5683 3599l1 701" svg:viewBox="0 0 2 702">
          <text:p/>
        </draw:connector>
        <draw:connector draw:style-name="gr66" draw:text-style-name="P44" draw:layer="layout" draw:type="line" svg:x1="5.683cm" svg:y1="3.599cm" svg:x2="3.883cm" svg:y2="4.299cm" svg:d="M5683 3599l-1800 700" svg:viewBox="0 0 1801 701">
          <text:p/>
        </draw:connector>
        <draw:connector draw:style-name="gr68" draw:text-style-name="P44" draw:layer="layout" draw:type="line" svg:x1="5.683cm" svg:y1="3.599cm" svg:x2="7.485cm" svg:y2="4.301cm" svg:d="M5683 3599l1802 702" svg:viewBox="0 0 1803 703">
          <text:p/>
        </draw:connector>
        <draw:connector draw:style-name="gr68" draw:text-style-name="P44" draw:layer="layout" draw:type="line" svg:x1="7.484cm" svg:y1="3.6cm" svg:x2="7.485cm" svg:y2="4.301cm" svg:d="M7484 3600l1 701" svg:viewBox="0 0 2 702">
          <text:p/>
        </draw:connector>
        <draw:connector draw:style-name="gr66" draw:text-style-name="P44" draw:layer="layout" draw:type="line" svg:x1="7.484cm" svg:y1="3.6cm" svg:x2="5.684cm" svg:y2="4.3cm" svg:d="M7484 3600l-1800 700" svg:viewBox="0 0 1801 701">
          <text:p/>
        </draw:connector>
        <draw:connector draw:style-name="gr66" draw:text-style-name="P44" draw:layer="layout" draw:type="line" svg:x1="7.484cm" svg:y1="3.6cm" svg:x2="9.286cm" svg:y2="4.302cm" svg:d="M7484 3600l1802 702" svg:viewBox="0 0 1803 703">
          <text:p/>
        </draw:connector>
        <draw:connector draw:style-name="gr66" draw:text-style-name="P44" draw:layer="layout" draw:type="line" svg:x1="9.285cm" svg:y1="3.601cm" svg:x2="7.485cm" svg:y2="4.301cm" svg:d="M9285 3601l-1800 700" svg:viewBox="0 0 1801 701">
          <text:p/>
        </draw:connector>
        <draw:connector draw:style-name="gr68" draw:text-style-name="P44" draw:layer="layout" draw:type="line" svg:x1="9.285cm" svg:y1="3.601cm" svg:x2="9.286cm" svg:y2="4.302cm" svg:d="M9285 3601l1 701" svg:viewBox="0 0 2 702">
          <text:p/>
        </draw:connector>
        <draw:connector draw:style-name="gr66" draw:text-style-name="P44" draw:layer="layout" draw:type="line" svg:x1="11.087cm" svg:y1="3.603cm" svg:x2="9.286cm" svg:y2="4.302cm" svg:d="M11087 3603l-1801 699" svg:viewBox="0 0 1802 700">
          <text:p/>
        </draw:connector>
        <draw:connector draw:style-name="gr66" draw:text-style-name="P44" draw:layer="layout" draw:type="line" svg:x1="9.285cm" svg:y1="3.601cm" svg:x2="11.088cm" svg:y2="4.304cm" svg:d="M9285 3601l1803 703" svg:viewBox="0 0 1804 704">
          <text:p/>
        </draw:connector>
        <draw:connector draw:style-name="gr66" draw:text-style-name="P44" draw:layer="layout" draw:type="line" svg:x1="11.086cm" svg:y1="3.599cm" svg:x2="11.087cm" svg:y2="4.3cm" svg:d="M11086 3599l1 701" svg:viewBox="0 0 2 702">
          <text:p/>
        </draw:connector>
        <draw:frame draw:style-name="gr70" draw:text-style-name="P43" draw:layer="layout" svg:width="1.387cm" svg:height="1.013cm" svg:x="3.911cm" svg:y="3.287cm">
          <draw:text-box>
            <text:p><text:span text:style-name="T23">0.5</text:span></text:p>
          </draw:text-box>
        </draw:frame>
        <draw:frame draw:style-name="gr71" draw:text-style-name="P43" draw:layer="layout" svg:width="1.387cm" svg:height="1.013cm" svg:x="6.111cm" svg:y="7.981cm">
          <draw:text-box>
            <text:p><text:span text:style-name="T23">0.5</text:span></text:p>
          </draw:text-box>
        </draw:frame>
        <draw:frame draw:style-name="gr70" draw:text-style-name="P43" draw:layer="layout" svg:width="1.387cm" svg:height="1.013cm" svg:x="6.111cm" svg:y="5.394cm">
          <draw:text-box>
            <text:p><text:span text:style-name="T23">1.0</text:span></text:p>
          </draw:text-box>
        </draw:frame>
        <draw:frame draw:style-name="gr70" draw:text-style-name="P43" draw:layer="layout" svg:width="1.387cm" svg:height="1.013cm" svg:x="8.098cm" svg:y="5.794cm">
          <draw:text-box>
            <text:p><text:span text:style-name="T23">1.0</text:span></text:p>
          </draw:text-box>
        </draw:frame>
        <draw:frame draw:style-name="gr70" draw:text-style-name="P43" draw:layer="layout" svg:width="1.387cm" svg:height="1.013cm" svg:x="9.285cm" svg:y="3.394cm">
          <draw:text-box>
            <text:p><text:span text:style-name="T23">1.0</text:span></text:p>
          </draw:text-box>
        </draw:frame>
        <draw:frame draw:style-name="gr70" draw:text-style-name="P43" draw:layer="layout" svg:width="1.387cm" svg:height="1.013cm" svg:x="3.911cm" svg:y="7.994cm">
          <draw:text-box>
            <text:p><text:span text:style-name="T23">0.5</text:span></text:p>
          </draw:text-box>
        </draw:frame>
        <draw:frame draw:style-name="gr70" draw:text-style-name="P43" draw:layer="layout" svg:width="1.387cm" svg:height="1.013cm" svg:x="2.311cm" svg:y="2.994cm">
          <draw:text-box>
            <text:p><text:span text:style-name="T23">0.5</text:span></text:p>
          </draw:text-box>
        </draw:frame>
        <draw:frame draw:style-name="gr70" draw:text-style-name="P43" draw:layer="layout" svg:width="1.387cm" svg:height="1.013cm" svg:x="5.911cm" svg:y="3.194cm">
          <draw:text-box>
            <text:p><text:span text:style-name="T23">0.5</text:span></text:p>
          </draw:text-box>
        </draw:frame>
        <draw:frame draw:style-name="gr70" draw:text-style-name="P43" draw:layer="layout" svg:width="1.387cm" svg:height="1.013cm" svg:x="7.498cm" svg:y="3.284cm">
          <draw:text-box>
            <text:p><text:span text:style-name="T23">0.5</text:span></text:p>
          </draw:text-box>
        </draw:frame>
        <draw:connector draw:style-name="gr56" draw:text-style-name="P44" draw:layer="layout" draw:type="line" svg:x1="5.698cm" svg:y1="9.917cm" svg:x2="5.71cm" svg:y2="11.194cm" svg:d="M5698 9917l12 1277" svg:viewBox="0 0 13 1278">
          <text:p/>
        </draw:connector>
        <draw:frame draw:style-name="gr70" draw:text-style-name="P43" draw:layer="layout" svg:width="1.387cm" svg:height="1.013cm" svg:x="3.757cm" svg:y="5.494cm">
          <draw:text-box>
            <text:p><text:span text:style-name="T23">1.0</text:span></text:p>
          </draw:text-box>
        </draw:frame>
        <draw:frame draw:style-name="gr72" draw:text-style-name="P60" draw:layer="layout" svg:width="19.335cm" svg:height="0.716cm" svg:x="4.028cm" svg:y="14.391cm">
          <draw:text-box>
            <text:p text:style-name="P59"><text:span text:style-name="T29"><text:a xlink:href="https://www.springerprofessional.de/neuro-symbolic-architecture-for-experiential-learning-in-discret/20008336" xlink:type="simple">https://www.springerprofessional.de/neuro-symbolic-architecture-for-experiential-learning-in-discret/20008336</text:a></text:span></text:p>
          </draw:text-box>
        </draw:frame>
        <draw:frame draw:style-name="gr73" draw:text-style-name="P61" draw:layer="layout" svg:width="4.247cm" svg:height="1.119cm" svg:x="9.725cm" svg:y="9.911cm">
          <draw:text-box>
            <text:p><text:span text:style-name="T30">“System 1”</text:span></text:p>
          </draw:text-box>
        </draw:frame>
        <draw:frame draw:style-name="gr73" draw:text-style-name="P61" draw:layer="layout" svg:width="4.247cm" svg:height="1.119cm" svg:x="13.943cm" svg:y="9.912cm">
          <draw:text-box>
            <text:p><text:span text:style-name="T30">“System 2”</text:span></text:p>
          </draw:text-box>
        </draw:frame>
        <draw:frame draw:style-name="gr70" draw:text-style-name="P43" draw:layer="layout" svg:width="1.387cm" svg:height="1.013cm" svg:x="17.512cm" svg:y="3.388cm">
          <draw:text-box>
            <text:p><text:span text:style-name="T23">0.5</text:span></text:p>
          </draw:text-box>
        </draw:frame>
        <draw:frame draw:style-name="gr71" draw:text-style-name="P43" draw:layer="layout" svg:width="1.387cm" svg:height="1.013cm" svg:x="21.66cm" svg:y="7.477cm">
          <draw:text-box>
            <text:p><text:span text:style-name="T23">0.5</text:span></text:p>
          </draw:text-box>
        </draw:frame>
        <draw:frame draw:style-name="gr70" draw:text-style-name="P43" draw:layer="layout" svg:width="1.387cm" svg:height="1.013cm" svg:x="21.012cm" svg:y="5.595cm">
          <draw:text-box>
            <text:p><text:span text:style-name="T23">1.0</text:span></text:p>
          </draw:text-box>
        </draw:frame>
        <draw:frame draw:style-name="gr70" draw:text-style-name="P43" draw:layer="layout" svg:width="1.387cm" svg:height="1.013cm" svg:x="22.399cm" svg:y="4.895cm">
          <draw:text-box>
            <text:p><text:span text:style-name="T23">1.0</text:span></text:p>
          </draw:text-box>
        </draw:frame>
        <draw:frame draw:style-name="gr70" draw:text-style-name="P43" draw:layer="layout" svg:width="1.387cm" svg:height="1.013cm" svg:x="19.468cm" svg:y="7.52cm">
          <draw:text-box>
            <text:p><text:span text:style-name="T23">0.5</text:span></text:p>
          </draw:text-box>
        </draw:frame>
        <draw:frame draw:style-name="gr70" draw:text-style-name="P43" draw:layer="layout" svg:width="1.387cm" svg:height="1.013cm" svg:x="15.912cm" svg:y="3.395cm">
          <draw:text-box>
            <text:p><text:span text:style-name="T23">0.5</text:span></text:p>
          </draw:text-box>
        </draw:frame>
        <draw:frame draw:style-name="gr70" draw:text-style-name="P43" draw:layer="layout" svg:width="1.387cm" svg:height="1.013cm" svg:x="19.512cm" svg:y="3.395cm">
          <draw:text-box>
            <text:p><text:span text:style-name="T23">0.5</text:span></text:p>
          </draw:text-box>
        </draw:frame>
        <draw:frame draw:style-name="gr70" draw:text-style-name="P43" draw:layer="layout" svg:width="1.387cm" svg:height="1.013cm" svg:x="21.099cm" svg:y="3.385cm">
          <draw:text-box>
            <text:p><text:span text:style-name="T23">0.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74" draw:text-style-name="P33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75" draw:text-style-name="P62" draw:layer="layout" svg:width="28cm" svg:height="3.81cm" svg:x="0cm" svg:y="0cm">
          <draw:text-box>
            <text:p text:style-name="P39"><text:span text:style-name="T31">Функциональная эквивалентность графовых и </text:span><text:span text:style-name="T32">нейросетевых</text:span><text:span text:style-name="T31"> тензорных моделей</text:span></text:p>
          </draw:text-box>
        </draw:frame>
        <draw:frame draw:style-name="gr26" draw:text-style-name="P24" draw:layer="layout" svg:width="10.631cm" svg:height="0.962cm" svg:x="1.859cm" svg:y="3.655cm">
          <draw:text-box>
            <text:p><text:span text:style-name="T13">Strokes, letters, words and phrases </text:span></text:p>
          </draw:text-box>
        </draw:frame>
        <draw:frame draw:style-name="gr76" draw:text-style-name="P24" draw:layer="layout" svg:width="12.113cm" svg:height="0.962cm" svg:x="0.608cm" svg:y="6.937cm">
          <draw:text-box>
            <text:p><text:span text:style-name="T13">strokes <text:s text:c="2"/>, <text:s text:c="2"/>letters <text:s text:c="2"/>words <text:s/>and <text:s text:c="2"/>phrases </text:span></text:p>
          </draw:text-box>
        </draw:frame>
        <draw:frame draw:style-name="gr77" draw:text-style-name="P24" draw:layer="layout" svg:width="5.724cm" svg:height="0.962cm" svg:x="4.658cm" svg:y="9.795cm">
          <draw:text-box>
            <text:p><text:span text:style-name="T13">w <text:s text:c="4"/>o <text:s text:c="4"/>r <text:s text:c="4"/>d <text:s text:c="4"/>s</text:span></text:p>
          </draw:text-box>
        </draw:frame>
        <draw:frame draw:style-name="gr78" draw:text-style-name="P24" draw:layer="layout" svg:width="4.207cm" svg:height="0.962cm" svg:x="3.108cm" svg:y="13.099cm">
          <draw:text-box>
            <text:p><text:span text:style-name="T13">\ <text:s text:c="18"/>/</text:span></text:p>
          </draw:text-box>
        </draw:frame>
        <draw:line draw:style-name="gr79" draw:text-style-name="P8" draw:layer="layout" svg:x1="4.856cm" svg:y1="7.182cm" svg:x2="5.513cm" svg:y2="4.523cm">
          <text:p/>
        </draw:line>
        <draw:line draw:style-name="gr79" draw:text-style-name="P8" draw:layer="layout" svg:x1="2.535cm" svg:y1="7.109cm" svg:x2="3.019cm" svg:y2="4.556cm">
          <text:p/>
        </draw:line>
        <draw:line draw:style-name="gr79" draw:text-style-name="P8" draw:layer="layout" svg:x1="10.698cm" svg:y1="6.886cm" svg:x2="10.534cm" svg:y2="4.72cm">
          <text:p/>
        </draw:line>
        <draw:line draw:style-name="gr79" draw:text-style-name="P8" draw:layer="layout" svg:x1="7.416cm" svg:y1="7.017cm" svg:x2="7.285cm" svg:y2="4.523cm">
          <text:p/>
        </draw:line>
        <draw:line draw:style-name="gr79" draw:text-style-name="P8" draw:layer="layout" svg:x1="8.86cm" svg:y1="7.017cm" svg:x2="9.254cm" svg:y2="4.653cm">
          <text:p/>
        </draw:line>
        <draw:line draw:style-name="gr79" draw:text-style-name="P8" draw:layer="layout" svg:x1="5.053cm" svg:y1="9.938cm" svg:x2="6.497cm" svg:y2="7.739cm">
          <text:p/>
        </draw:line>
        <draw:line draw:style-name="gr79" draw:text-style-name="P8" draw:layer="layout" svg:x1="3.577cm" svg:y1="7.28cm" svg:x2="4.298cm" svg:y2="4.556cm">
          <text:p/>
        </draw:line>
        <draw:line draw:style-name="gr79" draw:text-style-name="P8" draw:layer="layout" svg:x1="3.587cm" svg:y1="7.305cm" svg:x2="6.366cm" svg:y2="4.622cm">
          <text:p/>
        </draw:line>
        <draw:line draw:style-name="gr79" draw:text-style-name="P8" draw:layer="layout" svg:x1="6.497cm" svg:y1="10.004cm" svg:x2="6.957cm" svg:y2="7.772cm">
          <text:p/>
        </draw:line>
        <draw:line draw:style-name="gr79" draw:text-style-name="P8" draw:layer="layout" svg:x1="7.449cm" svg:y1="10.037cm" svg:x2="7.285cm" svg:y2="7.871cm">
          <text:p/>
        </draw:line>
        <draw:line draw:style-name="gr79" draw:text-style-name="P8" draw:layer="layout" svg:x1="8.696cm" svg:y1="9.971cm" svg:x2="7.547cm" svg:y2="7.838cm">
          <text:p/>
        </draw:line>
        <draw:line draw:style-name="gr79" draw:text-style-name="P8" draw:layer="layout" svg:x1="8.722cm" svg:y1="9.997cm" svg:x2="7.573cm" svg:y2="7.864cm">
          <text:p/>
        </draw:line>
        <draw:line draw:style-name="gr79" draw:text-style-name="P8" draw:layer="layout" svg:x1="9.779cm" svg:y1="10.004cm" svg:x2="7.908cm" svg:y2="7.871cm">
          <text:p/>
        </draw:line>
        <draw:line draw:style-name="gr79" draw:text-style-name="P8" draw:layer="layout" svg:x1="9.805cm" svg:y1="10.03cm" svg:x2="12.043cm" svg:y2="7.772cm">
          <text:p/>
        </draw:line>
        <draw:line draw:style-name="gr79" draw:text-style-name="P8" draw:layer="layout" svg:x1="9.78cm" svg:y1="10.055cm" svg:x2="12.018cm" svg:y2="7.797cm">
          <text:p/>
        </draw:line>
        <draw:line draw:style-name="gr79" draw:text-style-name="P8" draw:layer="layout" svg:x1="9.78cm" svg:y1="10.055cm" svg:x2="11.485cm" svg:y2="7.805cm">
          <text:p/>
        </draw:line>
        <draw:line draw:style-name="gr79" draw:text-style-name="P8" draw:layer="layout" svg:x1="9.756cm" svg:y1="10.08cm" svg:x2="11.461cm" svg:y2="7.83cm">
          <text:p/>
        </draw:line>
        <draw:line draw:style-name="gr79" draw:text-style-name="P8" draw:layer="layout" svg:x1="9.756cm" svg:y1="10.08cm" svg:x2="5.742cm" svg:y2="7.739cm">
          <text:p/>
        </draw:line>
        <draw:line draw:style-name="gr79" draw:text-style-name="P8" draw:layer="layout" svg:x1="9.756cm" svg:y1="10.08cm" svg:x2="2.789cm" svg:y2="7.674cm">
          <text:p/>
        </draw:line>
        <draw:line draw:style-name="gr79" draw:text-style-name="P8" draw:layer="layout" svg:x1="9.756cm" svg:y1="10.08cm" svg:x2="1.115cm" svg:y2="7.772cm">
          <text:p/>
        </draw:line>
        <draw:line draw:style-name="gr79" draw:text-style-name="P8" draw:layer="layout" svg:x1="3.571cm" svg:y1="13.22cm" svg:x2="4.922cm" svg:y2="10.562cm">
          <text:p/>
        </draw:line>
        <draw:line draw:style-name="gr79" draw:text-style-name="P8" draw:layer="layout" svg:x1="6.82cm" svg:y1="13.345cm" svg:x2="5.021cm" svg:y2="10.597cm">
          <text:p/>
        </draw:line>
        <draw:line draw:style-name="gr79" draw:text-style-name="P8" draw:layer="layout" svg:x1="3.607cm" svg:y1="13.228cm" svg:x2="5.281cm" svg:y2="10.615cm">
          <text:p/>
        </draw:line>
        <draw:line draw:style-name="gr79" draw:text-style-name="P8" draw:layer="layout" svg:x1="6.846cm" svg:y1="13.37cm" svg:x2="5.352cm" svg:y2="10.57cm">
          <text:p/>
        </draw:line>
        <draw:line draw:style-name="gr80" draw:text-style-name="P8" draw:layer="layout" svg:x1="15.043cm" svg:y1="4.274cm" svg:x2="25.991cm" svg:y2="4.248cm">
          <text:p/>
        </draw:line>
        <draw:frame draw:style-name="gr81" draw:text-style-name="P24" draw:layer="layout" svg:width="3.679cm" svg:height="0.962cm" svg:x="22.5cm" svg:y="4.452cm">
          <draw:text-box>
            <text:p><text:span text:style-name="T13"> </text:span><text:span text:style-name="T33">Sentences</text:span></text:p>
          </draw:text-box>
        </draw:frame>
        <draw:line draw:style-name="gr80" draw:text-style-name="P8" draw:layer="layout" svg:x1="15.699cm" svg:y1="12.544cm" svg:x2="19.558cm" svg:y2="4.3cm">
          <text:p/>
        </draw:line>
        <draw:frame draw:style-name="gr82" draw:text-style-name="P24" draw:layer="layout" svg:width="2.501cm" svg:height="0.962cm" svg:x="16.345cm" svg:y="4.687cm">
          <draw:text-box>
            <text:p><text:span text:style-name="T13"> </text:span><text:span text:style-name="T33">Words</text:span></text:p>
          </draw:text-box>
        </draw:frame>
        <draw:line draw:style-name="gr80" draw:text-style-name="P8" draw:layer="layout" svg:x1="25.439cm" svg:y1="13.541cm" svg:x2="17.458cm" svg:y2="8.921cm">
          <text:p/>
        </draw:line>
        <draw:frame draw:style-name="gr83" draw:text-style-name="P24" draw:layer="layout" svg:width="2.619cm" svg:height="0.962cm" svg:x="17.527cm" svg:y="8.246cm">
          <draw:text-box>
            <text:p><text:span text:style-name="T13"> </text:span><text:span text:style-name="T33">Letters</text:span></text:p>
          </draw:text-box>
        </draw:frame>
        <draw:line draw:style-name="gr80" draw:text-style-name="P8" draw:layer="layout" svg:x1="18.561cm" svg:y1="14.486cm" svg:x2="22.079cm" svg:y2="11.572cm">
          <text:p/>
        </draw:line>
        <draw:frame draw:style-name="gr84" draw:text-style-name="P24" draw:layer="layout" svg:width="2.831cm" svg:height="0.962cm" svg:x="20.89cm" svg:y="12.394cm">
          <draw:text-box>
            <text:p><text:span text:style-name="T13"> </text:span><text:span text:style-name="T33">Strokes</text:span></text:p>
          </draw:text-box>
        </draw:frame>
        <draw:frame draw:style-name="gr85" draw:text-style-name="P15" draw:layer="layout" svg:width="12.2cm" svg:height="1.916cm" svg:x="7.755cm" svg:y="13.535cm">
          <draw:text-box>
            <text:p text:style-name="P63"><text:span text:style-name="T34">Pedro Domingos, Tensor Logic: The Language of AI</text:span></text:p>
            <text:p><text:span text:style-name="T34"><text:a xlink:href="https://arxiv.org/pdf/2510.12269" xlink:type="simple">https://arxiv.org/pdf/2510.12269</text:a></text:span></text:p>
          </draw:text-box>
        </draw:frame>
        <draw:frame draw:style-name="gr86" draw:text-style-name="P64" draw:layer="layout" svg:width="6.657cm" svg:height="1.787cm" svg:x="21.355cm" svg:y="13.988cm">
          <draw:text-box>
            <text:p><text:span text:style-name="T35">Вершина графа - измерение</text:span><text:span text:style-name="T35"><text:line-break/></text:span><text:span text:style-name="T35">Ребро графа - вектор</text:span><text:span text:style-name="T35"><text:line-break/></text:span><text:span text:style-name="T35">Гиперграф - тензор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5f_" presentation:presentation-page-layout-name="AL1T0" presentation:use-footer-name="ftr1">
        <office:forms form:automatic-focus="false" form:apply-design-mode="false"/>
        <draw:frame draw:style-name="gr87" draw:text-style-name="P65" draw:layer="layout" svg:width="28cm" svg:height="2.783cm" svg:x="-0.026cm" svg:y="0.053cm">
          <draw:text-box>
            <text:p text:style-name="P39"><text:span text:style-name="T36">Типизированная тензорная логика для различных систем ИИ</text:span></text:p>
            <text:p text:style-name="P39"><text:span text:style-name="T37">(logical, sub-symbolic, probabilistic/non-axiomatic)</text:span></text:p>
          </draw:text-box>
        </draw:frame>
        <draw:line draw:style-name="gr88" draw:text-style-name="P8" draw:layer="layout" svg:x1="1.685cm" svg:y1="11.56cm" svg:x2="1.685cm" svg:y2="6.48cm">
          <text:p/>
        </draw:line>
        <draw:line draw:style-name="gr88" draw:text-style-name="P8" draw:layer="layout" svg:x1="1.685cm" svg:y1="11.561cm" svg:x2="8.035cm" svg:y2="11.56cm">
          <text:p/>
        </draw:line>
        <draw:frame draw:style-name="gr89" draw:text-style-name="P66" draw:layer="layout" svg:width="3.326cm" svg:height="1.195cm" svg:x="6.303cm" svg:y="11.585cm">
          <draw:text-box>
            <text:p><text:span text:style-name="T38">Subject</text:span></text:p>
          </draw:text-box>
        </draw:frame>
        <draw:frame draw:style-name="gr90" draw:text-style-name="P66" draw:layer="layout" svg:width="3.702cm" svg:height="1.195cm" svg:x="0.733cm" svg:y="5.271cm">
          <draw:text-box>
            <text:p><text:span text:style-name="T38">Property</text:span></text:p>
          </draw:text-box>
        </draw:frame>
        <draw:frame draw:style-name="gr91" draw:text-style-name="P67" draw:layer="layout" svg:width="2.393cm" svg:height="0.963cm" svg:x="3.867cm" svg:y="10.697cm">
          <draw:text-box>
            <text:p><text:span text:style-name="T13">horse</text:span></text:p>
          </draw:text-box>
        </draw:frame>
        <draw:frame draw:style-name="gr92" draw:text-style-name="P67" draw:layer="layout" svg:width="3.175cm" svg:height="0.962cm" svg:x="0.785cm" svg:y="8.115cm">
          <draw:text-box>
            <text:p><text:span text:style-name="T13">striped</text:span></text:p>
          </draw:text-box>
        </draw:frame>
        <draw:frame draw:style-name="gr85" draw:text-style-name="P15" draw:layer="layout" svg:width="12.2cm" svg:height="1.916cm" svg:x="15.855cm" svg:y="13.535cm">
          <draw:text-box>
            <text:p text:style-name="P63"><text:span text:style-name="T34">Pedro Domingos, Tensor Logic: The Language of AI</text:span></text:p>
            <text:p><text:span text:style-name="T34"><text:a xlink:href="https://arxiv.org/pdf/2510.12269" xlink:type="simple">https://arxiv.org/pdf/2510.12269</text:a></text:span></text:p>
          </draw:text-box>
        </draw:frame>
        <draw:line draw:style-name="gr88" draw:text-style-name="P8" draw:layer="layout" svg:x1="10.585cm" svg:y1="11.561cm" svg:x2="10.585cm" svg:y2="6.481cm">
          <text:p/>
        </draw:line>
        <draw:line draw:style-name="gr88" draw:text-style-name="P8" draw:layer="layout" svg:x1="10.585cm" svg:y1="11.562cm" svg:x2="16.935cm" svg:y2="11.561cm">
          <text:p/>
        </draw:line>
        <draw:frame draw:style-name="gr89" draw:text-style-name="P66" draw:layer="layout" svg:width="3.326cm" svg:height="1.195cm" svg:x="15.203cm" svg:y="11.586cm">
          <draw:text-box>
            <text:p><text:span text:style-name="T38">Subject</text:span></text:p>
          </draw:text-box>
        </draw:frame>
        <draw:frame draw:style-name="gr90" draw:text-style-name="P66" draw:layer="layout" svg:width="3.702cm" svg:height="1.195cm" svg:x="9.633cm" svg:y="5.272cm">
          <draw:text-box>
            <text:p><text:span text:style-name="T38">Property</text:span></text:p>
          </draw:text-box>
        </draw:frame>
        <draw:frame draw:style-name="gr91" draw:text-style-name="P67" draw:layer="layout" svg:width="2.393cm" svg:height="0.963cm" svg:x="12.767cm" svg:y="10.698cm">
          <draw:text-box>
            <text:p><text:span text:style-name="T13">horse</text:span></text:p>
          </draw:text-box>
        </draw:frame>
        <draw:frame draw:style-name="gr92" draw:text-style-name="P67" draw:layer="layout" svg:width="3.175cm" svg:height="0.962cm" svg:x="9.685cm" svg:y="8.116cm">
          <draw:text-box>
            <text:p><text:span text:style-name="T13">striped</text:span></text:p>
          </draw:text-box>
        </draw:frame>
        <draw:line draw:style-name="gr88" draw:text-style-name="P8" draw:layer="layout" svg:x1="19.485cm" svg:y1="11.562cm" svg:x2="19.485cm" svg:y2="6.482cm">
          <text:p/>
        </draw:line>
        <draw:line draw:style-name="gr88" draw:text-style-name="P8" draw:layer="layout" svg:x1="19.485cm" svg:y1="11.563cm" svg:x2="25.835cm" svg:y2="11.562cm">
          <text:p/>
        </draw:line>
        <draw:frame draw:style-name="gr89" draw:text-style-name="P66" draw:layer="layout" svg:width="3.326cm" svg:height="1.195cm" svg:x="24.103cm" svg:y="11.587cm">
          <draw:text-box>
            <text:p><text:span text:style-name="T38">Subject</text:span></text:p>
          </draw:text-box>
        </draw:frame>
        <draw:frame draw:style-name="gr90" draw:text-style-name="P66" draw:layer="layout" svg:width="3.702cm" svg:height="1.195cm" svg:x="18.533cm" svg:y="5.273cm">
          <draw:text-box>
            <text:p><text:span text:style-name="T38">Property</text:span></text:p>
          </draw:text-box>
        </draw:frame>
        <draw:frame draw:style-name="gr91" draw:text-style-name="P67" draw:layer="layout" svg:width="2.393cm" svg:height="0.963cm" svg:x="21.667cm" svg:y="10.699cm">
          <draw:text-box>
            <text:p><text:span text:style-name="T13">horse</text:span></text:p>
          </draw:text-box>
        </draw:frame>
        <draw:frame draw:style-name="gr92" draw:text-style-name="P67" draw:layer="layout" svg:width="3.175cm" svg:height="0.962cm" svg:x="18.585cm" svg:y="7.917cm">
          <draw:text-box>
            <text:p><text:span text:style-name="T13">striped</text:span></text:p>
          </draw:text-box>
        </draw:frame>
        <draw:frame draw:style-name="gr58" draw:text-style-name="P44" draw:layer="layout" svg:width="5.035cm" svg:height="3.63cm" svg:x="20.945cm" svg:y="7.269cm">
          <draw:image xlink:href="Pictures/100000010000020800000177B5D88F53.png" xlink:type="simple" xlink:show="embed" xlink:actuate="onLoad" draw:mime-type="image/png">
            <text:p/>
          </draw:image>
        </draw:frame>
        <draw:custom-shape draw:style-name="gr93" draw:text-style-name="P68" draw:layer="layout" svg:width="2.54cm" svg:height="3.81cm" svg:x="23.55cm" svg:y="7.185cm">
          <text:p/>
          <draw:enhanced-geometry svg:viewBox="0 0 21600 21600" draw:type="rectangle" draw:enhanced-path="M 0 0 L 21600 0 21600 21600 0 21600 0 0 Z N"/>
        </draw:custom-shape>
        <draw:frame draw:style-name="gr58" draw:text-style-name="P44" draw:layer="layout" svg:width="5.035cm" svg:height="3.63cm" svg:x="12.246cm" svg:y="7.269cm">
          <draw:image xlink:href="Pictures/100000010000020800000177B5D88F53.png" xlink:type="simple" xlink:show="embed" xlink:actuate="onLoad" draw:mime-type="image/png">
            <text:p/>
          </draw:image>
        </draw:frame>
        <draw:custom-shape draw:style-name="gr93" draw:text-style-name="P68" draw:layer="layout" svg:width="2.54cm" svg:height="3.81cm" svg:x="14.851cm" svg:y="7.185cm">
          <text:p/>
          <draw:enhanced-geometry svg:viewBox="0 0 21600 21600" draw:type="rectangle" draw:enhanced-path="M 0 0 L 21600 0 21600 21600 0 21600 0 0 Z N"/>
        </draw:custom-shape>
        <draw:frame draw:style-name="gr58" draw:text-style-name="P44" draw:layer="layout" svg:width="5.035cm" svg:height="3.63cm" svg:x="3.347cm" svg:y="7.269cm">
          <draw:image xlink:href="Pictures/100000010000020800000177B5D88F53.png" xlink:type="simple" xlink:show="embed" xlink:actuate="onLoad" draw:mime-type="image/png">
            <text:p/>
          </draw:image>
        </draw:frame>
        <draw:custom-shape draw:style-name="gr93" draw:text-style-name="P68" draw:layer="layout" svg:width="2.54cm" svg:height="3.81cm" svg:x="5.952cm" svg:y="7.185cm">
          <text:p/>
          <draw:enhanced-geometry svg:viewBox="0 0 21600 21600" draw:type="rectangle" draw:enhanced-path="M 0 0 L 21600 0 21600 21600 0 21600 0 0 Z N"/>
        </draw:custom-shape>
        <draw:frame draw:style-name="gr94" draw:text-style-name="P69" draw:layer="layout" svg:width="3.136cm" svg:height="1.195cm" svg:x="23.529cm" svg:y="5.955cm">
          <draw:text-box>
            <text:p><text:span text:style-name="T39">False</text:span></text:p>
          </draw:text-box>
        </draw:frame>
        <draw:frame draw:style-name="gr95" draw:text-style-name="P69" draw:layer="layout" svg:width="2.644cm" svg:height="1.195cm" svg:x="14.929cm" svg:y="5.956cm">
          <draw:text-box>
            <text:p><text:span text:style-name="T39">~0.01</text:span></text:p>
          </draw:text-box>
        </draw:frame>
        <draw:frame draw:style-name="gr96" draw:text-style-name="P69" draw:layer="layout" svg:width="4.999cm" svg:height="2.139cm" svg:x="4.821cm" svg:y="5.282cm">
          <draw:text-box>
            <text:p text:style-name="P63"><text:span text:style-name="T39">0.0123456</text:span></text:p>
            <text:p text:style-name="P63"><text:span text:style-name="T39">=750/60750</text:span></text:p>
          </draw:text-box>
        </draw:frame>
        <draw:frame draw:style-name="gr97" draw:text-style-name="P8" draw:layer="layout" svg:width="1.253cm" svg:height="1.253cm" svg:x="1.733cm" svg:y="11.835cm">
          <draw:image xlink:href="Pictures/10000000000000F0000000F03A40411B.png" xlink:type="simple" xlink:show="embed" xlink:actuate="onLoad" draw:mime-type="image/png">
            <text:p/>
          </draw:image>
        </draw:frame>
        <draw:frame draw:style-name="gr98" draw:text-style-name="P70" draw:layer="layout" svg:width="3.144cm" svg:height="1.673cm" svg:x="2.986cm" svg:y="11.615cm">
          <draw:text-box>
            <text:p text:style-name="P63"><text:span text:style-name="T40">Life-long</text:span></text:p>
            <text:p><text:span text:style-name="T40">learning?</text:span></text:p>
          </draw:text-box>
        </draw:frame>
        <draw:custom-shape draw:style-name="gr99" draw:text-style-name="P72" draw:layer="layout" svg:width="6.836cm" svg:height="2.062cm" svg:x="18.517cm" svg:y="2.817cm">
          <text:p text:style-name="P71"><text:span text:style-name="T41">Boolean Tensor</text:span></text:p>
          <text:p text:style-name="P71"><text:span text:style-name="T42">(Boolean Log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0" draw:text-style-name="P72" draw:layer="layout" svg:width="8.122cm" svg:height="2.062cm" svg:x="9.618cm" svg:y="2.818cm">
          <text:p text:style-name="P71"><text:span text:style-name="T41">Numerical Tensor</text:span></text:p>
          <text:p text:style-name="P71"><text:span text:style-name="T42">(ANN/Bayesian Log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1" draw:text-style-name="P72" draw:layer="layout" svg:width="8.107cm" svg:height="2.062cm" svg:x="0.719cm" svg:y="2.819cm">
          <text:p text:style-name="P71"><text:span text:style-name="T41">Truth-Value Tensor</text:span></text:p>
          <text:p text:style-name="P71"><text:span text:style-name="T42">(NARS/PLN/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2" draw:text-style-name="P15" draw:layer="layout" svg:width="13.982cm" svg:height="1.361cm" svg:x="0.97cm" svg:y="13.54cm">
          <draw:text-box>
            <text:p><text:span text:style-name="T34">Pei Wang: Non-Axiomatic Logic</text:span></text:p>
            <text:p><text:span text:style-name="T34"><text:a xlink:href="https://www.worldscientific.com/worldscibooks/10.1142/14486" xlink:type="simple">https://www.worldscientific.com/worldscibooks/10.1142/14486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1">
        <office:forms form:automatic-focus="false" form:apply-design-mode="false"/>
        <draw:custom-shape draw:style-name="gr103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04" draw:text-style-name="P23" draw:layer="layout" svg:width="17.565cm" svg:height="1.085cm" svg:x="4.723cm" svg:y="0.528cm">
          <draw:text-box>
            <text:p><text:span text:style-name="T12">Психика = Операционная система</text:span></text:p>
          </draw:text-box>
        </draw:frame>
        <draw:custom-shape draw:style-name="gr105" draw:text-style-name="P21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1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1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3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73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3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3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10" draw:text-style-name="P74" draw:layer="layout" svg:width="7.004cm" svg:height="0.878cm" svg:x="2.445cm" svg:y="6.08cm">
          <draw:text-box>
            <text:p><text:span text:style-name="T43">Состояние</text:span><text:span text:style-name="T14"> s</text:span><text:span text:style-name="T44">t-1</text:span><text:span text:style-name="T45"> </text:span><text:span text:style-name="T43">(прошлое)</text:span></text:p>
          </draw:text-box>
        </draw:frame>
        <draw:frame draw:style-name="gr111" draw:text-style-name="P74" draw:layer="layout" svg:width="7.323cm" svg:height="0.878cm" svg:x="10.465cm" svg:y="6.08cm">
          <draw:text-box>
            <text:p><text:span text:style-name="T43">Состояние</text:span><text:span text:style-name="T14"> s</text:span><text:span text:style-name="T44">t</text:span><text:span text:style-name="T45"> </text:span><text:span text:style-name="T43">(настоящее)</text:span></text:p>
          </draw:text-box>
        </draw:frame>
        <draw:frame draw:style-name="gr112" draw:text-style-name="P74" draw:layer="layout" svg:width="7.008cm" svg:height="0.878cm" svg:x="18.625cm" svg:y="6.08cm">
          <draw:text-box>
            <text:p><text:span text:style-name="T43">Состояние</text:span><text:span text:style-name="T14"> s</text:span><text:span text:style-name="T44">t+1</text:span><text:span text:style-name="T45"> </text:span><text:span text:style-name="T43">(будущее)</text:span></text:p>
          </draw:text-box>
        </draw:frame>
        <draw:frame draw:style-name="gr113" draw:text-style-name="P76" draw:layer="layout" svg:width="3.369cm" svg:height="1.433cm" svg:x="5.35cm" svg:y="7.042cm">
          <draw:text-box>
            <text:p><text:span text:style-name="T34">Реальность</text:span></text:p>
            <text:p text:style-name="P75"><text:span text:style-name="T46">(“факт”) <text:s text:c="2"/></text:span><text:span text:style-name="T14">s</text:span><text:span text:style-name="T44">t-1</text:span></text:p>
          </draw:text-box>
        </draw:frame>
        <draw:frame draw:style-name="gr114" draw:text-style-name="P76" draw:layer="layout" svg:width="3.4cm" svg:height="1.433cm" svg:x="14.38cm" svg:y="7.042cm">
          <draw:text-box>
            <text:p><text:span text:style-name="T34">Реальность</text:span></text:p>
            <text:p text:style-name="P75"><text:span text:style-name="T46">(“факт”) <text:s text:c="4"/></text:span><text:span text:style-name="T14">s</text:span><text:span text:style-name="T44">t</text:span></text:p>
          </draw:text-box>
        </draw:frame>
        <draw:frame draw:style-name="gr115" draw:text-style-name="P76" draw:layer="layout" svg:width="3.454cm" svg:height="1.433cm" svg:x="10.145cm" svg:y="7.042cm">
          <draw:text-box>
            <text:p><text:span text:style-name="T34">Ожидания</text:span></text:p>
            <text:p text:style-name="P75"><text:span text:style-name="T46">(“план”) <text:s text:c="4"/></text:span><text:span text:style-name="T14">s’</text:span><text:span text:style-name="T44">t</text:span></text:p>
          </draw:text-box>
        </draw:frame>
        <draw:frame draw:style-name="gr116" draw:text-style-name="P76" draw:layer="layout" svg:width="3.55cm" svg:height="1.433cm" svg:x="19.25cm" svg:y="7.042cm">
          <draw:text-box>
            <text:p><text:span text:style-name="T34">Ожидания</text:span></text:p>
            <text:p text:style-name="P75"><text:span text:style-name="T46">(“план”) <text:s text:c="2"/></text:span><text:span text:style-name="T14">s’</text:span><text:span text:style-name="T44">t+1</text:span></text:p>
          </draw:text-box>
        </draw:frame>
        <draw:frame draw:style-name="gr117" draw:text-style-name="P77" draw:layer="layout" svg:width="3.175cm" svg:height="1.199cm" svg:x="5.48cm" svg:y="8.403cm">
          <draw:text-box>
            <text:p><text:span text:style-name="T47">Ощущения</text:span></text:p>
            <text:p><text:span text:style-name="T48">f</text:span><text:span text:style-name="T49">t-1</text:span></text:p>
          </draw:text-box>
        </draw:frame>
        <draw:frame draw:style-name="gr118" draw:text-style-name="P78" draw:layer="layout" svg:width="3.174cm" svg:height="1.199cm" svg:x="5.481cm" svg:y="9.79cm">
          <draw:text-box>
            <text:p><text:span text:style-name="T47">Потребности</text:span></text:p>
            <text:p><text:span text:style-name="T48">y</text:span><text:span text:style-name="T49">t-1</text:span></text:p>
          </draw:text-box>
        </draw:frame>
        <draw:frame draw:style-name="gr119" draw:text-style-name="P79" draw:layer="layout" svg:width="3.174cm" svg:height="1.199cm" svg:x="5.481cm" svg:y="11.195cm">
          <draw:text-box>
            <text:p><text:span text:style-name="T47">Действия</text:span></text:p>
            <text:p><text:span text:style-name="T48">a</text:span><text:span text:style-name="T49">t-1</text:span></text:p>
          </draw:text-box>
        </draw:frame>
        <draw:frame draw:style-name="gr120" draw:text-style-name="P80" draw:layer="layout" svg:width="3.175cm" svg:height="1.199cm" svg:x="10.36cm" svg:y="8.403cm">
          <draw:text-box>
            <text:p><text:span text:style-name="T47">Ощущения</text:span></text:p>
            <text:p><text:span text:style-name="T48">f’</text:span><text:span text:style-name="T49">t</text:span></text:p>
          </draw:text-box>
        </draw:frame>
        <draw:frame draw:style-name="gr120" draw:text-style-name="P80" draw:layer="layout" svg:width="3.174cm" svg:height="1.199cm" svg:x="10.361cm" svg:y="9.79cm">
          <draw:text-box>
            <text:p><text:span text:style-name="T47">Потребности</text:span></text:p>
            <text:p><text:span text:style-name="T48">x’</text:span><text:span text:style-name="T49">t</text:span></text:p>
          </draw:text-box>
        </draw:frame>
        <draw:frame draw:style-name="gr120" draw:text-style-name="P80" draw:layer="layout" svg:width="3.174cm" svg:height="1.199cm" svg:x="10.361cm" svg:y="11.195cm">
          <draw:text-box>
            <text:p><text:span text:style-name="T47">Действия</text:span></text:p>
            <text:p><text:span text:style-name="T48">a’</text:span><text:span text:style-name="T49">t</text:span></text:p>
          </draw:text-box>
        </draw:frame>
        <draw:frame draw:style-name="gr117" draw:text-style-name="P77" draw:layer="layout" svg:width="3.175cm" svg:height="1.199cm" svg:x="10.361cm" svg:y="8.404cm">
          <draw:text-box>
            <text:p><text:span text:style-name="T47">Ощущения</text:span></text:p>
            <text:p><text:span text:style-name="T48">f’</text:span><text:span text:style-name="T49">t</text:span></text:p>
          </draw:text-box>
        </draw:frame>
        <draw:frame draw:style-name="gr118" draw:text-style-name="P78" draw:layer="layout" svg:width="3.174cm" svg:height="1.199cm" svg:x="10.362cm" svg:y="9.791cm">
          <draw:text-box>
            <text:p><text:span text:style-name="T47">Потребности</text:span></text:p>
            <text:p><text:span text:style-name="T48">y’</text:span><text:span text:style-name="T49">t</text:span></text:p>
          </draw:text-box>
        </draw:frame>
        <draw:frame draw:style-name="gr119" draw:text-style-name="P79" draw:layer="layout" svg:width="3.174cm" svg:height="1.199cm" svg:x="10.362cm" svg:y="11.196cm">
          <draw:text-box>
            <text:p><text:span text:style-name="T47">Действия</text:span></text:p>
            <text:p><text:span text:style-name="T48">a’</text:span><text:span text:style-name="T49">t</text:span></text:p>
          </draw:text-box>
        </draw:frame>
        <draw:frame draw:style-name="gr117" draw:text-style-name="P77" draw:layer="layout" svg:width="3.175cm" svg:height="1.199cm" svg:x="14.46cm" svg:y="8.403cm">
          <draw:text-box>
            <text:p><text:span text:style-name="T47">Ощущения</text:span></text:p>
            <text:p><text:span text:style-name="T48">f</text:span><text:span text:style-name="T49">t</text:span></text:p>
          </draw:text-box>
        </draw:frame>
        <draw:frame draw:style-name="gr118" draw:text-style-name="P78" draw:layer="layout" svg:width="3.174cm" svg:height="1.199cm" svg:x="14.461cm" svg:y="9.79cm">
          <draw:text-box>
            <text:p><text:span text:style-name="T47">Потребности</text:span></text:p>
            <text:p><text:span text:style-name="T48">y</text:span><text:span text:style-name="T49">t</text:span></text:p>
          </draw:text-box>
        </draw:frame>
        <draw:frame draw:style-name="gr119" draw:text-style-name="P79" draw:layer="layout" svg:width="3.174cm" svg:height="1.199cm" svg:x="14.461cm" svg:y="11.195cm">
          <draw:text-box>
            <text:p><text:span text:style-name="T47">Действия</text:span></text:p>
            <text:p><text:span text:style-name="T48">a</text:span><text:span text:style-name="T49">t</text:span></text:p>
          </draw:text-box>
        </draw:frame>
        <draw:frame draw:style-name="gr117" draw:text-style-name="P77" draw:layer="layout" svg:width="3.175cm" svg:height="1.199cm" svg:x="19.35cm" svg:y="8.403cm">
          <draw:text-box>
            <text:p><text:span text:style-name="T47">Ощущения</text:span></text:p>
            <text:p><text:span text:style-name="T48">f’</text:span><text:span text:style-name="T49">t+1</text:span></text:p>
          </draw:text-box>
        </draw:frame>
        <draw:frame draw:style-name="gr118" draw:text-style-name="P78" draw:layer="layout" svg:width="3.174cm" svg:height="1.199cm" svg:x="19.351cm" svg:y="9.79cm">
          <draw:text-box>
            <text:p><text:span text:style-name="T47">Потребности</text:span></text:p>
            <text:p><text:span text:style-name="T48">y’</text:span><text:span text:style-name="T49">t+1</text:span></text:p>
          </draw:text-box>
        </draw:frame>
        <draw:frame draw:style-name="gr119" draw:text-style-name="P79" draw:layer="layout" svg:width="3.174cm" svg:height="1.199cm" svg:x="19.351cm" svg:y="11.195cm">
          <draw:text-box>
            <text:p><text:span text:style-name="T47">Действия</text:span></text:p>
            <text:p><text:span text:style-name="T48">a’</text:span><text:span text:style-name="T49">t+1</text:span></text:p>
          </draw:text-box>
        </draw:frame>
        <draw:frame draw:style-name="gr32" draw:text-style-name="P27" draw:layer="layout" svg:width="3.152cm" svg:height="0.962cm" svg:x="13.97cm" svg:y="13.673cm">
          <draw:text-box>
            <text:p><text:span text:style-name="T13">Сенсоры</text:span></text:p>
          </draw:text-box>
        </draw:frame>
        <draw:frame draw:style-name="gr33" draw:text-style-name="P27" draw:layer="layout" svg:width="3.604cm" svg:height="0.962cm" svg:x="9.731cm" svg:y="13.673cm">
          <draw:text-box>
            <text:p><text:span text:style-name="T13">Актуаторы</text:span></text:p>
          </draw:text-box>
        </draw:frame>
        <draw:line draw:style-name="gr34" draw:text-style-name="P8" draw:layer="layout" svg:x1="8.725cm" svg:y1="11.795cm" svg:x2="10.295cm" svg:y2="13.7cm">
          <text:p/>
        </draw:line>
        <draw:line draw:style-name="gr34" draw:text-style-name="P8" draw:layer="layout" svg:x1="8.925cm" svg:y1="9.695cm" svg:x2="10.061cm" svg:y2="9.695cm">
          <text:p/>
        </draw:line>
        <draw:line draw:style-name="gr34" draw:text-style-name="P8" draw:layer="layout" svg:x1="16.44cm" svg:y1="13.673cm" svg:x2="16.44cm" svg:y2="12.53cm">
          <text:p/>
        </draw:line>
        <draw:frame draw:style-name="gr121" draw:text-style-name="P29" draw:layer="layout" svg:width="2.757cm" svg:height="0.839cm" svg:x="7.303cm" svg:y="12.965cm">
          <draw:text-box>
            <text:p><text:span text:style-name="T15">Решения</text:span></text:p>
          </draw:text-box>
        </draw:frame>
        <draw:frame draw:style-name="gr122" draw:text-style-name="P29" draw:layer="layout" svg:width="3.253cm" svg:height="0.878cm" svg:x="13.265cm" svg:y="12.9cm">
          <draw:text-box>
            <text:p><text:span text:style-name="T15">Ощущения</text:span></text:p>
          </draw:text-box>
        </draw:frame>
        <draw:custom-shape draw:style-name="gr123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24" draw:text-style-name="P24" draw:layer="layout" svg:width="12.593cm" svg:height="0.962cm" svg:x="7.268cm" svg:y="1.924cm">
          <draw:text-box>
            <text:p><text:span text:style-name="T13">Интеллект = Система принятия решений</text:span></text:p>
          </draw:text-box>
        </draw:frame>
        <draw:custom-shape draw:style-name="gr124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25" draw:text-style-name="P24" draw:layer="layout" svg:width="19.768cm" svg:height="0.962cm" svg:x="4.42cm" svg:y="5.018cm">
          <draw:text-box>
            <text:p><text:span text:style-name="T13">Пространство состояний и эпизодическая память (“прецеденты”)</text:span></text:p>
          </draw:text-box>
        </draw:frame>
        <draw:line draw:style-name="gr126" draw:text-style-name="P8" draw:layer="layout" svg:x1="17.7cm" svg:y1="11.781cm" svg:x2="19.27cm" svg:y2="13.686cm">
          <text:p/>
        </draw:line>
        <draw:line draw:style-name="gr126" draw:text-style-name="P8" draw:layer="layout" svg:x1="18cm" svg:y1="9.681cm" svg:x2="19.15cm" svg:y2="9.681cm">
          <text:p/>
        </draw:line>
        <draw:frame draw:style-name="gr127" draw:text-style-name="P82" draw:layer="layout" svg:width="24.13cm" svg:height="1.925cm" svg:x="1.905cm" svg:y="2.618cm">
          <draw:text-box>
            <text:p text:style-name="P81"><text:span text:style-name="T50">Модели </text:span><text:span text:style-name="T51">s</text:span><text:span text:style-name="T50"> </text:span><text:span text:style-name="T52">(“инварианты”) состояний</text:span><text:span text:style-name="T53">,</text:span><text:span text:style-name="T50"> полезности </text:span><text:span text:style-name="T51">U</text:span><text:span text:style-name="T50"> и вероятности </text:span><text:span text:style-name="T51">P</text:span><text:span text:style-name="T50"> переходов</text:span></text:p>
            <text:p text:style-name="P81"><text:span text:style-name="T51">U({s</text:span><text:span text:style-name="T54">τ</text:span><text:span text:style-name="T51">}</text:span><text:span text:style-name="T55">τ∈{-Τ,-1}​</text:span><text:span text:style-name="T56">,s’</text:span><text:span text:style-name="T55">0</text:span><text:span text:style-name="T56">) = L( </text:span><text:span text:style-name="T57">x</text:span><text:span text:style-name="T58">⋅(</text:span><text:span text:style-name="T59">y</text:span><text:span text:style-name="T60">t <text:s/></text:span><text:span text:style-name="T59">- y</text:span><text:span text:style-name="T60">t+1</text:span><text:span text:style-name="T59">), s’</text:span><text:span text:style-name="T60">t </text:span><text:span text:style-name="T59"><text:s/>- s</text:span><text:span text:style-name="T60">t</text:span><text:span text:style-name="T59">, E(a</text:span><text:span text:style-name="T60">t</text:span><text:span text:style-name="T59">)) <text:s text:c="6"/>s’</text:span><text:span text:style-name="T60">t</text:span><text:span text:style-name="T59">=argmax</text:span><text:span text:style-name="T60">s</text:span><text:span text:style-name="T59">(</text:span><text:span text:style-name="T61">U({s</text:span><text:span text:style-name="T62">τ</text:span><text:span text:style-name="T61">}</text:span><text:span text:style-name="T62">τ</text:span><text:span text:style-name="T60">∈{t-Τ,t-1}​</text:span><text:span text:style-name="T59">,s’</text:span><text:span text:style-name="T60">t</text:span><text:span text:style-name="T59">),P</text:span><text:span text:style-name="T61">({s</text:span><text:span text:style-name="T62">τ</text:span><text:span text:style-name="T61">}</text:span><text:span text:style-name="T62">τ</text:span><text:span text:style-name="T60">∈{t-Τ,t-1}​</text:span><text:span text:style-name="T59">,s’</text:span><text:span text:style-name="T60">t</text:span><text:span text:style-name="T59">)</text:span><text:span text:style-name="T63">)</text:span></text:p>
          </draw:text-box>
        </draw:frame>
        <draw:line draw:style-name="gr34" draw:text-style-name="P8" draw:layer="layout" svg:x1="9.53cm" svg:y1="5.019cm" svg:x2="9.53cm" svg:y2="4.384cm">
          <text:p/>
        </draw:line>
        <draw:frame draw:style-name="gr128" draw:text-style-name="P29" draw:layer="layout" svg:width="5.502cm" svg:height="0.839cm" svg:x="9.565cm" svg:y="4.345cm">
          <draw:text-box>
            <text:p><text:span text:style-name="T15">Обучение на опыте</text:span></text:p>
          </draw:text-box>
        </draw:frame>
        <draw:frame draw:style-name="gr129" draw:text-style-name="P29" draw:layer="layout" svg:width="5.426cm" svg:height="0.839cm" svg:x="16.265cm" svg:y="4.346cm">
          <draw:text-box>
            <text:p><text:span text:style-name="T15">Принятие решений</text:span></text:p>
          </draw:text-box>
        </draw:frame>
        <draw:line draw:style-name="gr34" draw:text-style-name="P8" draw:layer="layout" svg:x1="16.23cm" svg:y1="4.409cm" svg:x2="16.23cm" svg:y2="5.044cm">
          <text:p/>
        </draw:line>
        <draw:frame draw:style-name="gr43" draw:text-style-name="P30" draw:layer="layout" svg:width="7.204cm" svg:height="1.979cm" svg:x="0.465cm" svg:y="13.105cm">
          <draw:text-box>
            <text:p><text:span text:style-name="T16">А.Г.Колонин, В.Г.Крюков:</text:span></text:p>
            <text:p><text:span text:style-name="T16">Вычислительная концепция психики,</text:span></text:p>
            <text:p><text:span text:style-name="T16">Статья принята на конференцию</text:span></text:p>
            <text:p><text:span text:style-name="T16">Нейроинформатика-25</text:span></text:p>
          </draw:text-box>
        </draw:frame>
        <draw:frame draw:style-name="gr130" draw:text-style-name="P64" draw:layer="layout" svg:width="8.823cm" svg:height="2.299cm" svg:x="19.356cm" svg:y="13.289cm">
          <draw:text-box>
            <text:p><text:span text:style-name="T35">DQN?</text:span></text:p>
            <text:p><text:span text:style-name="T35">Трансформеры на токенизированных </text:span></text:p>
            <text:p><text:span text:style-name="T35">состояниях?</text:span></text:p>
            <text:p><text:span text:style-name="T35">“Глобальное подкрепление”!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1">
        <office:forms form:automatic-focus="false" form:apply-design-mode="false"/>
        <draw:custom-shape draw:style-name="gr103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04" draw:text-style-name="P23" draw:layer="layout" svg:width="17.565cm" svg:height="1.085cm" svg:x="4.723cm" svg:y="0.528cm">
          <draw:text-box>
            <text:p><text:span text:style-name="T12">Психика = Операционная система</text:span></text:p>
          </draw:text-box>
        </draw:frame>
        <draw:custom-shape draw:style-name="gr105" draw:text-style-name="P21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1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1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3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73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3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3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10" draw:text-style-name="P74" draw:layer="layout" svg:width="7.004cm" svg:height="0.878cm" svg:x="2.445cm" svg:y="6.08cm">
          <draw:text-box>
            <text:p><text:span text:style-name="T43">Состояние</text:span><text:span text:style-name="T14"> s</text:span><text:span text:style-name="T44">t-1</text:span><text:span text:style-name="T45"> </text:span><text:span text:style-name="T43">(прошлое)</text:span></text:p>
          </draw:text-box>
        </draw:frame>
        <draw:frame draw:style-name="gr111" draw:text-style-name="P74" draw:layer="layout" svg:width="7.323cm" svg:height="0.878cm" svg:x="10.465cm" svg:y="6.08cm">
          <draw:text-box>
            <text:p><text:span text:style-name="T43">Состояние</text:span><text:span text:style-name="T14"> s</text:span><text:span text:style-name="T44">t</text:span><text:span text:style-name="T45"> </text:span><text:span text:style-name="T43">(настоящее)</text:span></text:p>
          </draw:text-box>
        </draw:frame>
        <draw:frame draw:style-name="gr112" draw:text-style-name="P74" draw:layer="layout" svg:width="7.008cm" svg:height="0.878cm" svg:x="18.625cm" svg:y="6.08cm">
          <draw:text-box>
            <text:p><text:span text:style-name="T43">Состояние</text:span><text:span text:style-name="T14"> s</text:span><text:span text:style-name="T44">t+1</text:span><text:span text:style-name="T45"> </text:span><text:span text:style-name="T43">(будущее)</text:span></text:p>
          </draw:text-box>
        </draw:frame>
        <draw:frame draw:style-name="gr113" draw:text-style-name="P76" draw:layer="layout" svg:width="3.369cm" svg:height="1.433cm" svg:x="5.35cm" svg:y="7.042cm">
          <draw:text-box>
            <text:p><text:span text:style-name="T34">Реальность</text:span></text:p>
            <text:p text:style-name="P75"><text:span text:style-name="T46">(“факт”) <text:s text:c="2"/></text:span><text:span text:style-name="T14">s</text:span><text:span text:style-name="T44">t-1</text:span></text:p>
          </draw:text-box>
        </draw:frame>
        <draw:frame draw:style-name="gr114" draw:text-style-name="P76" draw:layer="layout" svg:width="3.4cm" svg:height="1.433cm" svg:x="14.38cm" svg:y="7.042cm">
          <draw:text-box>
            <text:p><text:span text:style-name="T34">Реальность</text:span></text:p>
            <text:p text:style-name="P75"><text:span text:style-name="T46">(“факт”) <text:s text:c="4"/></text:span><text:span text:style-name="T14">s</text:span><text:span text:style-name="T44">t</text:span></text:p>
          </draw:text-box>
        </draw:frame>
        <draw:frame draw:style-name="gr115" draw:text-style-name="P76" draw:layer="layout" svg:width="3.454cm" svg:height="1.433cm" svg:x="10.145cm" svg:y="7.042cm">
          <draw:text-box>
            <text:p><text:span text:style-name="T34">Ожидания</text:span></text:p>
            <text:p text:style-name="P75"><text:span text:style-name="T46">(“план”) <text:s text:c="4"/></text:span><text:span text:style-name="T14">s’</text:span><text:span text:style-name="T44">t</text:span></text:p>
          </draw:text-box>
        </draw:frame>
        <draw:frame draw:style-name="gr116" draw:text-style-name="P76" draw:layer="layout" svg:width="3.55cm" svg:height="1.433cm" svg:x="19.25cm" svg:y="7.042cm">
          <draw:text-box>
            <text:p><text:span text:style-name="T34">Ожидания</text:span></text:p>
            <text:p text:style-name="P75"><text:span text:style-name="T46">(“план”) <text:s text:c="2"/></text:span><text:span text:style-name="T14">s’</text:span><text:span text:style-name="T44">t+1</text:span></text:p>
          </draw:text-box>
        </draw:frame>
        <draw:frame draw:style-name="gr117" draw:text-style-name="P77" draw:layer="layout" svg:width="3.175cm" svg:height="1.199cm" svg:x="5.48cm" svg:y="8.403cm">
          <draw:text-box>
            <text:p><text:span text:style-name="T47">Ощущения</text:span></text:p>
            <text:p><text:span text:style-name="T48">f</text:span><text:span text:style-name="T49">t-1</text:span></text:p>
          </draw:text-box>
        </draw:frame>
        <draw:frame draw:style-name="gr118" draw:text-style-name="P78" draw:layer="layout" svg:width="3.174cm" svg:height="1.199cm" svg:x="5.481cm" svg:y="9.79cm">
          <draw:text-box>
            <text:p><text:span text:style-name="T47">Потребности</text:span></text:p>
            <text:p><text:span text:style-name="T48">y</text:span><text:span text:style-name="T49">t-1</text:span></text:p>
          </draw:text-box>
        </draw:frame>
        <draw:frame draw:style-name="gr119" draw:text-style-name="P79" draw:layer="layout" svg:width="3.174cm" svg:height="1.199cm" svg:x="5.481cm" svg:y="11.195cm">
          <draw:text-box>
            <text:p><text:span text:style-name="T47">Действия</text:span></text:p>
            <text:p><text:span text:style-name="T48">a</text:span><text:span text:style-name="T49">t-1</text:span></text:p>
          </draw:text-box>
        </draw:frame>
        <draw:frame draw:style-name="gr120" draw:text-style-name="P80" draw:layer="layout" svg:width="3.175cm" svg:height="1.199cm" svg:x="10.36cm" svg:y="8.403cm">
          <draw:text-box>
            <text:p><text:span text:style-name="T47">Ощущения</text:span></text:p>
            <text:p><text:span text:style-name="T48">f’</text:span><text:span text:style-name="T49">t</text:span></text:p>
          </draw:text-box>
        </draw:frame>
        <draw:frame draw:style-name="gr120" draw:text-style-name="P80" draw:layer="layout" svg:width="3.174cm" svg:height="1.199cm" svg:x="10.361cm" svg:y="9.79cm">
          <draw:text-box>
            <text:p><text:span text:style-name="T47">Потребности</text:span></text:p>
            <text:p><text:span text:style-name="T48">x’</text:span><text:span text:style-name="T49">t</text:span></text:p>
          </draw:text-box>
        </draw:frame>
        <draw:frame draw:style-name="gr120" draw:text-style-name="P80" draw:layer="layout" svg:width="3.174cm" svg:height="1.199cm" svg:x="10.361cm" svg:y="11.195cm">
          <draw:text-box>
            <text:p><text:span text:style-name="T47">Действия</text:span></text:p>
            <text:p><text:span text:style-name="T48">a’</text:span><text:span text:style-name="T49">t</text:span></text:p>
          </draw:text-box>
        </draw:frame>
        <draw:frame draw:style-name="gr117" draw:text-style-name="P77" draw:layer="layout" svg:width="3.175cm" svg:height="1.199cm" svg:x="10.361cm" svg:y="8.404cm">
          <draw:text-box>
            <text:p><text:span text:style-name="T47">Ощущения</text:span></text:p>
            <text:p><text:span text:style-name="T48">f’</text:span><text:span text:style-name="T49">t</text:span></text:p>
          </draw:text-box>
        </draw:frame>
        <draw:frame draw:style-name="gr118" draw:text-style-name="P78" draw:layer="layout" svg:width="3.174cm" svg:height="1.199cm" svg:x="10.362cm" svg:y="9.791cm">
          <draw:text-box>
            <text:p><text:span text:style-name="T47">Потребности</text:span></text:p>
            <text:p><text:span text:style-name="T48">y’</text:span><text:span text:style-name="T49">t</text:span></text:p>
          </draw:text-box>
        </draw:frame>
        <draw:frame draw:style-name="gr119" draw:text-style-name="P79" draw:layer="layout" svg:width="3.174cm" svg:height="1.199cm" svg:x="10.362cm" svg:y="11.196cm">
          <draw:text-box>
            <text:p><text:span text:style-name="T47">Действия</text:span></text:p>
            <text:p><text:span text:style-name="T48">a’</text:span><text:span text:style-name="T49">t</text:span></text:p>
          </draw:text-box>
        </draw:frame>
        <draw:frame draw:style-name="gr117" draw:text-style-name="P77" draw:layer="layout" svg:width="3.175cm" svg:height="1.199cm" svg:x="14.46cm" svg:y="8.403cm">
          <draw:text-box>
            <text:p><text:span text:style-name="T47">Ощущения</text:span></text:p>
            <text:p><text:span text:style-name="T48">f</text:span><text:span text:style-name="T49">t</text:span></text:p>
          </draw:text-box>
        </draw:frame>
        <draw:frame draw:style-name="gr118" draw:text-style-name="P78" draw:layer="layout" svg:width="3.174cm" svg:height="1.199cm" svg:x="14.461cm" svg:y="9.79cm">
          <draw:text-box>
            <text:p><text:span text:style-name="T47">Потребности</text:span></text:p>
            <text:p><text:span text:style-name="T48">y</text:span><text:span text:style-name="T49">t</text:span></text:p>
          </draw:text-box>
        </draw:frame>
        <draw:frame draw:style-name="gr119" draw:text-style-name="P79" draw:layer="layout" svg:width="3.174cm" svg:height="1.199cm" svg:x="14.461cm" svg:y="11.195cm">
          <draw:text-box>
            <text:p><text:span text:style-name="T47">Действия</text:span></text:p>
            <text:p><text:span text:style-name="T48">a</text:span><text:span text:style-name="T49">t</text:span></text:p>
          </draw:text-box>
        </draw:frame>
        <draw:frame draw:style-name="gr117" draw:text-style-name="P77" draw:layer="layout" svg:width="3.175cm" svg:height="1.199cm" svg:x="19.35cm" svg:y="8.403cm">
          <draw:text-box>
            <text:p><text:span text:style-name="T47">Ощущения</text:span></text:p>
            <text:p><text:span text:style-name="T48">f’</text:span><text:span text:style-name="T49">t+1</text:span></text:p>
          </draw:text-box>
        </draw:frame>
        <draw:frame draw:style-name="gr118" draw:text-style-name="P78" draw:layer="layout" svg:width="3.174cm" svg:height="1.199cm" svg:x="19.351cm" svg:y="9.79cm">
          <draw:text-box>
            <text:p><text:span text:style-name="T47">Потребности</text:span></text:p>
            <text:p><text:span text:style-name="T48">y’</text:span><text:span text:style-name="T49">t+1</text:span></text:p>
          </draw:text-box>
        </draw:frame>
        <draw:frame draw:style-name="gr119" draw:text-style-name="P79" draw:layer="layout" svg:width="3.174cm" svg:height="1.199cm" svg:x="19.351cm" svg:y="11.195cm">
          <draw:text-box>
            <text:p><text:span text:style-name="T47">Действия</text:span></text:p>
            <text:p><text:span text:style-name="T48">a’</text:span><text:span text:style-name="T49">t+1</text:span></text:p>
          </draw:text-box>
        </draw:frame>
        <draw:frame draw:style-name="gr32" draw:text-style-name="P27" draw:layer="layout" svg:width="3.152cm" svg:height="0.962cm" svg:x="13.97cm" svg:y="13.673cm">
          <draw:text-box>
            <text:p><text:span text:style-name="T13">Сенсоры</text:span></text:p>
          </draw:text-box>
        </draw:frame>
        <draw:frame draw:style-name="gr33" draw:text-style-name="P27" draw:layer="layout" svg:width="3.604cm" svg:height="0.962cm" svg:x="9.731cm" svg:y="13.673cm">
          <draw:text-box>
            <text:p><text:span text:style-name="T13">Актуаторы</text:span></text:p>
          </draw:text-box>
        </draw:frame>
        <draw:line draw:style-name="gr34" draw:text-style-name="P8" draw:layer="layout" svg:x1="8.725cm" svg:y1="11.795cm" svg:x2="10.295cm" svg:y2="13.7cm">
          <text:p/>
        </draw:line>
        <draw:line draw:style-name="gr34" draw:text-style-name="P8" draw:layer="layout" svg:x1="8.925cm" svg:y1="9.695cm" svg:x2="10.061cm" svg:y2="9.695cm">
          <text:p/>
        </draw:line>
        <draw:line draw:style-name="gr34" draw:text-style-name="P8" draw:layer="layout" svg:x1="16.44cm" svg:y1="13.673cm" svg:x2="16.44cm" svg:y2="12.53cm">
          <text:p/>
        </draw:line>
        <draw:frame draw:style-name="gr121" draw:text-style-name="P29" draw:layer="layout" svg:width="2.757cm" svg:height="0.839cm" svg:x="7.303cm" svg:y="12.965cm">
          <draw:text-box>
            <text:p><text:span text:style-name="T15">Решения</text:span></text:p>
          </draw:text-box>
        </draw:frame>
        <draw:frame draw:style-name="gr122" draw:text-style-name="P29" draw:layer="layout" svg:width="3.253cm" svg:height="0.878cm" svg:x="13.265cm" svg:y="12.9cm">
          <draw:text-box>
            <text:p><text:span text:style-name="T15">Ощущения</text:span></text:p>
          </draw:text-box>
        </draw:frame>
        <draw:custom-shape draw:style-name="gr123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24" draw:text-style-name="P24" draw:layer="layout" svg:width="12.593cm" svg:height="0.962cm" svg:x="7.268cm" svg:y="1.924cm">
          <draw:text-box>
            <text:p><text:span text:style-name="T13">Интеллект = Система принятия решений</text:span></text:p>
          </draw:text-box>
        </draw:frame>
        <draw:custom-shape draw:style-name="gr124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25" draw:text-style-name="P24" draw:layer="layout" svg:width="19.768cm" svg:height="0.962cm" svg:x="4.42cm" svg:y="5.018cm">
          <draw:text-box>
            <text:p><text:span text:style-name="T13">Пространство состояний и эпизодическая память (“прецеденты”)</text:span></text:p>
          </draw:text-box>
        </draw:frame>
        <draw:line draw:style-name="gr126" draw:text-style-name="P8" draw:layer="layout" svg:x1="17.7cm" svg:y1="11.781cm" svg:x2="19.27cm" svg:y2="13.686cm">
          <text:p/>
        </draw:line>
        <draw:line draw:style-name="gr126" draw:text-style-name="P8" draw:layer="layout" svg:x1="18cm" svg:y1="9.681cm" svg:x2="19.15cm" svg:y2="9.681cm">
          <text:p/>
        </draw:line>
        <draw:frame draw:style-name="gr127" draw:text-style-name="P82" draw:layer="layout" svg:width="24.13cm" svg:height="1.925cm" svg:x="1.905cm" svg:y="2.618cm">
          <draw:text-box>
            <text:p text:style-name="P81"><text:span text:style-name="T50">Модели </text:span><text:span text:style-name="T51">s</text:span><text:span text:style-name="T50"> </text:span><text:span text:style-name="T52">(“инварианты”) состояний</text:span><text:span text:style-name="T53">,</text:span><text:span text:style-name="T50"> полезности </text:span><text:span text:style-name="T51">U</text:span><text:span text:style-name="T50"> и вероятности </text:span><text:span text:style-name="T51">P</text:span><text:span text:style-name="T50"> переходов</text:span></text:p>
            <text:p text:style-name="P81"><text:span text:style-name="T51">U({s</text:span><text:span text:style-name="T54">τ</text:span><text:span text:style-name="T51">}</text:span><text:span text:style-name="T55">τ∈{-Τ,-1}​</text:span><text:span text:style-name="T56">,s’</text:span><text:span text:style-name="T55">0</text:span><text:span text:style-name="T56">) = L( </text:span><text:span text:style-name="T57">x</text:span><text:span text:style-name="T58">⋅(</text:span><text:span text:style-name="T59">y</text:span><text:span text:style-name="T60">t <text:s/></text:span><text:span text:style-name="T59">- y</text:span><text:span text:style-name="T60">t+1</text:span><text:span text:style-name="T59">), s’</text:span><text:span text:style-name="T60">t </text:span><text:span text:style-name="T59"><text:s/>- s</text:span><text:span text:style-name="T60">t</text:span><text:span text:style-name="T59">, E(a</text:span><text:span text:style-name="T60">t</text:span><text:span text:style-name="T59">)) <text:s text:c="6"/>s’</text:span><text:span text:style-name="T60">t</text:span><text:span text:style-name="T59">=argmax</text:span><text:span text:style-name="T60">s</text:span><text:span text:style-name="T59">(</text:span><text:span text:style-name="T61">U({s</text:span><text:span text:style-name="T62">τ</text:span><text:span text:style-name="T61">}</text:span><text:span text:style-name="T62">τ</text:span><text:span text:style-name="T60">∈{t-Τ,t-1}​</text:span><text:span text:style-name="T59">,s’</text:span><text:span text:style-name="T60">t</text:span><text:span text:style-name="T59">),P</text:span><text:span text:style-name="T61">({s</text:span><text:span text:style-name="T62">τ</text:span><text:span text:style-name="T61">}</text:span><text:span text:style-name="T62">τ</text:span><text:span text:style-name="T60">∈{t-Τ,t-1}​</text:span><text:span text:style-name="T59">,s’</text:span><text:span text:style-name="T60">t</text:span><text:span text:style-name="T59">)</text:span><text:span text:style-name="T63">)</text:span></text:p>
          </draw:text-box>
        </draw:frame>
        <draw:custom-shape draw:style-name="gr131" draw:text-style-name="P84" draw:layer="layout" svg:width="5.45cm" svg:height="1.27cm" svg:x="1.905cm" svg:y="0.343cm">
          <text:p text:style-name="P83"><text:span text:style-name="T47">Энергоэффективность</text:span></text:p>
          <text:p text:style-name="P83"><text:span text:style-name="T48">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32" draw:text-style-name="P84" draw:layer="layout" svg:width="3.745cm" svg:height="1.27cm" svg:x="0.265cm" svg:y="1.64cm">
          <text:p text:style-name="P83"><text:span text:style-name="T47">Предсказумость</text:span></text:p>
          <text:p text:style-name="P83"><text:span text:style-name="T48">s</text:span></text:p>
          <draw:enhanced-geometry svg:viewBox="0 0 21600 21600" draw:text-areas="800 800 20800 20800" draw:type="round-rectangular-callout" draw:modifiers="58647.517351842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33" draw:text-style-name="P84" draw:layer="layout" svg:width="4.185cm" svg:height="1.27cm" svg:x="0.26cm" svg:y="4.81cm">
          <text:p text:style-name="P83"><text:span text:style-name="T47">Удовлетворенность</text:span></text:p>
          <text:p text:style-name="P83"><text:span text:style-name="T48">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34" draw:text-style-name="P8" draw:layer="layout" svg:x1="9.53cm" svg:y1="5.019cm" svg:x2="9.53cm" svg:y2="4.384cm">
          <text:p/>
        </draw:line>
        <draw:frame draw:style-name="gr128" draw:text-style-name="P29" draw:layer="layout" svg:width="5.502cm" svg:height="0.839cm" svg:x="9.565cm" svg:y="4.345cm">
          <draw:text-box>
            <text:p><text:span text:style-name="T15">Обучение на опыте</text:span></text:p>
          </draw:text-box>
        </draw:frame>
        <draw:frame draw:style-name="gr129" draw:text-style-name="P29" draw:layer="layout" svg:width="5.426cm" svg:height="0.839cm" svg:x="16.265cm" svg:y="4.346cm">
          <draw:text-box>
            <text:p><text:span text:style-name="T15">Принятие решений</text:span></text:p>
          </draw:text-box>
        </draw:frame>
        <draw:line draw:style-name="gr34" draw:text-style-name="P8" draw:layer="layout" svg:x1="16.23cm" svg:y1="4.409cm" svg:x2="16.23cm" svg:y2="5.044cm">
          <text:p/>
        </draw:line>
        <draw:custom-shape draw:style-name="gr134" draw:text-style-name="P84" draw:layer="layout" svg:width="5.017cm" svg:height="1.27cm" svg:x="22.288cm" svg:y="0.37cm">
          <text:p text:style-name="P83"><text:span text:style-name="T47">Оптимальное решение <text:s/>и ожидание </text:span><text:span text:style-name="T48">s</text:span></text:p>
          <draw:enhanced-geometry svg:viewBox="0 0 21600 21600" draw:text-areas="800 800 20800 20800" draw:type="round-rectangular-callout" draw:modifiers="-30673.893981666 55622.974036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35" draw:text-style-name="P84" draw:layer="layout" svg:width="4.045cm" svg:height="1.27cm" svg:x="23.76cm" svg:y="1.805cm">
          <text:p text:style-name="P83"><text:span text:style-name="T47">Ожидаемая</text:span></text:p>
          <text:p text:style-name="P83"><text:span text:style-name="T47">полезность </text:span><text:span text:style-name="T48">s</text:span></text:p>
          <draw:enhanced-geometry svg:viewBox="0 0 21600 21600" draw:text-areas="800 800 20800 20800" draw:type="round-rectangular-callout" draw:modifiers="-29346.3173504696 30811.014948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36" draw:text-style-name="P84" draw:layer="layout" svg:width="3.117cm" svg:height="1.27cm" svg:x="24.188cm" svg:y="4.245cm">
          <text:p text:style-name="P83"><text:span text:style-name="T47">Ожидаемая</text:span></text:p>
          <text:p text:style-name="P83"><text:span text:style-name="T47">вероятность </text:span><text:span text:style-name="T48">s</text:span></text:p>
          <draw:enhanced-geometry svg:viewBox="0 0 21600 21600" draw:text-areas="800 800 20800 20800" draw:type="round-rectangular-callout" draw:modifiers="-17512.7645926876 -1869.39417781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37" draw:text-style-name="P86" draw:layer="layout" svg:width="8.255cm" svg:height="1.27cm" svg:x="1.035cm" svg:y="13.87cm">
          <draw:text-box>
            <text:p text:style-name="P85"><text:span text:style-name="T64">x</text:span><text:span text:style-name="T65">⋅</text:span><text:span text:style-name="T66">y</text:span><text:span text:style-name="T67">t —</text:span><text:span text:style-name="T68"> “мотивационный вектор”</text:span></text:p>
            <text:p text:style-name="P85"><text:span text:style-name="T69">V. F. Petrenko and A. P. Suprun, “Goal oriented systems, evolution, and the subjective aspect in systemology,” Tr. Inst. Sistem. Analiza RAN 62 (1) (2012)</text:span></text:p>
          </draw:text-box>
        </draw:frame>
        <draw:frame draw:style-name="gr138" draw:text-style-name="P64" draw:layer="layout" svg:width="6.722cm" svg:height="1.275cm" svg:x="21.278cm" svg:y="13.788cm">
          <draw:text-box>
            <text:p><text:span text:style-name="T35">Кластеризация <text:s/>состояний?</text:span></text:p>
            <text:p><text:span text:style-name="T35">Асинхронная их обработка?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39" draw:text-style-name="P88" draw:layer="layout" svg:width="20.955cm" svg:height="3.48cm" svg:x="2.94cm" svg:y="10.341cm">
          <text:p text:style-name="P87"><text:span text:style-name="T13"/></text:p>
          <text:p text:style-name="P87"><text:span text:style-name="T13">“Данные”</text:span></text:p>
          <text:p text:style-name="P87"><text:span text:style-name="T1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40" draw:text-style-name="P90" draw:layer="layout" svg:width="6.25cm" svg:height="1.465cm" svg:x="8.49cm" svg:y="8.875cm">
          <text:p text:style-name="P89"><text:span text:style-name="T3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41" draw:text-style-name="P90" draw:layer="layout" svg:width="6.967cm" svg:height="1.465cm" svg:x="16.165cm" svg:y="8.875cm">
          <text:p text:style-name="P89"><text:span text:style-name="T34">Invariants, Rules, Index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frame draw:style-name="gr142" draw:text-style-name="P65" draw:layer="layout" svg:width="28cm" svg:height="1.947cm" svg:x="-0.028cm" svg:y="-0.057cm">
          <draw:text-box>
            <text:p text:style-name="P35"><text:span text:style-name="T70">Обучение модели (БЯМ) </text:span><text:span text:style-name="T71">- Training/Learning</text:span></text:p>
          </draw:text-box>
        </draw:frame>
        <draw:custom-shape draw:style-name="gr143" draw:text-style-name="P91" draw:layer="layout" svg:width="16.14cm" svg:height="3.48cm" svg:x="7.755cm" svg:y="7.54cm">
          <text:p text:style-name="P87"><text:span text:style-name="T13"/></text:p>
          <text:p text:style-name="P87"><text:span text:style-name="T13">“Модель”</text:span></text:p>
          <text:p text:style-name="P87"><text:span text:style-name="T1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44" draw:text-style-name="P93" draw:layer="layout" svg:width="4.884cm" svg:height="2.653cm" draw:transform="rotate (0.70476395195531) translate (7.896cm 11.8cm)">
          <text:p text:style-name="P92"><text:span text:style-name="T72">Обучение</text:span></text:p>
          <draw:enhanced-geometry svg:viewBox="0 0 21600 21600" draw:text-areas="0 ?f0 ?f5 ?f2" draw:type="right-arrow" draw:modifiers="16218.792221085 5575.655823714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45" draw:text-style-name="P64" draw:layer="layout" svg:width="9.413cm" svg:height="0.763cm" svg:x="18.368cm" svg:y="14.158cm">
          <draw:text-box>
            <text:p><text:span text:style-name="T35">Модель замораживается после обучения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46" draw:text-style-name="P90" draw:layer="layout" svg:width="6.25cm" svg:height="1.465cm" svg:x="8.49cm" svg:y="8.875cm">
          <text:p text:style-name="P89"><text:span text:style-name="T3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47" draw:text-style-name="P90" draw:layer="layout" svg:width="6.967cm" svg:height="1.465cm" svg:x="16.165cm" svg:y="8.875cm">
          <text:p text:style-name="P89"><text:span text:style-name="T34">Invariants, Rules, Index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frame draw:style-name="gr142" draw:text-style-name="P65" draw:layer="layout" svg:width="28cm" svg:height="1.947cm" svg:x="-0.028cm" svg:y="-0.057cm">
          <draw:text-box>
            <text:p text:style-name="P39"><text:span text:style-name="T71">Использование модели (БЯМ) - Inference</text:span></text:p>
          </draw:text-box>
        </draw:frame>
        <draw:custom-shape draw:style-name="gr143" draw:text-style-name="P91" draw:layer="layout" svg:width="16.14cm" svg:height="3.48cm" svg:x="7.755cm" svg:y="7.54cm">
          <text:p text:style-name="P87"><text:span text:style-name="T13"/></text:p>
          <text:p text:style-name="P87"><text:span text:style-name="T13">“Модель”</text:span></text:p>
          <text:p text:style-name="P87"><text:span text:style-name="T1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48" draw:text-style-name="P88" draw:layer="layout" svg:width="9.79cm" svg:height="3.48cm" svg:x="14.105cm" svg:y="4.741cm">
          <text:p text:style-name="P87"><text:span text:style-name="T13">“Контекст”</text:span></text:p>
          <text:p text:style-name="P87"><text:span text:style-name="T13">Short-term memory (STM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49" draw:text-style-name="P88" draw:layer="layout" svg:width="6.616cm" svg:height="3.48cm" svg:x="17.28cm" svg:y="1.942cm">
          <text:p text:style-name="P87"><text:span text:style-name="T13">“Вопрос”</text:span></text:p>
          <text:p text:style-name="P87"><text:span text:style-name="T1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44" draw:text-style-name="P93" draw:layer="layout" svg:width="4.884cm" svg:height="2.653cm" draw:transform="rotate (0.70476395195531) translate (17.641cm 8.818cm)">
          <text:p text:style-name="P92"><text:span text:style-name="T72">Ответ</text:span></text:p>
          <draw:enhanced-geometry svg:viewBox="0 0 21600 21600" draw:text-areas="0 ?f0 ?f5 ?f2" draw:type="right-arrow" draw:modifiers="16218.792221085 5575.655823714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0" draw:text-style-name="P93" draw:layer="layout" svg:width="4.9cm" svg:height="2.643cm" draw:transform="rotate (-0.74804811740477) translate (13.079cm 5.875cm)">
          <text:p text:style-name="P92"><text:span text:style-name="T72">Вопрос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51" draw:text-style-name="P64" draw:layer="layout" svg:width="16.245cm" svg:height="1.787cm" svg:x="11.621cm" svg:y="13.135cm">
          <draw:text-box>
            <text:p><text:span text:style-name="T35">Данные не участвуют в выводе</text:span></text:p>
            <text:p><text:span text:style-name="T35">Новые данные и контексты требуют переобучения на старых и новых</text:span></text:p>
            <text:p><text:span text:style-name="T35">На это все может не хватить параметров конкретной модели <text:s text:c="3"/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39" draw:text-style-name="P88" draw:layer="layout" svg:width="20.955cm" svg:height="3.48cm" svg:x="2.94cm" svg:y="10.342cm">
          <text:p text:style-name="P87"><text:span text:style-name="T13"/></text:p>
          <text:p text:style-name="P87"><text:span text:style-name="T13">“Данные”</text:span></text:p>
          <text:p text:style-name="P87"><text:span text:style-name="T1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52" draw:text-style-name="P90" draw:layer="layout" svg:width="6.25cm" svg:height="1.465cm" svg:x="8.49cm" svg:y="8.875cm">
          <text:p text:style-name="P89"><text:span text:style-name="T3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frame draw:style-name="gr142" draw:text-style-name="P65" draw:layer="layout" svg:width="28cm" svg:height="1.947cm" svg:x="-0.028cm" svg:y="-0.057cm">
          <draw:text-box>
            <text:p text:style-name="P39"><text:span text:style-name="T71">Много-агентные модели (БЯМ+RAG/GraphRAG)</text:span></text:p>
          </draw:text-box>
        </draw:frame>
        <draw:custom-shape draw:style-name="gr153" draw:text-style-name="P91" draw:layer="layout" svg:width="8.12cm" svg:height="3.48cm" svg:x="7.755cm" svg:y="7.54cm">
          <text:p text:style-name="P87"><text:span text:style-name="T13"/></text:p>
          <text:p text:style-name="P87"><text:span text:style-name="T13">“Модель”</text:span></text:p>
          <text:p text:style-name="P87"><text:span text:style-name="T1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54" draw:text-style-name="P91" draw:layer="layout" svg:width="7.965cm" svg:height="3.48cm" svg:x="15.875cm" svg:y="7.541cm">
          <text:p text:style-name="P87"><text:span text:style-name="T13"/></text:p>
          <text:p text:style-name="P87"><text:span text:style-name="T13">“Инструментарий”</text:span></text:p>
          <text:p text:style-name="P87"><text:span text:style-name="T1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48" draw:text-style-name="P88" draw:layer="layout" svg:width="9.79cm" svg:height="3.48cm" svg:x="14.105cm" svg:y="4.741cm">
          <text:p text:style-name="P87"><text:span text:style-name="T13">“Контекст”</text:span></text:p>
          <text:p text:style-name="P87"><text:span text:style-name="T13">Short-term memory (STM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49" draw:text-style-name="P88" draw:layer="layout" svg:width="6.616cm" svg:height="3.48cm" svg:x="17.28cm" svg:y="1.942cm">
          <text:p text:style-name="P87"><text:span text:style-name="T13">“Вопрос”</text:span></text:p>
          <text:p text:style-name="P87"><text:span text:style-name="T1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55" draw:text-style-name="P93" draw:layer="layout" svg:width="3.158cm" svg:height="2.653cm" draw:transform="rotate (0.70476395195531) translate (12.956cm 7.656cm)">
          <text:p text:style-name="P92"><text:span text:style-name="T72">Ответ</text:span></text:p>
          <draw:enhanced-geometry svg:viewBox="0 0 21600 21600" draw:text-areas="0 ?f0 ?f5 ?f2" draw:type="right-arrow" draw:modifiers="13052.9914529915 6510.92690278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6" draw:text-style-name="P93" draw:layer="layout" svg:width="3.342cm" svg:height="2.644cm" draw:transform="rotate (-0.748048117404771) translate (12.521cm 5.375cm)">
          <text:p text:style-name="P92"><text:span text:style-name="T72">Вопрос</text:span></text:p>
          <draw:enhanced-geometry svg:viewBox="0 0 21600 21600" draw:mirror-horizontal="true" draw:mirror-vertical="false" draw:text-areas="0 ?f0 ?f5 ?f2" draw:type="right-arrow" draw:modifiers="13775.4113072091 6625.416036308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7" draw:text-style-name="P95" draw:layer="layout" svg:width="3.81cm" svg:height="2.175cm" svg:x="13.035cm" svg:y="8.69cm">
          <text:p text:style-name="P94"><text:span text:style-name="T45">Интеграция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custom-shape draw:style-name="gr158" draw:text-style-name="P93" draw:layer="layout" svg:width="3.342cm" svg:height="2.644cm" draw:transform="rotate (-0.748048117404771) translate (17.389cm 9.861cm)">
          <text:p text:style-name="P92"><text:span text:style-name="T72">Запрос</text:span></text:p>
          <draw:enhanced-geometry svg:viewBox="0 0 21600 21600" draw:mirror-horizontal="true" draw:mirror-vertical="false" draw:text-areas="0 ?f0 ?f5 ?f2" draw:type="right-arrow" draw:modifiers="13775.4113072091 6625.416036308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9" draw:text-style-name="P93" draw:layer="layout" svg:width="3.158cm" svg:height="2.653cm" draw:transform="rotate (0.70476395195531) translate (18.101cm 11.801cm)">
          <text:p text:style-name="P92"><text:span text:style-name="T72">Данные</text:span></text:p>
          <draw:enhanced-geometry svg:viewBox="0 0 21600 21600" draw:text-areas="0 ?f0 ?f5 ?f2" draw:type="right-arrow" draw:modifiers="13052.9914529915 6510.92690278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60" draw:text-style-name="P64" draw:layer="layout" svg:width="16.233cm" svg:height="1.275cm" svg:x="11.681cm" svg:y="13.736cm">
          <draw:text-box>
            <text:p><text:span text:style-name="T35">Данные могут подкачиваться в контекст и обновляться с его учетом </text:span></text:p>
            <text:p><text:span text:style-name="T35">Модель все равно требует переобучения с учетом новых данных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39" draw:text-style-name="P88" draw:layer="layout" svg:width="20.955cm" svg:height="3.48cm" svg:x="2.94cm" svg:y="10.342cm">
          <text:p text:style-name="P87"><text:span text:style-name="T13"/></text:p>
          <text:p text:style-name="P87"><text:span text:style-name="T13">“Данные”</text:span></text:p>
          <text:p text:style-name="P87"><text:span text:style-name="T13">Long-term Memory (LTM)</text:span></text:p>
          <text:p text:style-name="P87"><text:span text:style-name="T1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61" draw:text-style-name="P90" draw:layer="layout" svg:width="6.25cm" svg:height="1.465cm" svg:x="8.29cm" svg:y="8.875cm">
          <text:p text:style-name="P89"><text:span text:style-name="T3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frame draw:style-name="gr162" draw:text-style-name="P65" draw:layer="layout" svg:width="28.311cm" svg:height="1.947cm" svg:x="-0.183cm" svg:y="-0.057cm">
          <draw:text-box>
            <text:p text:style-name="P39"><text:span text:style-name="T71">Гибридная архитектура с долгосрочной памятью</text:span></text:p>
          </draw:text-box>
        </draw:frame>
        <draw:custom-shape draw:style-name="gr163" draw:text-style-name="P90" draw:layer="layout" svg:width="6.485cm" svg:height="2.085cm" svg:x="8.055cm" svg:y="8.455cm">
          <text:p text:style-name="P89"><text:span text:style-name="T34">Параметры модели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64" draw:text-style-name="P90" draw:layer="layout" svg:width="8.825cm" svg:height="2.085cm" svg:x="14.605cm" svg:y="8.455cm">
          <text:p text:style-name="P89"><text:span text:style-name="T34">Правила, инварианты, индексы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65" draw:text-style-name="P97" draw:layer="layout" svg:width="16.375cm" svg:height="3.48cm" svg:x="7.455cm" svg:y="7.54cm">
          <text:p text:style-name="P96"><text:span text:style-name="T73"/></text:p>
          <text:p text:style-name="P96"><text:span text:style-name="T73"/></text:p>
          <text:p text:style-name="P96"><text:span text:style-name="T73"/></text:p>
          <text:p text:style-name="P96"><text:span text:style-name="T73">“Модель” <text:s text:c="7"/></text:span></text:p>
          <text:p text:style-name="P96"><text:span text:style-name="T7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48" draw:text-style-name="P88" draw:layer="layout" svg:width="9.79cm" svg:height="3.48cm" svg:x="14.105cm" svg:y="4.741cm">
          <text:p text:style-name="P87"><text:span text:style-name="T13">“Контекст”</text:span></text:p>
          <text:p text:style-name="P87"><text:span text:style-name="T13">Short-term memory (STM)</text:span></text:p>
          <text:p text:style-name="P87"><text:span text:style-name="T1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49" draw:text-style-name="P88" draw:layer="layout" svg:width="6.616cm" svg:height="3.48cm" svg:x="17.28cm" svg:y="1.942cm">
          <text:p text:style-name="P87"><text:span text:style-name="T13">“Вопрос”</text:span></text:p>
          <text:p text:style-name="P87"><text:span text:style-name="T13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custom-shape draw:style-name="gr159" draw:text-style-name="P93" draw:layer="layout" svg:width="3.158cm" svg:height="2.653cm" draw:transform="rotate (0.70476395195531) translate (13.971cm 8.548cm)">
          <text:p text:style-name="P92"><text:span text:style-name="T72">Ответ</text:span></text:p>
          <draw:enhanced-geometry svg:viewBox="0 0 21600 21600" draw:text-areas="0 ?f0 ?f5 ?f2" draw:type="right-arrow" draw:modifiers="13052.9914529915 6510.92690278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8" draw:text-style-name="P93" draw:layer="layout" svg:width="3.342cm" svg:height="2.644cm" draw:transform="rotate (-0.748048117404771) translate (13.536cm 6.267cm)">
          <text:p text:style-name="P92"><text:span text:style-name="T72">Вопрос</text:span></text:p>
          <draw:enhanced-geometry svg:viewBox="0 0 21600 21600" draw:mirror-horizontal="true" draw:mirror-vertical="false" draw:text-areas="0 ?f0 ?f5 ?f2" draw:type="right-arrow" draw:modifiers="13775.4113072091 6625.416036308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7" draw:text-style-name="P95" draw:layer="layout" svg:width="3.81cm" svg:height="2.175cm" draw:transform="rotate (0.74490652475118) translate (16.278cm 12.055cm)">
          <text:p text:style-name="P94"><text:span text:style-name="T45">Индексация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custom-shape draw:style-name="gr157" draw:text-style-name="P95" draw:layer="layout" svg:width="3.81cm" svg:height="2.175cm" draw:transform="rotate (0.74490652475118) translate (7.078cm 12.055cm)">
          <text:p text:style-name="P94"><text:span text:style-name="T45">Дообучение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frame draw:style-name="gr166" draw:text-style-name="P64" draw:layer="layout" svg:width="23.639cm" svg:height="1.275cm" svg:x="4.482cm" svg:y="13.738cm">
          <draw:text-box>
            <text:p><text:span text:style-name="T35">Возможно инкрементальное “дообучение” на динамически пополняющихся данных <text:s text:c="3"/></text:span></text:p>
            <text:p><text:span text:style-name="T35">Динамически обновляющиеся данные могут инкреметально обновлять соотвествующие “инварианты” <text:s/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167" draw:text-style-name="P24" draw:layer="layout" svg:width="27.252cm" svg:height="0.878cm" svg:x="0.47cm" svg:y="14.005cm">
          <draw:text-box>
            <text:p><text:span text:style-name="T45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168" draw:text-style-name="P98" draw:layer="layout" svg:width="5.715cm" svg:height="3.175cm" svg:x="15.675cm" svg:y="9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99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00" draw:layer="layout" svg:width="5.521cm" svg:height="3.175cm" svg:x="6.0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01" draw:layer="layout" svg:width="2.911cm" svg:height="1.943cm" svg:x="11.03cm" svg:y="11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02" draw:layer="layout" svg:width="2.54cm" svg:height="1.943cm" svg:x="13.705cm" svg:y="11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text-style-name="P103" draw:layer="layout" svg:width="2.434cm" svg:height="1.427cm" svg:x="13.841cm" svg:y="11.875cm">
          <draw:text-box>
            <text:p><text:span text:style-name="T48">Сигналы </text:span></text:p>
            <text:p><text:span text:style-name="T48">“с поля”</text:span></text:p>
          </draw:text-box>
        </draw:frame>
        <draw:line draw:style-name="gr34" draw:text-style-name="P8" draw:layer="layout" svg:x1="12.6cm" svg:y1="10.695cm" svg:x2="12.6cm" svg:y2="11.965cm">
          <text:p/>
        </draw:line>
        <draw:frame draw:style-name="gr174" draw:text-style-name="P103" draw:layer="layout" svg:width="2.911cm" svg:height="1.427cm" svg:x="11.094cm" svg:y="11.838cm">
          <draw:text-box>
            <text:p><text:span text:style-name="T48">Управляющие </text:span></text:p>
            <text:p><text:span text:style-name="T48">воздействия</text:span></text:p>
          </draw:text-box>
        </draw:frame>
        <draw:path draw:style-name="gr175" draw:text-style-name="P8" draw:layer="layout" svg:width="8.036cm" svg:height="4.878cm" draw:transform="skewX (4.75017719560125E-017) rotate (-0.348716784548467) translate (14.6074497680668cm 2.19459763115895cm)" svg:viewBox="0 0 8037 4879" svg:d="M0 1043c8471-3755 8033 3836 8033 3836">
          <text:p/>
        </draw:path>
        <draw:frame draw:style-name="gr176" draw:text-style-name="P105" draw:layer="layout" svg:width="7.51cm" svg:height="3.851cm" svg:x="20.49cm" svg:y="9.225cm">
          <draw:text-box>
            <text:p><text:span text:style-name="T74">Programmable logic</text:span></text:p>
            <text:p text:style-name="P104"><text:span text:style-name="T75">IEC 61131 </text:span><text:span text:style-name="T76">(synchronous)</text:span></text:p>
            <text:p text:style-name="P104"><text:span text:style-name="T75">IEC 61499 </text:span><text:span text:style-name="T77">(asynchronous)</text:span></text:p>
          </draw:text-box>
        </draw:frame>
        <draw:frame draw:style-name="gr177" draw:text-style-name="P40" draw:layer="layout" svg:width="28cm" svg:height="2.672cm" svg:x="0.003cm" svg:y="-0.141cm">
          <draw:text-box>
            <text:p text:style-name="P39"><text:span text:style-name="T71">Применение – Use case:</text:span></text:p>
            <text:p text:style-name="P39"><text:span text:style-name="T21">A) Промышленная автоматизация АСУ ТП - APCS</text:span></text:p>
          </draw:text-box>
        </draw:frame>
        <draw:line draw:style-name="gr178" draw:text-style-name="P8" draw:layer="layout" svg:x1="7.92cm" svg:y1="10.495cm" svg:x2="9.825cm" svg:y2="11.765cm">
          <text:p/>
        </draw:line>
        <draw:line draw:style-name="gr178" draw:text-style-name="P8" draw:layer="layout" svg:x1="9.825cm" svg:y1="10.495cm" svg:x2="7.92cm" svg:y2="11.765cm">
          <text:p/>
        </draw:line>
        <draw:frame draw:style-name="gr179" draw:text-style-name="P106" draw:layer="layout" svg:width="3.81cm" svg:height="1.905cm" svg:x="6.985cm" svg:y="10.174cm">
          <draw:text-box>
            <text:p text:style-name="P39">“Black-box”</text:p>
            <text:p text:style-name="P39"><text:span text:style-name="T78">AI</text:span></text:p>
          </draw:text-box>
        </draw:frame>
        <draw:line draw:style-name="gr34" draw:text-style-name="P8" draw:layer="layout" svg:x1="14.9cm" svg:y1="11.94cm" svg:x2="14.9cm" svg:y2="10.67cm">
          <text:p/>
        </draw:line>
        <draw:line draw:style-name="gr34" draw:text-style-name="P8" draw:layer="layout" svg:x1="11.3cm" svg:y1="4.196cm" svg:x2="11.3cm" svg:y2="5.466cm">
          <text:p/>
        </draw:line>
        <draw:line draw:style-name="gr34" draw:text-style-name="P8" draw:layer="layout" svg:x1="13.6cm" svg:y1="5.441cm" svg:x2="13.6cm" svg:y2="4.171cm">
          <text:p/>
        </draw:line>
        <draw:frame draw:style-name="gr180" draw:text-style-name="P64" draw:layer="layout" svg:width="4.128cm" svg:height="0.763cm" svg:x="1.077cm" svg:y="4.44cm">
          <draw:text-box>
            <text:p><text:span text:style-name="T35">Верхний уровень</text:span></text:p>
          </draw:text-box>
        </draw:frame>
        <draw:frame draw:style-name="gr180" draw:text-style-name="P64" draw:layer="layout" svg:width="4.128cm" svg:height="0.763cm" svg:x="1.077cm" svg:y="4.441cm">
          <draw:text-box>
            <text:p><text:span text:style-name="T35">Верхний уровень</text:span></text:p>
          </draw:text-box>
        </draw:frame>
        <draw:frame draw:style-name="gr181" draw:text-style-name="P64" draw:layer="layout" svg:width="4cm" svg:height="0.763cm" svg:x="1.077cm" svg:y="10.741cm">
          <draw:text-box>
            <text:p><text:span text:style-name="T35">Нижний уровень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82" draw:text-style-name="P102" draw:layer="layout" svg:width="14.605cm" svg:height="12.7cm" svg:x="12.06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7" draw:text-style-name="P40" draw:layer="layout" svg:width="28cm" svg:height="2.672cm" svg:x="0.003cm" svg:y="-0.141cm">
          <draw:text-box>
            <text:p text:style-name="P39"><text:span text:style-name="T71">Применение – Use case:</text:span></text:p>
            <text:p text:style-name="P39"><text:span text:style-name="T21">B) Виртуальная игровая среда OpenAI Gym (Atari Breakout)</text:span></text:p>
          </draw:text-box>
        </draw:frame>
        <draw:g draw:style-name="gr11">
          <draw:frame draw:style-name="gr183" draw:text-style-name="P107" draw:layer="layout" svg:width="10.98cm" svg:height="7.974cm" svg:x="13.915cm" svg:y="3.021cm">
            <draw:image xlink:href="Pictures/10000001000006A4000004F6415F8BBE.png" xlink:type="simple" xlink:show="embed" xlink:actuate="onLoad" draw:mime-type="image/png">
              <text:p/>
            </draw:image>
          </draw:frame>
          <draw:line draw:style-name="gr184" draw:text-style-name="P8" draw:layer="layout" svg:x1="16.058cm" svg:y1="9.504cm" svg:x2="14.515cm" svg:y2="7.591cm">
            <text:p/>
          </draw:line>
          <draw:line draw:style-name="gr185" draw:text-style-name="P8" draw:layer="layout" svg:x1="15.883cm" svg:y1="6.151cm" svg:x2="14.515cm" svg:y2="7.592cm">
            <text:p/>
          </draw:line>
        </draw:g>
        <draw:custom-shape draw:style-name="gr186" draw:text-style-name="P68" draw:layer="layout" svg:width="8.344cm" svg:height="8.01cm" svg:x="0.635cm" svg:y="5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108" draw:layer="layout" svg:width="4.186cm" svg:height="1.826cm" svg:x="2.728cm" svg:y="5.412cm">
          <draw:text-box>
            <text:p><text:span text:style-name="T79">Agent</text:span></text:p>
          </draw:text-box>
        </draw:frame>
        <draw:custom-shape draw:style-name="gr188" draw:text-style-name="P109" draw:layer="layout" svg:width="5.08cm" svg:height="4.41cm" svg:x="6.985cm" svg:y="4.275cm">
          <text:p text:style-name="P39">Правила</text:p>
          <text:p text:style-name="P39">вознаграж-ден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102" draw:layer="layout" svg:width="2.086cm" svg:height="1.388cm" svg:x="0.635cm" svg:y="15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101" draw:layer="layout" svg:width="8.255cm" svg:height="2.754cm" svg:x="15.04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1" draw:text-style-name="P110" draw:layer="layout" svg:width="1.905cm" svg:height="0.962cm" svg:x="20.475cm" svg:y="13.172cm">
          <draw:text-box>
            <text:p text:style-name="P39">Right</text:p>
          </draw:text-box>
        </draw:frame>
        <draw:frame draw:style-name="gr191" draw:text-style-name="P110" draw:layer="layout" svg:width="1.905cm" svg:height="0.962cm" svg:x="18.276cm" svg:y="13.172cm">
          <draw:text-box>
            <text:p text:style-name="P39">Fire</text:p>
          </draw:text-box>
        </draw:frame>
        <draw:frame draw:style-name="gr191" draw:text-style-name="P110" draw:layer="layout" svg:width="1.905cm" svg:height="0.962cm" svg:x="16.077cm" svg:y="13.172cm">
          <draw:text-box>
            <text:p text:style-name="P39">Left</text:p>
          </draw:text-box>
        </draw:frame>
        <draw:custom-shape draw:style-name="gr192" draw:text-style-name="P100" draw:layer="layout" svg:width="5.08cm" svg:height="5.08cm" svg:x="1.334cm" svg:y="7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98" draw:layer="layout" svg:width="5.08cm" svg:height="5.08cm" svg:x="3.175cm" svg:y="7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8" draw:layer="layout" svg:x1="12.7cm" svg:y1="7.62cm" svg:x2="6.414cm" svg:y2="8.89cm">
          <text:p/>
        </draw:line>
        <draw:line draw:style-name="gr194" draw:text-style-name="P8" draw:layer="layout" svg:x1="6.35cm" svg:y1="10.795cm" svg:x2="15.04cm" svg:y2="13.335cm">
          <text:p/>
        </draw:line>
        <draw:frame draw:style-name="gr195" draw:text-style-name="P15" draw:layer="layout" svg:width="3.313cm" svg:height="1.673cm" svg:x="3.175cm" svg:y="8.99cm">
          <draw:text-box>
            <text:p>Модель и</text:p>
            <text:p>Политика</text:p>
          </draw:text-box>
        </draw:frame>
        <draw:frame draw:style-name="gr196" draw:text-style-name="P106" draw:layer="layout" svg:width="4.666cm" svg:height="1.673cm" svg:x="8.055cm" svg:y="8.59cm">
          <draw:text-box>
            <text:p text:style-name="P39">Наблюдения</text:p>
            <text:p text:style-name="P39">(Observations)</text:p>
          </draw:text-box>
        </draw:frame>
        <draw:frame draw:style-name="gr197" draw:text-style-name="P106" draw:layer="layout" svg:width="3.284cm" svg:height="1.673cm" svg:x="8.434cm" svg:y="12.1cm">
          <draw:text-box>
            <text:p text:style-name="P39">Действия</text:p>
            <text:p text:style-name="P39">(Actions)</text:p>
          </draw:text-box>
        </draw:frame>
        <draw:custom-shape draw:style-name="gr198" draw:text-style-name="P111" draw:layer="layout" svg:width="1.27cm" svg:height="0.635cm" svg:x="20.81cm" svg:y="12.3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8" draw:text-style-name="P111" draw:layer="layout" svg:width="1.27cm" svg:height="0.635cm" svg:x="16.411cm" svg:y="12.36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9" draw:text-style-name="P111" draw:layer="layout" svg:width="0.635cm" svg:height="1.27cm" svg:x="18.85cm" svg:y="11.8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1">
        <office:forms form:automatic-focus="false" form:apply-design-mode="false"/>
        <draw:frame draw:style-name="gr14" draw:text-style-name="P8" draw:layer="layout" svg:width="10.995cm" svg:height="12.308cm" svg:x="15.875cm" svg:y="2.131cm">
          <draw:image xlink:href="Pictures/10000001000006AC00000778427EFF4E.png" xlink:type="simple" xlink:show="embed" xlink:actuate="onLoad" draw:mime-type="image/png">
            <text:p/>
          </draw:image>
        </draw:frame>
        <draw:custom-shape draw:style-name="gr200" draw:text-style-name="P68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201" draw:text-style-name="P113" draw:layer="layout" svg:width="3.223cm" svg:height="1.429cm" svg:x="6.234cm" svg:y="11.523cm">
            <text:list text:style-name="L5">
              <text:list-header>
                <text:p text:style-name="P112"><text:span text:style-name="T80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02" draw:text-style-name="P113" draw:layer="layout" svg:width="3.223cm" svg:height="1.462cm" svg:x="6.234cm" svg:y="10.678cm">
            <text:list text:style-name="L5">
              <text:list-header>
                <text:p text:style-name="P112"><text:span text:style-name="T80"/></text:p>
              </text:list-header>
              <text:list-item>
                <text:p text:style-name="P112"><text:span text:style-name="T80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03" draw:text-style-name="P113" draw:layer="layout" svg:width="3.226cm" svg:height="1.494cm" svg:x="6.234cm" svg:y="9.833cm">
            <text:list text:style-name="L5">
              <text:list-header>
                <text:p text:style-name="P112"><text:span text:style-name="T80"/></text:p>
              </text:list-header>
              <text:list-item>
                <text:p text:style-name="P112"><text:span text:style-name="T80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04" draw:text-style-name="P115" draw:layer="layout" svg:width="3.226cm" svg:height="1.462cm" svg:x="6.234cm" svg:y="9.054cm">
            <text:list text:style-name="L5">
              <text:list-header>
                <text:p text:style-name="P114"><text:span text:style-name="T80"/></text:p>
              </text:list-header>
              <text:list-item>
                <text:p text:style-name="P114"><text:span text:style-name="T80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</draw:g>
        <draw:custom-shape draw:style-name="gr205" draw:text-style-name="P117" draw:layer="layout" svg:width="1.302cm" svg:height="1.3cm" svg:x="3.922cm" svg:y="10.068cm">
          <text:list text:style-name="L5">
            <text:list-header>
              <text:p text:style-name="P116"><text:span text:style-name="T81">Pre-</text:span></text:p>
            </text:list-header>
            <text:list-item>
              <text:p text:style-name="P116"><text:span text:style-name="T81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18" draw:layer="layout" svg:width="1.333cm" svg:height="1.328cm" svg:x="3.891cm" svg:y="11.543cm">
          <text:list text:style-name="L5">
            <text:list-header>
              <text:p text:style-name="P116"><text:span text:style-name="T81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19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208" draw:text-style-name="P119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209" draw:text-style-name="P119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210" draw:text-style-name="P119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211" draw:text-style-name="P119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212" draw:text-style-name="P120" draw:layer="layout" svg:width="1.302cm" svg:height="1.299cm" svg:x="3.922cm" svg:y="8.567cm">
          <text:list text:style-name="L5">
            <text:list-header>
              <text:p text:style-name="P116"><text:span text:style-name="T81">Comp-</text:span></text:p>
            </text:list-header>
            <text:list-item>
              <text:p text:style-name="P116"><text:span text:style-name="T81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9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214" draw:text-style-name="P119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215" draw:text-style-name="P119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216" draw:text-style-name="P121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frame draw:style-name="gr187" draw:text-style-name="P108" draw:layer="layout" svg:width="4.186cm" svg:height="1.826cm" svg:x="4.67cm" svg:y="7.105cm">
          <draw:text-box>
            <text:p><text:span text:style-name="T79">Agent</text:span></text:p>
          </draw:text-box>
        </draw:frame>
        <draw:custom-shape draw:style-name="gr217" draw:text-style-name="P119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218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122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123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21" draw:text-style-name="P8" draw:layer="layout" svg:width="3.799cm" svg:height="2.125cm" draw:transform="skewX (0.0132645023151569) rotate (2.30400914555771) translate (4.62241150063389cm 6.41092364534372cm)" svg:viewBox="0 0 3800 2126" draw:points="1664,13 3787,0 3800,2126 0,2126">
          <text:p/>
        </draw:polyline>
        <draw:custom-shape draw:style-name="gr222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122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123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21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223" draw:text-style-name="P125" draw:layer="layout" svg:width="3.259cm" svg:height="1.569cm" svg:x="1.967cm" svg:y="5.479cm">
          <text:p text:style-name="P124"><text:span text:style-name="T82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24" draw:text-style-name="P125" draw:layer="layout" svg:width="3.464cm" svg:height="1.098cm" svg:x="5.326cm" svg:y="5.715cm">
          <text:p text:style-name="P124"><text:span text:style-name="T82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126" draw:layer="layout" svg:width="3.259cm" svg:height="1.569cm" svg:x="8.945cm" svg:y="5.48cm">
          <text:p text:style-name="P124"><text:span text:style-name="T82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polyline draw:style-name="gr226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227" draw:text-style-name="P127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28" draw:text-style-name="P106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605D9169.png" xlink:type="simple" xlink:show="embed" xlink:actuate="onLoad" draw:mime-type="image/png"/>
        </draw:frame>
        <draw:frame draw:style-name="gr229" draw:text-style-name="P128" draw:layer="layout" svg:width="2.301cm" svg:height="0.962cm" svg:x="5.983cm" svg:y="2.499cm">
          <draw:text-box>
            <text:p><text:span text:style-name="T83">Sad(t)</text:span></text:p>
          </draw:text-box>
        </draw:frame>
        <draw:frame draw:style-name="gr230" draw:text-style-name="P129" draw:layer="layout" svg:width="3.077cm" svg:height="0.962cm" svg:x="10.911cm" svg:y="2.499cm">
          <draw:text-box>
            <text:p><text:span text:style-name="T84">Happy(t)</text:span></text:p>
          </draw:text-box>
        </draw:frame>
        <draw:polyline draw:style-name="gr226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231" draw:text-style-name="P24" draw:layer="layout" svg:width="3.254cm" svg:height="3.806cm" svg:x="10.434cm" svg:y="8.381cm">
          <draw:text-box>
            <text:p><text:span text:style-name="T13">Xball(t)</text:span></text:p>
            <text:p><text:span text:style-name="T13">Yball(t)</text:span></text:p>
            <text:p><text:span text:style-name="T13">Xracket(t)</text:span></text:p>
            <text:p><text:span text:style-name="T13">Sad(t)</text:span></text:p>
            <text:p><text:span text:style-name="T13">Happy(t)</text:span></text:p>
          </draw:text-box>
        </draw:frame>
        <draw:frame draw:style-name="gr232" draw:text-style-name="P24" draw:layer="layout" svg:width="2.654cm" svg:height="0.962cm" svg:x="10.311cm" svg:y="11.906cm">
          <draw:text-box>
            <text:p><text:span text:style-name="T13">Move(t)</text:span></text:p>
          </draw:text-box>
        </draw:frame>
        <draw:frame draw:style-name="gr233" draw:text-style-name="P76" draw:layer="layout" svg:width="3.242cm" svg:height="0.814cm" svg:x="6.317cm" svg:y="8.979cm">
          <draw:text-box>
            <text:p><text:span text:style-name="T85">Predicates</text:span></text:p>
          </draw:text-box>
        </draw:frame>
        <draw:frame draw:style-name="gr234" draw:text-style-name="P130" draw:layer="layout" svg:width="7.787cm" svg:height="2.147cm" svg:x="1.965cm" svg:y="13.105cm">
          <draw:text-box>
            <text:p><text:span text:style-name="T86">А.Г.Колонин, В.Г.Крюков:</text:span></text:p>
            <text:p><text:span text:style-name="T86">Вычислительная концепция психики,</text:span></text:p>
            <text:p><text:span text:style-name="T86">Статья подана на конференцию</text:span></text:p>
            <text:p><text:span text:style-name="T86">Нейроинформатика-25</text:span></text:p>
          </draw:text-box>
        </draw:frame>
        <draw:frame draw:style-name="gr235" draw:text-style-name="P131" draw:layer="layout" svg:width="27.94cm" svg:height="2.021cm" svg:x="0cm" svg:y="0cm">
          <draw:text-box>
            <text:p text:style-name="P35"><text:span text:style-name="T87">Когнитивная архитектура на графах последовательных состояний</text:span></text:p>
            <text:p text:style-name="P35"><text:span text:style-name="T88">State-based History-aware Artificial Reinforcement Intelligence Kernel (</text:span><text:span text:style-name="T89">Sharik</text:span><text:span text:style-name="T88">)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6" presentation:class="page"/>
          <draw:frame presentation:style-name="pr3" draw:text-style-name="P1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1T0" presentation:use-footer-name="ftr1">
        <office:forms form:automatic-focus="false" form:apply-design-mode="false"/>
        <draw:custom-shape draw:style-name="gr236" draw:text-style-name="P134" draw:layer="layout" svg:width="28.4cm" svg:height="1.723cm" svg:x="-0.4cm" svg:y="0.031cm">
          <text:list text:style-name="L1">
            <text:list-header>
              <text:p text:style-name="P133"><text:span text:style-name="T71">Играем в “1 player Ping-Pong” – уровень пикселей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136" xml:id="id21" draw:id="id21" draw:layer="layout" svg:width="1.69cm" svg:height="0.923cm" svg:x="10.008cm" svg:y="6.948cm">
          <text:p text:style-name="P135"><text:span text:style-name="T90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136" xml:id="id22" draw:id="id22" draw:layer="layout" svg:width="1.792cm" svg:height="0.923cm" svg:x="13.634cm" svg:y="6.948cm">
          <text:p text:style-name="P135"><text:span text:style-name="T90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36" xml:id="id20" draw:id="id20" draw:layer="layout" svg:width="2.634cm" svg:height="0.923cm" svg:x="11.388cm" svg:y="5.776cm">
          <text:p text:style-name="P135"><text:span text:style-name="T90">Horizon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136" xml:id="id29" draw:id="id29" draw:layer="layout" svg:width="2.63cm" svg:height="0.923cm" svg:x="5.657cm" svg:y="2.925cm">
          <text:p text:style-name="P135"><text:span text:style-name="T90">Pix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36" xml:id="id23" draw:id="id23" draw:layer="layout" svg:width="2.166cm" svg:height="0.923cm" svg:x="15.864cm" svg:y="4.442cm">
          <text:p text:style-name="P135"><text:span text:style-name="T90">Boole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11.773cm" svg:y1="6.564cm" svg:x2="10.853cm" svg:y2="6.948cm" draw:start-shape="id20" draw:start-glue-point="7" draw:end-shape="id21" draw:end-glue-point="4" svg:d="M11773 6564c0 388-920 197-920 384" svg:viewBox="0 0 921 385">
          <text:p/>
        </draw:connector>
        <draw:connector draw:style-name="gr242" draw:text-style-name="P8" draw:layer="layout" draw:type="curve" svg:x1="13.637cm" svg:y1="6.564cm" svg:x2="14.53cm" svg:y2="6.948cm" draw:start-shape="id20" draw:start-glue-point="9" draw:end-shape="id22" draw:end-glue-point="4" svg:d="M13637 6564c0 388 893 197 893 384" svg:viewBox="0 0 894 385">
          <text:p/>
        </draw:connector>
        <draw:custom-shape draw:style-name="gr241" draw:text-style-name="P136" xml:id="id26" draw:id="id26" draw:layer="layout" svg:width="2.166cm" svg:height="0.923cm" svg:x="12.937cm" svg:y="3.225cm">
          <text:p text:style-name="P135"><text:span text:style-name="T90">M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136" xml:id="id25" draw:id="id25" draw:layer="layout" svg:width="1.458cm" svg:height="0.923cm" svg:x="15.415cm" svg:y="5.601cm">
          <text:p text:style-name="P135"><text:span text:style-name="T90">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136" xml:id="id24" draw:id="id24" draw:layer="layout" svg:width="1.247cm" svg:height="0.923cm" svg:x="17.097cm" svg:y="5.601cm">
          <text:p text:style-name="P135"><text:span text:style-name="T90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16.947cm" svg:y1="5.365cm" svg:x2="17.721cm" svg:y2="5.601cm" draw:start-shape="id23" draw:start-glue-point="8" draw:end-shape="id24" draw:end-glue-point="4" svg:d="M16947 5365c0 177 774 59 774 236" svg:viewBox="0 0 775 237">
          <text:p/>
        </draw:connector>
        <draw:connector draw:style-name="gr242" draw:text-style-name="P8" draw:layer="layout" draw:type="curve" svg:x1="16.947cm" svg:y1="5.365cm" svg:x2="16.144cm" svg:y2="5.601cm" draw:start-shape="id23" draw:start-glue-point="8" draw:end-shape="id25" draw:end-glue-point="4" svg:d="M16947 5365c0 177-803 59-803 236" svg:viewBox="0 0 804 237">
          <text:p/>
        </draw:connector>
        <draw:connector draw:style-name="gr245" draw:text-style-name="P8" draw:layer="layout" draw:type="curve" svg:x1="14.02cm" svg:y1="4.148cm" svg:x2="12.705cm" svg:y2="5.776cm" draw:start-shape="id26" draw:start-glue-point="8" draw:end-shape="id20" draw:end-glue-point="4" svg:d="M14020 4148c0 1221-1315 407-1315 1628" svg:viewBox="0 0 1316 1629">
          <text:p/>
        </draw:connector>
        <draw:connector draw:style-name="gr246" draw:text-style-name="P8" draw:layer="layout" draw:type="curve" draw:line-skew="0.704cm" svg:x1="20.039cm" svg:y1="6.726cm" svg:x2="12.766cm" svg:y2="2.154cm" draw:start-shape="id27" draw:start-glue-point="4" draw:end-shape="id28" draw:end-glue-point="11" svg:d="M20039 6726c0-6757-7273-4472-7273-4572" svg:viewBox="0 0 7274 4867">
          <text:p/>
        </draw:connector>
        <draw:frame draw:style-name="gr247" draw:text-style-name="P105" draw:layer="layout" svg:width="6.66cm" svg:height="3.083cm" svg:x="18.513cm" svg:y="5.974cm">
          <draw:text-box>
            <text:p><text:span text:style-name="T74">statement := </text:span></text:p>
            <text:p><text:span text:style-name="T74">predicate(argument) </text:span></text:p>
          </draw:text-box>
        </draw:frame>
        <draw:custom-shape draw:style-name="gr248" draw:text-style-name="P136" xml:id="id28" draw:id="id28" draw:layer="layout" svg:width="2.43cm" svg:height="0.923cm" svg:x="10.691cm" svg:y="2.019cm">
          <text:p text:style-name="P135"><text:span text:style-name="T90">predi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10.691cm" svg:y1="2.481cm" svg:x2="6.972cm" svg:y2="2.925cm" draw:start-shape="id28" draw:start-glue-point="6" draw:end-shape="id29" draw:end-glue-point="4" svg:d="M10691 2481c-1801 0-1500-29-1980-106s-1739-203-1739 550" svg:viewBox="0 0 3720 610">
          <text:p/>
        </draw:connector>
        <draw:frame draw:style-name="gr249" draw:text-style-name="P137" draw:layer="layout" svg:width="4.16cm" svg:height="3.806cm" svg:x="3.584cm" svg:y="11.24cm">
          <draw:text-box>
            <text:p text:style-name="P75"><text:span text:style-name="T34">Pixel(1,0)</text:span></text:p>
            <text:p text:style-name="P75"><text:span text:style-name="T34">Pixel(4,1)</text:span></text:p>
            <text:p><text:span text:style-name="T34">Happy(False)</text:span></text:p>
            <text:p text:style-name="P75"><text:span text:style-name="T34">=&gt; </text:span></text:p>
            <text:p><text:span text:style-name="T91">Move(Left)</text:span></text:p>
          </draw:text-box>
        </draw:frame>
        <draw:custom-shape draw:style-name="gr250" draw:text-style-name="P138" draw:layer="layout" svg:width="0.827cm" svg:height="0.615cm" svg:x="8.031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51" draw:text-style-name="P8" draw:layer="layout" svg:width="4.563cm" svg:height="2.854cm" svg:x="14.454cm" svg:y="8.315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122" draw:layer="layout" svg:width="1.03cm" svg:height="0.142cm" svg:x="17.379cm" svg:y="11.098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39" draw:layer="layout" svg:width="0.441cm" svg:height="0.428cm" svg:x="17.674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4" draw:text-style-name="P8" draw:layer="layout" svg:width="2.89cm" svg:height="1.952cm" draw:transform="skewX (0.0303687289847015) rotate (2.31273579181769) translate (16.3993789202359cm 11.7211976392956cm)" svg:viewBox="0 0 2891 1953" draw:points="932,12 2880,0 2891,1953 0,1870">
          <text:p/>
        </draw:polyline>
        <draw:custom-shape draw:style-name="gr255" draw:text-style-name="P8" draw:layer="layout" svg:width="4.573cm" svg:height="2.854cm" svg:x="8.923cm" svg:y="8.297cm">
          <text:p/>
          <draw:enhanced-geometry svg:viewBox="0 0 21600 21600" draw:type="rectangle" draw:enhanced-path="M 0 0 L 21600 0 21600 21600 0 21600 0 0 Z N"/>
        </draw:custom-shape>
        <draw:custom-shape draw:style-name="gr256" draw:text-style-name="P122" draw:layer="layout" svg:width="1.032cm" svg:height="0.144cm" svg:x="10.306cm" svg:y="11.088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39" draw:layer="layout" svg:width="0.442cm" svg:height="0.428cm" svg:x="10.614cm" svg:y="8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4" draw:text-style-name="P8" draw:layer="layout" svg:width="1.958cm" svg:height="2.012cm" draw:transform="skewX (0.0307177948351003) rotate (2.31273579181769) translate (10.2388722015873cm 11.0165653857327cm)" svg:viewBox="0 0 1959 2013" draw:points="0,13 1947,0 1959,1953 1360,2013">
          <text:p/>
        </draw:polyline>
        <draw:custom-shape draw:style-name="gr257" draw:text-style-name="P8" draw:layer="layout" svg:width="4.581cm" svg:height="2.854cm" svg:x="3.393cm" svg:y="8.297cm">
          <text:p/>
          <draw:enhanced-geometry svg:viewBox="0 0 21600 21600" draw:type="rectangle" draw:enhanced-path="M 0 0 L 21600 0 21600 21600 0 21600 0 0 Z N"/>
        </draw:custom-shape>
        <draw:custom-shape draw:style-name="gr258" draw:text-style-name="P122" draw:layer="layout" svg:width="1.029cm" svg:height="0.142cm" svg:x="3.971cm" svg:y="11.081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39" draw:layer="layout" svg:width="0.441cm" svg:height="0.428cm" svg:x="3.628cm" svg:y="9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4" draw:text-style-name="P8" draw:layer="layout" svg:width="1.946cm" svg:height="0.567cm" draw:transform="skewX (0.0305432619099008) rotate (2.31221219304209) translate (4.70793407329018cm 11.0172842637408cm)" svg:viewBox="0 0 1947 568" draw:points="0,14 1947,0 1947,0 1905,568">
          <text:p/>
        </draw:polyline>
        <draw:custom-shape draw:style-name="gr250" draw:text-style-name="P138" draw:layer="layout" svg:width="0.827cm" svg:height="0.615cm" svg:x="13.553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59" draw:text-style-name="P8" draw:layer="layout" svg:width="4.564cm" svg:height="2.854cm" svg:x="20.039cm" svg:y="8.306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122" draw:layer="layout" svg:width="1.03cm" svg:height="0.144cm" svg:x="22.19cm" svg:y="11.088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39" draw:layer="layout" svg:width="0.442cm" svg:height="0.428cm" svg:x="23.183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138" draw:layer="layout" svg:width="0.828cm" svg:height="0.615cm" svg:x="19.091cm" svg:y="9.4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49" draw:text-style-name="P137" draw:layer="layout" svg:width="4.16cm" svg:height="3.806cm" svg:x="9.314cm" svg:y="11.241cm">
          <draw:text-box>
            <text:p text:style-name="P75"><text:span text:style-name="T34">Pixel(0,2)</text:span></text:p>
            <text:p text:style-name="P75"><text:span text:style-name="T34">Pixel(4,2)</text:span></text:p>
            <text:p><text:span text:style-name="T34">Happy(False)</text:span></text:p>
            <text:p text:style-name="P75"><text:span text:style-name="T34">=&gt; </text:span></text:p>
            <text:p><text:span text:style-name="T91">Move(Right)</text:span></text:p>
          </draw:text-box>
        </draw:frame>
        <draw:frame draw:style-name="gr249" draw:text-style-name="P137" draw:layer="layout" svg:width="4.16cm" svg:height="3.806cm" svg:x="14.812cm" svg:y="11.241cm">
          <draw:text-box>
            <text:p text:style-name="P75"><text:span text:style-name="T34">Pixel(3,4)</text:span></text:p>
            <text:p text:style-name="P75"><text:span text:style-name="T34">Pixel(4,4)</text:span></text:p>
            <text:p><text:span text:style-name="T34">Happy(False)</text:span></text:p>
            <text:p text:style-name="P75"><text:span text:style-name="T34">=&gt; </text:span></text:p>
            <text:p><text:span text:style-name="T91">Move(Left)</text:span></text:p>
          </draw:text-box>
        </draw:frame>
        <draw:polyline draw:style-name="gr254" draw:text-style-name="P8" draw:layer="layout" svg:width="3.134cm" svg:height="4.239cm" draw:transform="skewX (0.0183259571459404) rotate (-1.2632693125935) translate (23.85817750933cm 7.6072647777575cm)" svg:viewBox="0 0 3135 4240" draw:points="2560,3395 811,4240 0,2448 3135,981 2553,0 905,772">
          <text:p/>
        </draw:polyline>
        <draw:frame draw:style-name="gr261" draw:text-style-name="P137" draw:layer="layout" svg:width="4.06cm" svg:height="3.806cm" svg:x="20.466cm" svg:y="11.242cm">
          <draw:text-box>
            <text:p text:style-name="P75"><text:span text:style-name="T34">Pixel(0,4)</text:span></text:p>
            <text:p text:style-name="P75"><text:span text:style-name="T34">Pixel(4,3)</text:span></text:p>
            <text:p><text:span text:style-name="T92">Happy(True)</text:span></text:p>
            <text:p text:style-name="P75"><text:span text:style-name="T34">=&gt; </text:span></text:p>
            <text:p><text:span text:style-name="T34">Move(Left)</text:span></text:p>
          </draw:text-box>
        </draw:frame>
        <draw:custom-shape draw:style-name="gr238" draw:text-style-name="P136" xml:id="id30" draw:id="id30" draw:layer="layout" svg:width="1.792cm" svg:height="0.923cm" svg:x="11.809cm" svg:y="7.022cm">
          <text:p text:style-name="P135"><text:span text:style-name="T90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12.705cm" svg:y1="6.699cm" svg:x2="12.705cm" svg:y2="7.022cm" draw:start-shape="id20" draw:start-glue-point="8" draw:end-shape="id30" draw:end-glue-point="4" svg:d="M12705 6699v323" svg:viewBox="0 0 1 324">
          <text:p/>
        </draw:connector>
        <draw:connector draw:style-name="gr242" draw:text-style-name="P8" draw:layer="layout" draw:type="curve" svg:x1="13.121cm" svg:y1="2.481cm" svg:x2="16.947cm" svg:y2="2.916cm" draw:start-shape="id28" draw:start-glue-point="10" draw:end-shape="id31" draw:end-glue-point="4" svg:d="M13121 2481c2058 0 1715-34 2157-113s1669-205 1669 548" svg:viewBox="0 0 3827 610">
          <text:p/>
        </draw:connector>
        <draw:custom-shape draw:style-name="gr262" draw:text-style-name="P136" xml:id="id36" draw:id="id36" draw:layer="layout" svg:width="2.445cm" svg:height="0.923cm" svg:x="19.32cm" svg:y="2.018cm">
          <text:p text:style-name="P135"><text:span text:style-name="T90">argu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8.523cm" svg:y1="5.937cm" svg:x2="5.503cm" svg:y2="6.876cm" draw:start-shape="id32" draw:start-glue-point="6" draw:end-shape="id33" draw:end-glue-point="4" svg:d="M8523 5937c-2014 0-3020 313-3020 939" svg:viewBox="0 0 3021 940">
          <text:p/>
        </draw:connector>
        <draw:connector draw:style-name="gr242" draw:text-style-name="P8" draw:layer="layout" draw:type="curve" svg:x1="8.523cm" svg:y1="5.937cm" svg:x2="7.942cm" svg:y2="6.876cm" draw:start-shape="id32" draw:start-glue-point="6" draw:end-shape="id34" draw:end-glue-point="4" svg:d="M8523 5937c-388 0-581 313-581 939" svg:viewBox="0 0 582 940">
          <text:p/>
        </draw:connector>
        <draw:custom-shape draw:style-name="gr263" draw:text-style-name="P106" xml:id="id27" draw:id="id27" draw:layer="layout" svg:width="2.988cm" svg:height="0.923cm" svg:x="18.545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3" draw:text-style-name="P106" xml:id="id35" draw:id="id35" draw:layer="layout" svg:width="2.988cm" svg:height="0.923cm" svg:x="21.488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6" draw:text-style-name="P8" draw:layer="layout" draw:type="curve" draw:line-skew="0.735cm" svg:x1="22.982cm" svg:y1="6.726cm" svg:x2="21.407cm" svg:y2="2.153cm" draw:start-shape="id35" draw:start-glue-point="4" draw:end-shape="id36" draw:end-glue-point="11" svg:d="M22982 6726c0-6712-1575-4426-1575-4573" svg:viewBox="0 0 1576 4834">
          <text:p/>
        </draw:connector>
        <draw:custom-shape draw:style-name="gr241" draw:text-style-name="P136" xml:id="id31" draw:id="id31" draw:layer="layout" svg:width="2.166cm" svg:height="0.923cm" svg:x="15.864cm" svg:y="2.916cm">
          <text:p text:style-name="P135"><text:span text:style-name="T90">Hap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12.766cm" svg:y1="2.807cm" svg:x2="14.02cm" svg:y2="3.225cm" draw:start-shape="id28" draw:start-glue-point="9" draw:end-shape="id26" draw:end-glue-point="4" svg:d="M12766 2807c0 414 1254 205 1254 418" svg:viewBox="0 0 1255 419">
          <text:p/>
        </draw:connector>
        <draw:connector draw:style-name="gr245" draw:text-style-name="P8" draw:layer="layout" draw:type="curve" svg:x1="16.947cm" svg:y1="3.839cm" svg:x2="16.947cm" svg:y2="4.442cm" draw:start-shape="id31" draw:start-glue-point="8" draw:end-shape="id23" draw:end-glue-point="4" svg:d="M16947 3839v603" svg:viewBox="0 0 1 604">
          <text:p/>
        </draw:connector>
        <draw:connector draw:style-name="gr242" draw:text-style-name="P8" draw:layer="layout" draw:type="curve" svg:x1="20.543cm" svg:y1="2.941cm" svg:x2="17.713cm" svg:y2="4.577cm" draw:start-shape="id36" draw:start-glue-point="8" draw:end-shape="id23" draw:end-glue-point="11" svg:d="M20543 2941c0 1125-2830 307-2830 1636" svg:viewBox="0 0 2831 1637">
          <text:p/>
        </draw:connector>
        <draw:connector draw:style-name="gr242" draw:text-style-name="P8" draw:layer="layout" draw:type="curve" svg:x1="20.543cm" svg:y1="2.941cm" svg:x2="13.637cm" svg:y2="5.911cm" draw:start-shape="id36" draw:start-glue-point="8" draw:end-shape="id20" draw:end-glue-point="11" svg:d="M20543 2941c0 2125-6906 641-6906 2970" svg:viewBox="0 0 6907 2971">
          <text:p/>
        </draw:connector>
        <draw:g draw:style-name="gr11">
          <draw:line draw:style-name="gr264" draw:text-style-name="P8" draw:layer="layout" svg:x1="3.393cm" svg:y1="9.6cm" svg:x2="7.885cm" svg:y2="9.6cm">
            <text:p/>
          </draw:line>
          <draw:line draw:style-name="gr264" draw:text-style-name="P8" draw:layer="layout" svg:x1="3.393cm" svg:y1="8.925cm" svg:x2="7.885cm" svg:y2="8.925cm">
            <text:p/>
          </draw:line>
          <draw:line draw:style-name="gr264" draw:text-style-name="P8" draw:layer="layout" svg:x1="3.393cm" svg:y1="10.2cm" svg:x2="7.885cm" svg:y2="10.2cm">
            <text:p/>
          </draw:line>
          <draw:line draw:style-name="gr264" draw:text-style-name="P8" draw:layer="layout" svg:x1="5.639cm" svg:y1="11.1cm" svg:x2="5.639cm" svg:y2="8.4cm">
            <text:p/>
          </draw:line>
          <draw:line draw:style-name="gr264" draw:text-style-name="P8" draw:layer="layout" svg:x1="6.413cm" svg:y1="11.1cm" svg:x2="6.413cm" svg:y2="8.4cm">
            <text:p/>
          </draw:line>
          <draw:line draw:style-name="gr264" draw:text-style-name="P8" draw:layer="layout" svg:x1="7.188cm" svg:y1="11.1cm" svg:x2="7.188cm" svg:y2="8.4cm">
            <text:p/>
          </draw:line>
          <draw:line draw:style-name="gr264" draw:text-style-name="P8" draw:layer="layout" svg:x1="4.864cm" svg:y1="11.1cm" svg:x2="4.864cm" svg:y2="8.4cm">
            <text:p/>
          </draw:line>
          <draw:line draw:style-name="gr264" draw:text-style-name="P8" draw:layer="layout" svg:x1="4.09cm" svg:y1="11.1cm" svg:x2="4.09cm" svg:y2="8.4cm">
            <text:p/>
          </draw:line>
          <draw:line draw:style-name="gr264" draw:text-style-name="P8" draw:layer="layout" svg:x1="3.393cm" svg:y1="10.8cm" svg:x2="7.885cm" svg:y2="10.8cm">
            <text:p/>
          </draw:line>
        </draw:g>
        <draw:g draw:style-name="gr11">
          <draw:line draw:style-name="gr264" draw:text-style-name="P8" draw:layer="layout" svg:x1="8.969cm" svg:y1="9.6cm" svg:x2="13.461cm" svg:y2="9.6cm">
            <text:p/>
          </draw:line>
          <draw:line draw:style-name="gr264" draw:text-style-name="P8" draw:layer="layout" svg:x1="8.969cm" svg:y1="8.925cm" svg:x2="13.461cm" svg:y2="8.925cm">
            <text:p/>
          </draw:line>
          <draw:line draw:style-name="gr264" draw:text-style-name="P8" draw:layer="layout" svg:x1="8.969cm" svg:y1="10.2cm" svg:x2="13.461cm" svg:y2="10.2cm">
            <text:p/>
          </draw:line>
          <draw:line draw:style-name="gr264" draw:text-style-name="P8" draw:layer="layout" svg:x1="11.215cm" svg:y1="11.1cm" svg:x2="11.215cm" svg:y2="8.4cm">
            <text:p/>
          </draw:line>
          <draw:line draw:style-name="gr264" draw:text-style-name="P8" draw:layer="layout" svg:x1="11.989cm" svg:y1="11.1cm" svg:x2="11.989cm" svg:y2="8.4cm">
            <text:p/>
          </draw:line>
          <draw:line draw:style-name="gr264" draw:text-style-name="P8" draw:layer="layout" svg:x1="12.764cm" svg:y1="11.1cm" svg:x2="12.764cm" svg:y2="8.4cm">
            <text:p/>
          </draw:line>
          <draw:line draw:style-name="gr264" draw:text-style-name="P8" draw:layer="layout" svg:x1="10.44cm" svg:y1="11.1cm" svg:x2="10.44cm" svg:y2="8.4cm">
            <text:p/>
          </draw:line>
          <draw:line draw:style-name="gr264" draw:text-style-name="P8" draw:layer="layout" svg:x1="9.666cm" svg:y1="11.1cm" svg:x2="9.666cm" svg:y2="8.4cm">
            <text:p/>
          </draw:line>
          <draw:line draw:style-name="gr264" draw:text-style-name="P8" draw:layer="layout" svg:x1="8.969cm" svg:y1="10.8cm" svg:x2="13.461cm" svg:y2="10.8cm">
            <text:p/>
          </draw:line>
        </draw:g>
        <draw:g draw:style-name="gr11">
          <draw:line draw:style-name="gr264" draw:text-style-name="P8" draw:layer="layout" svg:x1="14.467cm" svg:y1="9.6cm" svg:x2="18.959cm" svg:y2="9.6cm">
            <text:p/>
          </draw:line>
          <draw:line draw:style-name="gr264" draw:text-style-name="P8" draw:layer="layout" svg:x1="14.467cm" svg:y1="8.925cm" svg:x2="18.959cm" svg:y2="8.925cm">
            <text:p/>
          </draw:line>
          <draw:line draw:style-name="gr264" draw:text-style-name="P8" draw:layer="layout" svg:x1="14.467cm" svg:y1="10.2cm" svg:x2="18.959cm" svg:y2="10.2cm">
            <text:p/>
          </draw:line>
          <draw:line draw:style-name="gr264" draw:text-style-name="P8" draw:layer="layout" svg:x1="16.713cm" svg:y1="11.1cm" svg:x2="16.713cm" svg:y2="8.4cm">
            <text:p/>
          </draw:line>
          <draw:line draw:style-name="gr264" draw:text-style-name="P8" draw:layer="layout" svg:x1="17.488cm" svg:y1="11.1cm" svg:x2="17.488cm" svg:y2="8.4cm">
            <text:p/>
          </draw:line>
          <draw:line draw:style-name="gr264" draw:text-style-name="P8" draw:layer="layout" svg:x1="18.262cm" svg:y1="11.1cm" svg:x2="18.262cm" svg:y2="8.4cm">
            <text:p/>
          </draw:line>
          <draw:line draw:style-name="gr264" draw:text-style-name="P8" draw:layer="layout" svg:x1="15.939cm" svg:y1="11.1cm" svg:x2="15.939cm" svg:y2="8.4cm">
            <text:p/>
          </draw:line>
          <draw:line draw:style-name="gr264" draw:text-style-name="P8" draw:layer="layout" svg:x1="15.164cm" svg:y1="11.1cm" svg:x2="15.164cm" svg:y2="8.4cm">
            <text:p/>
          </draw:line>
          <draw:line draw:style-name="gr264" draw:text-style-name="P8" draw:layer="layout" svg:x1="14.467cm" svg:y1="10.8cm" svg:x2="18.959cm" svg:y2="10.8cm">
            <text:p/>
          </draw:line>
        </draw:g>
        <draw:g draw:style-name="gr11">
          <draw:line draw:style-name="gr264" draw:text-style-name="P8" draw:layer="layout" svg:x1="20.043cm" svg:y1="9.6cm" svg:x2="24.535cm" svg:y2="9.6cm">
            <text:p/>
          </draw:line>
          <draw:line draw:style-name="gr264" draw:text-style-name="P8" draw:layer="layout" svg:x1="20.043cm" svg:y1="8.925cm" svg:x2="24.535cm" svg:y2="8.925cm">
            <text:p/>
          </draw:line>
          <draw:line draw:style-name="gr264" draw:text-style-name="P8" draw:layer="layout" svg:x1="20.043cm" svg:y1="10.2cm" svg:x2="24.535cm" svg:y2="10.2cm">
            <text:p/>
          </draw:line>
          <draw:line draw:style-name="gr264" draw:text-style-name="P8" draw:layer="layout" svg:x1="22.289cm" svg:y1="11.1cm" svg:x2="22.289cm" svg:y2="8.4cm">
            <text:p/>
          </draw:line>
          <draw:line draw:style-name="gr264" draw:text-style-name="P8" draw:layer="layout" svg:x1="23.063cm" svg:y1="11.1cm" svg:x2="23.063cm" svg:y2="8.4cm">
            <text:p/>
          </draw:line>
          <draw:line draw:style-name="gr264" draw:text-style-name="P8" draw:layer="layout" svg:x1="23.838cm" svg:y1="11.1cm" svg:x2="23.838cm" svg:y2="8.4cm">
            <text:p/>
          </draw:line>
          <draw:line draw:style-name="gr264" draw:text-style-name="P8" draw:layer="layout" svg:x1="21.515cm" svg:y1="11.1cm" svg:x2="21.515cm" svg:y2="8.4cm">
            <text:p/>
          </draw:line>
          <draw:line draw:style-name="gr264" draw:text-style-name="P8" draw:layer="layout" svg:x1="20.74cm" svg:y1="11.1cm" svg:x2="20.74cm" svg:y2="8.4cm">
            <text:p/>
          </draw:line>
          <draw:line draw:style-name="gr264" draw:text-style-name="P8" draw:layer="layout" svg:x1="20.043cm" svg:y1="10.8cm" svg:x2="24.535cm" svg:y2="10.8cm">
            <text:p/>
          </draw:line>
        </draw:g>
        <draw:custom-shape draw:style-name="gr265" draw:text-style-name="P136" xml:id="id33" draw:id="id33" draw:layer="layout" svg:width="1.704cm" svg:height="0.923cm" svg:x="4.651cm" svg:y="6.876cm">
          <text:p text:style-name="P135"><text:span text:style-name="T90">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136" xml:id="id34" draw:id="id34" draw:layer="layout" svg:width="1.936cm" svg:height="0.923cm" svg:x="6.974cm" svg:y="6.876cm">
          <text:p text:style-name="P135"><text:span text:style-name="T90">Colu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7" draw:text-style-name="P136" xml:id="id32" draw:id="id32" draw:layer="layout" svg:width="2.168cm" svg:height="0.923cm" svg:x="8.523cm" svg:y="5.475cm">
          <text:p text:style-name="P135"><text:span text:style-name="T90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5" draw:text-style-name="P8" draw:layer="layout" draw:type="curve" svg:x1="6.972cm" svg:y1="3.848cm" svg:x2="7.942cm" svg:y2="6.876cm" draw:start-shape="id29" draw:start-glue-point="8" draw:end-shape="id34" draw:end-glue-point="4" svg:d="M6972 3848c0 2271 970 757 970 3028" svg:viewBox="0 0 971 3029">
          <text:p/>
        </draw:connector>
        <draw:connector draw:style-name="gr245" draw:text-style-name="P8" draw:layer="layout" draw:type="curve" svg:x1="6.972cm" svg:y1="3.848cm" svg:x2="5.503cm" svg:y2="6.876cm" draw:start-shape="id29" draw:start-glue-point="8" draw:end-shape="id33" draw:end-glue-point="4" svg:d="M6972 3848c0 2271-1469 757-1469 3028" svg:viewBox="0 0 1470 3029">
          <text:p/>
        </draw:connector>
        <draw:connector draw:style-name="gr242" draw:text-style-name="P8" draw:layer="layout" draw:type="curve" svg:x1="20.543cm" svg:y1="2.941cm" svg:x2="9.607cm" svg:y2="5.475cm" draw:start-shape="id36" draw:start-glue-point="8" draw:end-shape="id32" draw:end-glue-point="4" svg:d="M20543 2941c0 1900-10936 634-10936 2534" svg:viewBox="0 0 10937 2535">
          <text:p/>
        </draw:connector>
        <draw:polyline draw:style-name="gr268" draw:text-style-name="P8" draw:layer="layout" svg:width="1.563cm" svg:height="7.102cm" draw:transform="rotate (-1.5707963267949) translate (23.1773288161282cm 13.126cm)" svg:viewBox="0 0 1564 7103" draw:points="0,0 1564,0 1564,7103 842,7103">
          <text:p/>
        </draw:polyline>
        <draw:polyline draw:style-name="gr268" draw:text-style-name="P8" draw:layer="layout" svg:width="1.563cm" svg:height="12.303cm" draw:transform="rotate (-1.5707963267949) translate (23.1286887000847cm 13.1266014500734cm)" svg:viewBox="0 0 1564 12304" draw:points="0,0 1564,0 1563,12304 841,12304">
          <text:p/>
        </draw:polyline>
        <draw:polyline draw:style-name="gr268" draw:text-style-name="P8" draw:layer="layout" svg:width="1.563cm" svg:height="17.969cm" draw:transform="rotate (-1.5707963267949) translate (23.0808206493753cm 13.1266014500734cm)" svg:viewBox="0 0 1564 17970" draw:points="0,0 1564,0 1563,17970 841,17970">
          <text:p/>
        </draw:polyline>
        <draw:frame draw:style-name="gr269" draw:text-style-name="P140" draw:layer="layout" svg:width="3.425cm" svg:height="1.673cm" svg:x="23.081cm" svg:y="13.033cm">
          <draw:text-box>
            <text:p text:style-name="P63"><text:span text:style-name="T93">Global </text:span></text:p>
            <text:p text:style-name="P63"><text:span text:style-name="T93">Feedback</text:span></text:p>
          </draw:text-box>
        </draw:frame>
        <draw:frame draw:style-name="gr270" draw:text-style-name="P60" draw:layer="layout" svg:width="9.043cm" svg:height="0.683cm" svg:x="0.886cm" svg:y="14.81cm">
          <draw:text-box>
            <text:p text:style-name="P59"><text:span text:style-name="T29"><text:a xlink:href="https://www.youtube.com/watch?v=2LPLhJKh95g" xlink:type="simple">https://www.youtube.com/watch?v=2LPLhJKh95g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7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1T0" presentation:use-footer-name="ftr1">
        <office:forms form:automatic-focus="false" form:apply-design-mode="false"/>
        <draw:custom-shape draw:style-name="gr271" draw:text-style-name="P142" draw:layer="layout" svg:width="28cm" svg:height="1.723cm" svg:x="0cm" svg:y="0.031cm">
          <text:list text:style-name="L1">
            <text:list-header>
              <text:p text:style-name="P141"><text:span text:style-name="T71">Играем в “1 player Ping-Pong” – уровень объектов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136" xml:id="id38" draw:id="id38" draw:layer="layout" svg:width="1.721cm" svg:height="0.923cm" svg:x="4.776cm" svg:y="6.948cm">
          <text:p text:style-name="P135"><text:span text:style-name="T90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3" draw:text-style-name="P136" xml:id="id39" draw:id="id39" draw:layer="layout" svg:width="1.825cm" svg:height="0.923cm" svg:x="8.466cm" svg:y="6.948cm">
          <text:p text:style-name="P135"><text:span text:style-name="T90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136" xml:id="id37" draw:id="id37" draw:layer="layout" svg:width="2.681cm" svg:height="0.923cm" svg:x="6.18cm" svg:y="5.776cm">
          <text:p text:style-name="P135"><text:span text:style-name="T90">Horizon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136" xml:id="id53" draw:id="id53" draw:layer="layout" svg:width="2.677cm" svg:height="0.923cm" svg:x="6.102cm" svg:y="2.925cm">
          <text:p text:style-name="P135"><text:span text:style-name="T90">Pos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6" draw:text-style-name="P136" xml:id="id40" draw:id="id40" draw:layer="layout" svg:width="2.049cm" svg:height="0.923cm" svg:x="12.172cm" svg:y="5.718cm">
          <text:p text:style-name="P135"><text:span text:style-name="T90">Vertic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136" xml:id="id44" draw:id="id44" draw:layer="layout" svg:width="2.206cm" svg:height="0.923cm" svg:x="15.86cm" svg:y="4.442cm">
          <text:p text:style-name="P135"><text:span text:style-name="T90">Boole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136" xml:id="id41" draw:id="id41" draw:layer="layout" svg:width="1.719cm" svg:height="0.923cm" svg:x="10.531cm" svg:y="6.948cm">
          <text:p text:style-name="P135"><text:span text:style-name="T90">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136" xml:id="id42" draw:id="id42" draw:layer="layout" svg:width="1.982cm" svg:height="0.923cm" svg:x="14.221cm" svg:y="6.947cm">
          <text:p text:style-name="P135"><text:span text:style-name="T90">Bott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6.572cm" svg:y1="6.564cm" svg:x2="5.637cm" svg:y2="6.948cm" draw:start-shape="id37" draw:start-glue-point="7" draw:end-shape="id38" draw:end-glue-point="4" svg:d="M6572 6564c0 388-935 197-935 384" svg:viewBox="0 0 936 385">
          <text:p/>
        </draw:connector>
        <draw:connector draw:style-name="gr242" draw:text-style-name="P8" draw:layer="layout" draw:type="curve" svg:x1="8.469cm" svg:y1="6.564cm" svg:x2="9.379cm" svg:y2="6.948cm" draw:start-shape="id37" draw:start-glue-point="9" draw:end-shape="id39" draw:end-glue-point="4" svg:d="M8469 6564c0 388 910 197 910 384" svg:viewBox="0 0 911 385">
          <text:p/>
        </draw:connector>
        <draw:connector draw:style-name="gr242" draw:text-style-name="P8" draw:layer="layout" draw:type="curve" svg:x1="12.472cm" svg:y1="6.506cm" svg:x2="11.391cm" svg:y2="6.948cm" draw:start-shape="id40" draw:start-glue-point="7" draw:end-shape="id41" draw:end-glue-point="4" svg:d="M12472 6506c0 432-1081 211-1081 442" svg:viewBox="0 0 1082 443">
          <text:p/>
        </draw:connector>
        <draw:connector draw:style-name="gr242" draw:text-style-name="P8" draw:layer="layout" draw:type="curve" svg:x1="13.921cm" svg:y1="6.506cm" svg:x2="15.212cm" svg:y2="6.947cm" draw:start-shape="id40" draw:start-glue-point="9" draw:end-shape="id42" draw:end-glue-point="4" svg:d="M13921 6506c0 432 1291 212 1291 441" svg:viewBox="0 0 1292 442">
          <text:p/>
        </draw:connector>
        <draw:connector draw:style-name="gr245" draw:text-style-name="P8" draw:layer="layout" draw:type="curve" svg:x1="4.368cm" svg:y1="4.949cm" svg:x2="6.18cm" svg:y2="6.238cm" draw:start-shape="id43" draw:start-glue-point="8" draw:end-shape="id37" draw:end-glue-point="6" svg:d="M4368 4949c0 860 604 1289 1812 1289" svg:viewBox="0 0 1813 1290">
          <text:p/>
        </draw:connector>
        <draw:custom-shape draw:style-name="gr279" draw:text-style-name="P136" xml:id="id47" draw:id="id47" draw:layer="layout" svg:width="2.205cm" svg:height="0.923cm" svg:x="12.881cm" svg:y="3.225cm">
          <text:p text:style-name="P135"><text:span text:style-name="T90">M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136" xml:id="id46" draw:id="id46" draw:layer="layout" svg:width="1.485cm" svg:height="0.923cm" svg:x="15.403cm" svg:y="5.601cm">
          <text:p text:style-name="P135"><text:span text:style-name="T90">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1" draw:text-style-name="P136" xml:id="id45" draw:id="id45" draw:layer="layout" svg:width="1.268cm" svg:height="0.923cm" svg:x="17.116cm" svg:y="5.601cm">
          <text:p text:style-name="P135"><text:span text:style-name="T90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16.963cm" svg:y1="5.365cm" svg:x2="17.75cm" svg:y2="5.601cm" draw:start-shape="id44" draw:start-glue-point="8" draw:end-shape="id45" draw:end-glue-point="4" svg:d="M16963 5365c0 177 787 59 787 236" svg:viewBox="0 0 788 237">
          <text:p/>
        </draw:connector>
        <draw:connector draw:style-name="gr242" draw:text-style-name="P8" draw:layer="layout" draw:type="curve" svg:x1="16.963cm" svg:y1="5.365cm" svg:x2="16.146cm" svg:y2="5.601cm" draw:start-shape="id44" draw:start-glue-point="8" draw:end-shape="id46" draw:end-glue-point="4" svg:d="M16963 5365c0 177-817 59-817 236" svg:viewBox="0 0 818 237">
          <text:p/>
        </draw:connector>
        <draw:connector draw:style-name="gr245" draw:text-style-name="P8" draw:layer="layout" draw:type="curve" svg:x1="13.204cm" svg:y1="4.013cm" svg:x2="8.861cm" svg:y2="6.238cm" draw:start-shape="id47" draw:start-glue-point="7" draw:end-shape="id37" draw:end-glue-point="10" svg:d="M13204 4013c0 1484-1447 2225-4343 2225" svg:viewBox="0 0 4344 2226">
          <text:p/>
        </draw:connector>
        <draw:connector draw:style-name="gr246" draw:text-style-name="P8" draw:layer="layout" draw:type="curve" draw:line-skew="0.764cm" svg:x1="20.111cm" svg:y1="6.726cm" svg:x2="12.708cm" svg:y2="2.154cm" draw:start-shape="id48" draw:start-glue-point="4" draw:end-shape="id49" draw:end-glue-point="11" svg:d="M20111 6726c0-6667-7403-4382-7403-4572" svg:viewBox="0 0 7404 4802">
          <text:p/>
        </draw:connector>
        <draw:frame draw:style-name="gr282" draw:text-style-name="P105" draw:layer="layout" svg:width="6.545cm" svg:height="1.963cm" svg:x="18.749cm" svg:y="5.974cm">
          <draw:text-box>
            <text:p><text:span text:style-name="T74">statement := </text:span></text:p>
            <text:p><text:span text:style-name="T74">predicate(argument) </text:span></text:p>
          </draw:text-box>
        </draw:frame>
        <draw:custom-shape draw:style-name="gr283" draw:text-style-name="P136" xml:id="id49" draw:id="id49" draw:layer="layout" svg:width="2.475cm" svg:height="0.923cm" svg:x="10.595cm" svg:y="2.019cm">
          <text:p text:style-name="P135"><text:span text:style-name="T90">predi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4" draw:text-style-name="P137" draw:layer="layout" svg:width="4.915cm" svg:height="3.581cm" svg:x="3.16cm" svg:y="11.24cm">
          <draw:text-box>
            <text:p text:style-name="P75"><text:span text:style-name="T34">BallY(Top)</text:span></text:p>
            <text:p text:style-name="P75"><text:span text:style-name="T34">BallX(Left)</text:span></text:p>
            <text:p><text:span text:style-name="T34">RacketX(Left)</text:span></text:p>
            <text:p><text:span text:style-name="T34">Happy(False)</text:span></text:p>
            <text:p text:style-name="P75"><text:span text:style-name="T34">=&gt; </text:span><text:span text:style-name="T91">Move(Left)</text:span></text:p>
          </draw:text-box>
        </draw:frame>
        <draw:custom-shape draw:style-name="gr285" draw:text-style-name="P138" draw:layer="layout" svg:width="0.842cm" svg:height="0.615cm" svg:x="7.888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86" draw:text-style-name="P8" draw:layer="layout" svg:width="4.645cm" svg:height="2.854cm" svg:x="14.425cm" svg:y="8.315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22" draw:layer="layout" svg:width="1.049cm" svg:height="0.142cm" svg:x="17.796cm" svg:y="11.098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39" draw:layer="layout" svg:width="0.451cm" svg:height="0.428cm" svg:x="18.095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4" draw:text-style-name="P8" draw:layer="layout" svg:width="3.513cm" svg:height="1.971cm" draw:transform="skewX (0.0476474885794452) rotate (2.32163697100286) translate (16.8144582399135cm 12.160339091057cm)" svg:viewBox="0 0 3514 1972" draw:points="1540,12 3503,0 3514,1972 0,1972">
          <text:p/>
        </draw:polyline>
        <draw:custom-shape draw:style-name="gr288" draw:text-style-name="P8" draw:layer="layout" svg:width="4.657cm" svg:height="2.854cm" svg:x="8.794cm" svg:y="8.297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22" draw:layer="layout" svg:width="1.049cm" svg:height="0.144cm" svg:x="10.519cm" svg:y="11.088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39" draw:layer="layout" svg:width="0.45cm" svg:height="0.428cm" svg:x="10.753cm" svg:y="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4" draw:text-style-name="P8" draw:layer="layout" svg:width="1.974cm" svg:height="1.973cm" draw:transform="skewX (0.0476474885794452) rotate (2.32093883930206) translate (10.1336189107707cm 11.0171653913821cm)" svg:viewBox="0 0 1975 1974" draw:points="0,14 1963,0 1975,1972 1085,1974">
          <text:p/>
        </draw:polyline>
        <draw:custom-shape draw:style-name="gr289" draw:text-style-name="P8" draw:layer="layout" svg:width="4.664cm" svg:height="2.854cm" svg:x="3.166cm" svg:y="8.297cm">
          <text:p/>
          <draw:enhanced-geometry svg:viewBox="0 0 21600 21600" draw:type="rectangle" draw:enhanced-path="M 0 0 L 21600 0 21600 21600 0 21600 0 0 Z N"/>
        </draw:custom-shape>
        <draw:custom-shape draw:style-name="gr290" draw:text-style-name="P122" draw:layer="layout" svg:width="1.047cm" svg:height="0.142cm" svg:x="3.992cm" svg:y="11.081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39" draw:layer="layout" svg:width="0.45cm" svg:height="0.428cm" svg:x="3.484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4" draw:text-style-name="P8" draw:layer="layout" svg:width="1.962cm" svg:height="0.572cm" draw:transform="skewX (0.0493928178314394) rotate (2.32111337222726) translate (4.50499185700529cm 11.0171781409925cm)" svg:viewBox="0 0 1963 573" draw:points="0,14 1963,0 1963,0 1921,573">
          <text:p/>
        </draw:polyline>
        <draw:custom-shape draw:style-name="gr291" draw:text-style-name="P138" draw:layer="layout" svg:width="0.843cm" svg:height="0.615cm" svg:x="13.507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86" draw:text-style-name="P8" draw:layer="layout" svg:width="4.645cm" svg:height="2.854cm" svg:x="20.11cm" svg:y="8.306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122" draw:layer="layout" svg:width="1.05cm" svg:height="0.144cm" svg:x="22.141cm" svg:y="11.088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39" draw:layer="layout" svg:width="0.449cm" svg:height="0.428cm" svg:x="23.152cm" svg:y="8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5" draw:text-style-name="P138" draw:layer="layout" svg:width="0.842cm" svg:height="0.615cm" svg:x="19.144cm" svg:y="9.4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93" draw:text-style-name="P137" draw:layer="layout" svg:width="5.054cm" svg:height="3.581cm" svg:x="8.774cm" svg:y="11.241cm">
          <draw:text-box>
            <text:p text:style-name="P75"><text:span text:style-name="T34">BallY(Top)</text:span></text:p>
            <text:p text:style-name="P75"><text:span text:style-name="T34">BallX(Center)</text:span></text:p>
            <text:p><text:span text:style-name="T34">RacketX(Center)</text:span></text:p>
            <text:p><text:span text:style-name="T34">Happy(False)</text:span></text:p>
            <text:p text:style-name="P75"><text:span text:style-name="T34">=&gt; </text:span><text:span text:style-name="T91">Move(Right)</text:span></text:p>
          </draw:text-box>
        </draw:frame>
        <draw:frame draw:style-name="gr284" draw:text-style-name="P137" draw:layer="layout" svg:width="4.915cm" svg:height="3.581cm" svg:x="14.291cm" svg:y="11.241cm">
          <draw:text-box>
            <text:p text:style-name="P75"><text:span text:style-name="T34">BallY(Bottom)</text:span></text:p>
            <text:p text:style-name="P75"><text:span text:style-name="T34">BallX(Right)</text:span></text:p>
            <text:p><text:span text:style-name="T34">RacketX(Right)</text:span></text:p>
            <text:p><text:span text:style-name="T34">Happy(False)</text:span></text:p>
            <text:p text:style-name="P75"><text:span text:style-name="T34">=&gt; </text:span><text:span text:style-name="T91">Move(Right)</text:span></text:p>
          </draw:text-box>
        </draw:frame>
        <draw:polyline draw:style-name="gr254" draw:text-style-name="P8" draw:layer="layout" svg:width="3.139cm" svg:height="4.307cm" draw:transform="skewX (0.0282743338823081) rotate (-1.25803332483751) translate (23.9970123419491cm 7.6071095860892cm)" svg:viewBox="0 0 3140 4308" draw:points="2564,3450 813,4308 0,2487 3140,997 2557,0 907,785">
          <text:p/>
        </draw:polyline>
        <draw:frame draw:style-name="gr284" draw:text-style-name="P137" draw:layer="layout" svg:width="4.915cm" svg:height="3.581cm" svg:x="20.001cm" svg:y="11.242cm">
          <draw:text-box>
            <text:p text:style-name="P75"><text:span text:style-name="T34">BallY(Bottom)</text:span></text:p>
            <text:p text:style-name="P75"><text:span text:style-name="T34">BallX(Right)</text:span></text:p>
            <text:p><text:span text:style-name="T34">RacketX(Right)</text:span></text:p>
            <text:p><text:span text:style-name="T92">Happy(True)</text:span></text:p>
            <text:p text:style-name="P75"><text:span text:style-name="T34">=&gt; </text:span><text:span text:style-name="T91">Move(Left)</text:span></text:p>
          </draw:text-box>
        </draw:frame>
        <draw:custom-shape draw:style-name="gr294" draw:text-style-name="P136" xml:id="id50" draw:id="id50" draw:layer="layout" svg:width="1.824cm" svg:height="0.923cm" svg:x="6.609cm" svg:y="7.122cm">
          <text:p text:style-name="P135"><text:span text:style-name="T90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7.521cm" svg:y1="6.699cm" svg:x2="7.521cm" svg:y2="7.122cm" draw:start-shape="id37" draw:start-glue-point="8" draw:end-shape="id50" draw:end-glue-point="4" svg:d="M7521 6699v423" svg:viewBox="0 0 1 424">
          <text:p/>
        </draw:connector>
        <draw:custom-shape draw:style-name="gr294" draw:text-style-name="P136" xml:id="id51" draw:id="id51" draw:layer="layout" svg:width="1.824cm" svg:height="0.923cm" svg:x="12.285cm" svg:y="7.023cm">
          <text:p text:style-name="P135"><text:span text:style-name="T90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13.197cm" svg:y1="6.641cm" svg:x2="13.197cm" svg:y2="7.023cm" draw:start-shape="id40" draw:start-glue-point="8" draw:end-shape="id51" draw:end-glue-point="4" svg:d="M13197 6641v382" svg:viewBox="0 0 1 383">
          <text:p/>
        </draw:connector>
        <draw:connector draw:style-name="gr242" draw:text-style-name="P8" draw:layer="layout" draw:type="curve" svg:x1="13.07cm" svg:y1="2.481cm" svg:x2="16.963cm" svg:y2="2.816cm" draw:start-shape="id49" draw:start-glue-point="10" draw:end-shape="id52" draw:end-glue-point="4" svg:d="M13070 2481c2092 0 1742-84 2193-188s1700-230 1700 523" svg:viewBox="0 0 3894 603">
          <text:p/>
        </draw:connector>
        <draw:custom-shape draw:style-name="gr295" draw:text-style-name="P136" xml:id="id43" draw:id="id43" draw:layer="layout" svg:width="1.892cm" svg:height="0.923cm" svg:x="3.422cm" svg:y="4.026cm">
          <text:p text:style-name="P135"><text:span text:style-name="T90">Ball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36" xml:id="id54" draw:id="id54" draw:layer="layout" svg:width="1.892cm" svg:height="0.923cm" svg:x="5.471cm" svg:y="4.126cm">
          <text:p text:style-name="P135"><text:span text:style-name="T90">B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136" xml:id="id55" draw:id="id55" draw:layer="layout" svg:width="2.443cm" svg:height="0.923cm" svg:x="9.255cm" svg:y="3.576cm">
          <text:p text:style-name="P135"><text:span text:style-name="T90">Racke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136" xml:id="id57" draw:id="id57" draw:layer="layout" svg:width="2.49cm" svg:height="0.923cm" svg:x="19.378cm" svg:y="2.018cm">
          <text:p text:style-name="P135"><text:span text:style-name="T90">argu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6.102cm" svg:y1="3.387cm" svg:x2="4.368cm" svg:y2="4.026cm" draw:start-shape="id53" draw:start-glue-point="6" draw:end-shape="id43" draw:end-glue-point="4" svg:d="M6102 3387c-1156 0-1734 213-1734 639" svg:viewBox="0 0 1735 640">
          <text:p/>
        </draw:connector>
        <draw:connector draw:style-name="gr242" draw:text-style-name="P8" draw:layer="layout" draw:type="curve" svg:x1="6.494cm" svg:y1="3.713cm" svg:x2="6.417cm" svg:y2="4.126cm" draw:start-shape="id53" draw:start-glue-point="7" draw:end-shape="id54" draw:end-glue-point="4" svg:d="M6494 3713c0 411-77 205-77 413" svg:viewBox="0 0 78 414">
          <text:p/>
        </draw:connector>
        <draw:connector draw:style-name="gr242" draw:text-style-name="P8" draw:layer="layout" draw:type="curve" svg:x1="8.779cm" svg:y1="3.387cm" svg:x2="10.477cm" svg:y2="3.576cm" draw:start-shape="id53" draw:start-glue-point="10" draw:end-shape="id55" draw:end-glue-point="4" svg:d="M8779 3387c1132 0 1698 63 1698 189" svg:viewBox="0 0 1699 190">
          <text:p/>
        </draw:connector>
        <draw:custom-shape draw:style-name="gr297" draw:text-style-name="P106" xml:id="id48" draw:id="id48" draw:layer="layout" svg:width="3.041cm" svg:height="0.923cm" svg:x="18.59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106" xml:id="id56" draw:id="id56" draw:layer="layout" svg:width="3.042cm" svg:height="0.923cm" svg:x="21.584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6" draw:text-style-name="P8" draw:layer="layout" draw:type="curve" draw:line-skew="0.796cm" svg:x1="23.105cm" svg:y1="6.726cm" svg:x2="21.504cm" svg:y2="2.153cm" draw:start-shape="id56" draw:start-glue-point="4" draw:end-shape="id57" draw:end-glue-point="11" svg:d="M23105 6726c0-6621-1601-4335-1601-4573" svg:viewBox="0 0 1602 4769">
          <text:p/>
        </draw:connector>
        <draw:custom-shape draw:style-name="gr277" draw:text-style-name="P136" xml:id="id52" draw:id="id52" draw:layer="layout" svg:width="2.206cm" svg:height="0.923cm" svg:x="15.86cm" svg:y="2.816cm">
          <text:p text:style-name="P135"><text:span text:style-name="T90">Hap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8" draw:layer="layout" draw:type="curve" svg:x1="12.708cm" svg:y1="2.807cm" svg:x2="13.984cm" svg:y2="3.225cm" draw:start-shape="id49" draw:start-glue-point="9" draw:end-shape="id47" draw:end-glue-point="4" svg:d="M12708 2807c0 414 1276 205 1276 418" svg:viewBox="0 0 1277 419">
          <text:p/>
        </draw:connector>
        <draw:connector draw:style-name="gr245" draw:text-style-name="P8" draw:layer="layout" draw:type="curve" svg:x1="9.612cm" svg:y1="4.364cm" svg:x2="7.521cm" svg:y2="5.776cm" draw:start-shape="id55" draw:start-glue-point="7" draw:end-shape="id37" draw:end-glue-point="4" svg:d="M9612 4364c0 1159-2091 454-2091 1412" svg:viewBox="0 0 2092 1413">
          <text:p/>
        </draw:connector>
        <draw:connector draw:style-name="gr245" draw:text-style-name="P8" draw:layer="layout" draw:type="curve" svg:x1="6.417cm" svg:y1="5.049cm" svg:x2="12.472cm" svg:y2="5.853cm" draw:start-shape="id54" draw:start-glue-point="8" draw:end-shape="id40" draw:end-glue-point="5" svg:d="M6417 5049c0 251 838 501 1676 501 837 0 1675-84 1675-167 0-84 676-167 1352-167s1352 319 1352 637" svg:viewBox="0 0 6056 805">
          <text:p/>
        </draw:connector>
        <draw:connector draw:style-name="gr245" draw:text-style-name="P8" draw:layer="layout" draw:type="curve" svg:x1="16.963cm" svg:y1="3.739cm" svg:x2="16.963cm" svg:y2="4.442cm" draw:start-shape="id52" draw:start-glue-point="8" draw:end-shape="id44" draw:end-glue-point="4" svg:d="M16963 3739v703" svg:viewBox="0 0 1 704">
          <text:p/>
        </draw:connector>
        <draw:connector draw:style-name="gr242" draw:text-style-name="P8" draw:layer="layout" draw:type="curve" svg:x1="20.623cm" svg:y1="2.941cm" svg:x2="18.066cm" svg:y2="4.904cm" draw:start-shape="id57" draw:start-glue-point="8" draw:end-shape="id44" draw:end-glue-point="10" svg:d="M20623 2941c0 1309-852 1963-2557 1963" svg:viewBox="0 0 2558 1964">
          <text:p/>
        </draw:connector>
        <draw:connector draw:style-name="gr242" draw:text-style-name="P8" draw:layer="layout" draw:type="curve" svg:x1="20.623cm" svg:y1="2.941cm" svg:x2="13.197cm" svg:y2="5.718cm" draw:start-shape="id57" draw:start-glue-point="8" draw:end-shape="id40" draw:end-glue-point="4" svg:d="M20623 2941c0 2082-7426 694-7426 2777" svg:viewBox="0 0 7427 2778">
          <text:p/>
        </draw:connector>
        <draw:connector draw:style-name="gr242" draw:text-style-name="P8" draw:layer="layout" draw:type="curve" svg:x1="20.623cm" svg:y1="2.941cm" svg:x2="8.469cm" svg:y2="5.911cm" draw:start-shape="id57" draw:start-glue-point="8" draw:end-shape="id37" draw:end-glue-point="11" svg:d="M20623 2941c0 2125-12154 641-12154 2970" svg:viewBox="0 0 12155 2971">
          <text:p/>
        </draw:connector>
        <draw:connector draw:style-name="gr242" draw:text-style-name="P8" draw:layer="layout" draw:type="curve" svg:x1="10.595cm" svg:y1="2.481cm" svg:x2="7.441cm" svg:y2="2.925cm" draw:start-shape="id49" draw:start-glue-point="6" draw:end-shape="id53" draw:end-glue-point="4" svg:d="M10595 2481c-1362 0-1135-29-1583-106s-1571-203-1571 550" svg:viewBox="0 0 3155 610">
          <text:p/>
        </draw:connector>
        <draw:polyline draw:style-name="gr268" draw:text-style-name="P8" draw:layer="layout" svg:width="1.563cm" svg:height="7.064cm" draw:transform="rotate (-1.5707963267949) translate (23.5933270688488cm 13.245cm)" svg:viewBox="0 0 1564 7065" draw:points="0,0 1564,0 1564,7065 842,7065">
          <text:p/>
        </draw:polyline>
        <draw:polyline draw:style-name="gr268" draw:text-style-name="P8" draw:layer="layout" svg:width="1.563cm" svg:height="12.238cm" draw:transform="rotate (-1.5707963267949) translate (23.5449454190481cm 13.2456014500734cm)" svg:viewBox="0 0 1564 12239" draw:points="0,0 1564,0 1563,12239 841,12239">
          <text:p/>
        </draw:polyline>
        <draw:polyline draw:style-name="gr268" draw:text-style-name="P8" draw:layer="layout" svg:width="1.563cm" svg:height="17.873cm" draw:transform="rotate (-1.5707963267949) translate (23.4973317319426cm 13.2456014500734cm)" svg:viewBox="0 0 1564 17874" draw:points="0,0 1564,0 1563,17874 841,17874">
          <text:p/>
        </draw:polyline>
        <draw:frame draw:style-name="gr269" draw:text-style-name="P140" draw:layer="layout" svg:width="3.425cm" svg:height="1.673cm" svg:x="23.593cm" svg:y="13.152cm">
          <draw:text-box>
            <text:p text:style-name="P63"><text:span text:style-name="T93">Global </text:span></text:p>
            <text:p text:style-name="P63"><text:span text:style-name="T93">Feedback</text:span></text:p>
          </draw:text-box>
        </draw:frame>
        <draw:frame draw:style-name="gr270" draw:text-style-name="P60" draw:layer="layout" svg:width="9.043cm" svg:height="0.683cm" svg:x="0.885cm" svg:y="14.809cm">
          <draw:text-box>
            <text:p text:style-name="P59"><text:span text:style-name="T29"><text:a xlink:href="https://www.youtube.com/watch?v=2LPLhJKh95g" xlink:type="simple">https://www.youtube.com/watch?v=2LPLhJKh95g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_5f_" presentation:presentation-page-layout-name="AL1T0" presentation:use-footer-name="ftr1">
        <office:forms form:automatic-focus="false" form:apply-design-mode="false"/>
        <draw:frame draw:style-name="gr87" draw:text-style-name="P65" draw:layer="layout" svg:width="28cm" svg:height="2.783cm" svg:x="-0.028cm" svg:y="0.053cm">
          <draw:text-box>
            <text:p text:style-name="P35"><text:span text:style-name="T70">Проблемы (понижения</text:span><text:span text:style-name="T71">) размерности </text:span></text:p>
            <text:p text:style-name="P35"><text:span text:style-name="T70">и (повышения</text:span><text:span text:style-name="T71">) дискретности </text:span></text:p>
          </draw:text-box>
        </draw:frame>
        <draw:line draw:style-name="gr299" draw:text-style-name="P8" draw:layer="layout" svg:x1="12.061cm" svg:y1="10.569cm" svg:x2="12.061cm" svg:y2="7.024cm">
          <text:p/>
        </draw:line>
        <draw:line draw:style-name="gr299" draw:text-style-name="P8" draw:layer="layout" svg:x1="12.061cm" svg:y1="10.57cm" svg:x2="16.506cm" svg:y2="10.57cm">
          <text:p/>
        </draw:line>
        <draw:line draw:style-name="gr299" draw:text-style-name="P8" draw:layer="layout" svg:x1="12.061cm" svg:y1="10.571cm" svg:x2="10.791cm" svg:y2="12.809cm">
          <text:p/>
        </draw:line>
        <draw:frame draw:style-name="gr300" draw:text-style-name="P66" draw:layer="layout" svg:width="3.137cm" svg:height="1.195cm" svg:x="13.509cm" svg:y="10.514cm">
          <draw:text-box>
            <text:p><text:span text:style-name="T38">Pixel X</text:span></text:p>
          </draw:text-box>
        </draw:frame>
        <draw:line draw:style-name="gr299" draw:text-style-name="P8" draw:layer="layout" svg:x1="5.455cm" svg:y1="9.96cm" svg:x2="5.455cm" svg:y2="4.88cm">
          <text:p/>
        </draw:line>
        <draw:line draw:style-name="gr299" draw:text-style-name="P8" draw:layer="layout" svg:x1="5.455cm" svg:y1="9.961cm" svg:x2="9.895cm" svg:y2="9.96cm">
          <text:p/>
        </draw:line>
        <draw:line draw:style-name="gr299" draw:text-style-name="P8" draw:layer="layout" svg:x1="5.455cm" svg:y1="9.962cm" svg:x2="3.55cm" svg:y2="13.135cm">
          <text:p/>
        </draw:line>
        <draw:frame draw:style-name="gr301" draw:text-style-name="P66" draw:layer="layout" svg:width="3.122cm" svg:height="1.195cm" svg:x="10.809cm" svg:y="5.68cm">
          <draw:text-box>
            <text:p><text:span text:style-name="T38">Pixel Y</text:span></text:p>
          </draw:text-box>
        </draw:frame>
        <draw:frame draw:style-name="gr302" draw:text-style-name="P66" draw:layer="layout" svg:width="2.337cm" svg:height="1.195cm" svg:x="9.535cm" svg:y="12.644cm">
          <draw:text-box>
            <text:p><text:span text:style-name="T38">Gray</text:span></text:p>
          </draw:text-box>
        </draw:frame>
        <draw:frame draw:style-name="gr303" draw:text-style-name="P67" draw:layer="layout" svg:width="5.638cm" svg:height="0.963cm" svg:x="6.127cm" svg:y="9.09cm">
          <draw:text-box>
            <text:p><text:span text:style-name="T13">1 <text:s text:c="9"/>210</text:span></text:p>
          </draw:text-box>
        </draw:frame>
        <draw:frame draw:style-name="gr303" draw:text-style-name="P67" draw:layer="layout" svg:width="3.763cm" svg:height="0.963cm" svg:x="12.743cm" svg:y="9.606cm">
          <draw:text-box>
            <text:p><text:span text:style-name="T13">1 <text:s text:c="9"/>178</text:span></text:p>
          </draw:text-box>
        </draw:frame>
        <draw:frame draw:style-name="gr300" draw:text-style-name="P66" draw:layer="layout" svg:width="3.137cm" svg:height="1.195cm" svg:x="6.904cm" svg:y="10.186cm">
          <draw:text-box>
            <text:p><text:span text:style-name="T38">Pixel X</text:span></text:p>
          </draw:text-box>
        </draw:frame>
        <draw:frame draw:style-name="gr304" draw:text-style-name="P66" draw:layer="layout" svg:width="2.197cm" svg:height="1.195cm" svg:x="2.16cm" svg:y="13.136cm">
          <draw:text-box>
            <text:p><text:span text:style-name="T38">Blue</text:span></text:p>
          </draw:text-box>
        </draw:frame>
        <draw:frame draw:style-name="gr305" draw:text-style-name="P67" draw:layer="layout" svg:width="2.54cm" svg:height="0.962cm" svg:x="5.28cm" svg:y="10.165cm">
          <draw:text-box>
            <text:p><text:span text:style-name="T13">1</text:span></text:p>
          </draw:text-box>
        </draw:frame>
        <draw:frame draw:style-name="gr305" draw:text-style-name="P67" draw:layer="layout" svg:width="2.54cm" svg:height="0.962cm" svg:x="12.061cm" svg:y="7.024cm">
          <draw:text-box>
            <text:p><text:span text:style-name="T13">144</text:span></text:p>
          </draw:text-box>
        </draw:frame>
        <draw:frame draw:style-name="gr305" draw:text-style-name="P67" draw:layer="layout" svg:width="3.175cm" svg:height="0.962cm" svg:x="12.062cm" svg:y="8.924cm">
          <draw:text-box>
            <text:p><text:span text:style-name="T13">1</text:span></text:p>
          </draw:text-box>
        </draw:frame>
        <draw:frame draw:style-name="gr306" draw:text-style-name="P67" draw:layer="layout" svg:width="1.936cm" svg:height="1.673cm" svg:x="5.419cm" svg:y="5.128cm">
          <draw:text-box>
            <text:p><text:span text:style-name="T13">160</text:span></text:p>
          </draw:text-box>
        </draw:frame>
        <draw:frame draw:style-name="gr305" draw:text-style-name="P67" draw:layer="layout" svg:width="3.175cm" svg:height="0.962cm" svg:x="5.421cm" svg:y="8.228cm">
          <draw:text-box>
            <text:p><text:span text:style-name="T13">1</text:span></text:p>
          </draw:text-box>
        </draw:frame>
        <draw:frame draw:style-name="gr307" draw:text-style-name="P66" draw:layer="layout" svg:width="4.328cm" svg:height="1.195cm" svg:x="5.11cm" svg:y="3.933cm">
          <draw:text-box>
            <text:p><text:span text:style-name="T38">Pixel Y</text:span></text:p>
          </draw:text-box>
        </draw:frame>
        <draw:line draw:style-name="gr299" draw:text-style-name="P8" draw:layer="layout" svg:x1="5.456cm" svg:y1="9.962cm" svg:x2="2.24cm" svg:y2="5.415cm">
          <text:p/>
        </draw:line>
        <draw:line draw:style-name="gr299" draw:text-style-name="P8" draw:layer="layout" svg:x1="5.457cm" svg:y1="9.963cm" svg:x2="0.97cm" svg:y2="9.225cm">
          <text:p/>
        </draw:line>
        <draw:frame draw:style-name="gr308" draw:text-style-name="P66" draw:layer="layout" svg:width="3.092cm" svg:height="1.195cm" svg:x="0.991cm" svg:y="4.32cm">
          <draw:text-box>
            <text:p><text:span text:style-name="T38">Red</text:span></text:p>
          </draw:text-box>
        </draw:frame>
        <draw:frame draw:style-name="gr309" draw:text-style-name="P66" draw:layer="layout" svg:width="3.514cm" svg:height="1.195cm" svg:x="-0.109cm" svg:y="7.921cm">
          <draw:text-box>
            <text:p><text:span text:style-name="T38">Green</text:span></text:p>
          </draw:text-box>
        </draw:frame>
        <draw:frame draw:style-name="gr305" draw:text-style-name="P67" draw:layer="layout" svg:width="1.266cm" svg:height="0.962cm" svg:x="3.887cm" svg:y="9.807cm">
          <draw:text-box>
            <text:p><text:span text:style-name="T13">1</text:span></text:p>
          </draw:text-box>
        </draw:frame>
        <draw:frame draw:style-name="gr305" draw:text-style-name="P67" draw:layer="layout" svg:width="1.805cm" svg:height="0.962cm" svg:x="1.105cm" svg:y="9.433cm">
          <draw:text-box>
            <text:p><text:span text:style-name="T13">255</text:span></text:p>
          </draw:text-box>
        </draw:frame>
        <draw:frame draw:style-name="gr305" draw:text-style-name="P67" draw:layer="layout" svg:width="1.905cm" svg:height="0.962cm" svg:x="2.71cm" svg:y="5.328cm">
          <draw:text-box>
            <text:p><text:span text:style-name="T13">255</text:span></text:p>
          </draw:text-box>
        </draw:frame>
        <draw:frame draw:style-name="gr305" draw:text-style-name="P67" draw:layer="layout" svg:width="1.266cm" svg:height="0.962cm" svg:x="4.519cm" svg:y="8.228cm">
          <draw:text-box>
            <text:p><text:span text:style-name="T13">1</text:span></text:p>
          </draw:text-box>
        </draw:frame>
        <draw:line draw:style-name="gr310" draw:text-style-name="P143" draw:layer="layout" svg:x1="6.39cm" svg:y1="7.282cm" svg:x2="10.459cm" svg:y2="7.282cm">
          <text:p/>
        </draw:line>
        <draw:frame draw:style-name="gr311" draw:text-style-name="P144" draw:layer="layout" svg:width="3.891cm" svg:height="1.195cm" svg:x="6.39cm" svg:y="6.185cm">
          <draw:text-box>
            <text:p><text:span text:style-name="T94">Redefine</text:span></text:p>
          </draw:text-box>
        </draw:frame>
        <draw:frame draw:style-name="gr305" draw:text-style-name="P67" draw:layer="layout" svg:width="1.905cm" svg:height="0.962cm" svg:x="4.18cm" svg:y="12.073cm">
          <draw:text-box>
            <text:p><text:span text:style-name="T13">255</text:span></text:p>
          </draw:text-box>
        </draw:frame>
        <draw:frame draw:style-name="gr305" draw:text-style-name="P67" draw:layer="layout" svg:width="2.54cm" svg:height="0.962cm" svg:x="11.891cm" svg:y="10.674cm">
          <draw:text-box>
            <text:p><text:span text:style-name="T13">1</text:span></text:p>
          </draw:text-box>
        </draw:frame>
        <draw:frame draw:style-name="gr305" draw:text-style-name="P67" draw:layer="layout" svg:width="1.905cm" svg:height="0.962cm" svg:x="10.991cm" svg:y="11.882cm">
          <draw:text-box>
            <text:p><text:span text:style-name="T13">255</text:span></text:p>
          </draw:text-box>
        </draw:frame>
        <draw:line draw:style-name="gr310" draw:text-style-name="P143" draw:layer="layout" svg:x1="20.12cm" svg:y1="10.696cm" svg:x2="24.189cm" svg:y2="10.696cm">
          <text:p/>
        </draw:line>
        <draw:frame draw:style-name="gr311" draw:text-style-name="P144" draw:layer="layout" svg:width="3.891cm" svg:height="1.195cm" svg:x="20.12cm" svg:y="9.599cm">
          <draw:text-box>
            <text:p><text:span text:style-name="T94">Redefine</text:span></text:p>
          </draw:text-box>
        </draw:frame>
        <draw:frame draw:style-name="gr183" draw:text-style-name="P107" draw:layer="layout" svg:width="6.315cm" svg:height="4.934cm" svg:x="21.592cm" svg:y="2.391cm">
          <draw:image xlink:href="Pictures/10000001000006A4000004F6415F8BBE.png" xlink:type="simple" xlink:show="embed" xlink:actuate="onLoad" draw:mime-type="image/png">
            <text:p/>
          </draw:image>
        </draw:frame>
        <draw:line draw:style-name="gr299" draw:text-style-name="P8" draw:layer="layout" svg:x1="12.061cm" svg:y1="10.57cm" svg:x2="12.061cm" svg:y2="7.025cm">
          <text:p/>
        </draw:line>
        <draw:frame draw:style-name="gr305" draw:text-style-name="P67" draw:layer="layout" svg:width="3.175cm" svg:height="0.962cm" svg:x="12.062cm" svg:y="8.925cm">
          <draw:text-box>
            <text:p><text:span text:style-name="T13">1</text:span></text:p>
          </draw:text-box>
        </draw:frame>
        <draw:frame draw:style-name="gr305" draw:text-style-name="P67" draw:layer="layout" svg:width="2.54cm" svg:height="0.962cm" svg:x="11.891cm" svg:y="10.675cm">
          <draw:text-box>
            <text:p><text:span text:style-name="T13">1</text:span></text:p>
          </draw:text-box>
        </draw:frame>
        <draw:line draw:style-name="gr310" draw:text-style-name="P143" draw:layer="layout" svg:x1="20.12cm" svg:y1="10.697cm" svg:x2="24.189cm" svg:y2="10.697cm">
          <text:p/>
        </draw:line>
        <draw:frame draw:style-name="gr311" draw:text-style-name="P144" draw:layer="layout" svg:width="3.891cm" svg:height="1.195cm" svg:x="20.12cm" svg:y="9.6cm">
          <draw:text-box>
            <text:p><text:span text:style-name="T94">Redefine</text:span></text:p>
          </draw:text-box>
        </draw:frame>
        <draw:line draw:style-name="gr299" draw:text-style-name="P8" draw:layer="layout" svg:x1="25.561cm" svg:y1="14.17cm" svg:x2="25.561cm" svg:y2="11.276cm">
          <text:p/>
        </draw:line>
        <draw:line draw:style-name="gr299" draw:text-style-name="P8" draw:layer="layout" svg:x1="23.995cm" svg:y1="12.871cm" svg:x2="27.17cm" svg:y2="12.875cm">
          <text:p/>
        </draw:line>
        <draw:frame draw:style-name="gr312" draw:text-style-name="P66" draw:layer="layout" svg:width="1.674cm" svg:height="1.195cm" svg:x="26.36cm" svg:y="12.875cm">
          <draw:text-box>
            <text:p><text:span text:style-name="T38">dX</text:span><text:span text:style-name="T95">t</text:span></text:p>
          </draw:text-box>
        </draw:frame>
        <draw:frame draw:style-name="gr313" draw:text-style-name="P66" draw:layer="layout" svg:width="2.149cm" svg:height="1.195cm" svg:x="24.809cm" svg:y="10.081cm">
          <draw:text-box>
            <text:p><text:span text:style-name="T38">dX</text:span><text:span text:style-name="T95">t-1</text:span></text:p>
          </draw:text-box>
        </draw:frame>
        <draw:frame draw:style-name="gr303" draw:text-style-name="P67" draw:layer="layout" svg:width="3.768cm" svg:height="0.963cm" svg:x="23.902cm" svg:y="11.908cm">
          <draw:text-box>
            <text:p><text:span text:style-name="T13">-50 <text:s text:c="6"/>50</text:span></text:p>
          </draw:text-box>
        </draw:frame>
        <draw:frame draw:style-name="gr305" draw:text-style-name="P67" draw:layer="layout" svg:width="1.499cm" svg:height="0.962cm" svg:x="25.561cm" svg:y="11.025cm">
          <draw:text-box>
            <text:p><text:span text:style-name="T13">50</text:span></text:p>
          </draw:text-box>
        </draw:frame>
        <draw:frame draw:style-name="gr305" draw:text-style-name="P67" draw:layer="layout" svg:width="2.008cm" svg:height="0.962cm" svg:x="25.362cm" svg:y="13.625cm">
          <draw:text-box>
            <text:p><text:span text:style-name="T13">-50</text:span></text:p>
          </draw:text-box>
        </draw:frame>
        <draw:frame draw:style-name="gr314" draw:text-style-name="P145" draw:layer="layout" svg:width="16.877cm" svg:height="1.195cm" svg:x="5.525cm" svg:y="2.651cm">
          <draw:text-box>
            <text:p><text:span text:style-name="T96">Re-defining environment in Atari Breakout </text:span></text:p>
          </draw:text-box>
        </draw:frame>
        <draw:frame draw:style-name="gr315" draw:text-style-name="P24" draw:layer="layout" svg:width="18.527cm" svg:height="1.199cm" svg:x="-0.045cm" svg:y="14.14cm">
          <draw:text-box>
            <text:p><text:span text:style-name="T47">Interpretable representation learning for 3D multi-piece intracellular structures using point clouds</text:span><text:span text:style-name="T47"><text:line-break/></text:span><text:span text:style-name="T47"><text:a xlink:href="https://www.nature.com/articles/s41592-025-02729-9" xlink:type="simple">https://www.nature.com/articles/s41592-025-02729-9</text:a></text:span></text:p>
          </draw:text-box>
        </draw:frame>
        <draw:line draw:style-name="gr299" draw:text-style-name="P8" draw:layer="layout" svg:x1="18.052cm" svg:y1="11.959cm" svg:x2="18.052cm" svg:y2="8.414cm">
          <text:p/>
        </draw:line>
        <draw:line draw:style-name="gr299" draw:text-style-name="P8" draw:layer="layout" svg:x1="18.052cm" svg:y1="11.96cm" svg:x2="23.132cm" svg:y2="11.96cm">
          <text:p/>
        </draw:line>
        <draw:frame draw:style-name="gr316" draw:text-style-name="P66" draw:layer="layout" svg:width="3.937cm" svg:height="1.195cm" svg:x="19.5cm" svg:y="11.904cm">
          <draw:text-box>
            <text:p><text:span text:style-name="T38">Racket X</text:span></text:p>
          </draw:text-box>
        </draw:frame>
        <draw:frame draw:style-name="gr317" draw:text-style-name="P66" draw:layer="layout" svg:width="2.714cm" svg:height="1.195cm" svg:x="16.8cm" svg:y="7.07cm">
          <draw:text-box>
            <text:p><text:span text:style-name="T38">Ball X</text:span></text:p>
          </draw:text-box>
        </draw:frame>
        <draw:frame draw:style-name="gr303" draw:text-style-name="P67" draw:layer="layout" svg:width="3.763cm" svg:height="0.963cm" svg:x="18.734cm" svg:y="10.996cm">
          <draw:text-box>
            <text:p><text:span text:style-name="T13">1 <text:s text:c="9"/>178</text:span></text:p>
          </draw:text-box>
        </draw:frame>
        <draw:frame draw:style-name="gr305" draw:text-style-name="P67" draw:layer="layout" svg:width="2.54cm" svg:height="0.962cm" svg:x="18.052cm" svg:y="8.414cm">
          <draw:text-box>
            <text:p><text:span text:style-name="T13">144</text:span></text:p>
          </draw:text-box>
        </draw:frame>
        <draw:frame draw:style-name="gr305" draw:text-style-name="P67" draw:layer="layout" svg:width="3.175cm" svg:height="0.962cm" svg:x="18.053cm" svg:y="10.314cm">
          <draw:text-box>
            <text:p><text:span text:style-name="T13">1</text:span></text:p>
          </draw:text-box>
        </draw:frame>
        <draw:frame draw:style-name="gr305" draw:text-style-name="P67" draw:layer="layout" svg:width="2.54cm" svg:height="0.962cm" svg:x="17.882cm" svg:y="12.064cm">
          <draw:text-box>
            <text:p><text:span text:style-name="T13">1</text:span></text:p>
          </draw:text-box>
        </draw:frame>
        <draw:line draw:style-name="gr299" draw:text-style-name="P8" draw:layer="layout" svg:x1="18.052cm" svg:y1="11.96cm" svg:x2="18.052cm" svg:y2="8.415cm">
          <text:p/>
        </draw:line>
        <draw:line draw:style-name="gr299" draw:text-style-name="P8" draw:layer="layout" svg:x1="18.052cm" svg:y1="11.961cm" svg:x2="23.132cm" svg:y2="11.961cm">
          <text:p/>
        </draw:line>
        <draw:frame draw:style-name="gr316" draw:text-style-name="P66" draw:layer="layout" svg:width="3.937cm" svg:height="1.195cm" svg:x="19.5cm" svg:y="11.905cm">
          <draw:text-box>
            <text:p><text:span text:style-name="T38">Racket X</text:span></text:p>
          </draw:text-box>
        </draw:frame>
        <draw:frame draw:style-name="gr303" draw:text-style-name="P67" draw:layer="layout" svg:width="3.763cm" svg:height="0.963cm" svg:x="18.734cm" svg:y="10.997cm">
          <draw:text-box>
            <text:p><text:span text:style-name="T13">1 <text:s text:c="9"/>178</text:span></text:p>
          </draw:text-box>
        </draw:frame>
        <draw:frame draw:style-name="gr305" draw:text-style-name="P67" draw:layer="layout" svg:width="3.175cm" svg:height="0.962cm" svg:x="18.053cm" svg:y="10.315cm">
          <draw:text-box>
            <text:p><text:span text:style-name="T13">1</text:span></text:p>
          </draw:text-box>
        </draw:frame>
        <draw:frame draw:style-name="gr305" draw:text-style-name="P67" draw:layer="layout" svg:width="2.54cm" svg:height="0.962cm" svg:x="17.882cm" svg:y="12.065cm">
          <draw:text-box>
            <text:p><text:span text:style-name="T13">1</text:span></text:p>
          </draw:text-box>
        </draw:frame>
        <draw:line draw:style-name="gr310" draw:text-style-name="P143" draw:layer="layout" svg:x1="12.937cm" svg:y1="9.215cm" svg:x2="17.006cm" svg:y2="9.215cm">
          <text:p/>
        </draw:line>
        <draw:frame draw:style-name="gr311" draw:text-style-name="P144" draw:layer="layout" svg:width="3.891cm" svg:height="1.195cm" svg:x="12.937cm" svg:y="8.118cm">
          <draw:text-box>
            <text:p><text:span text:style-name="T94">Redefine</text:span></text:p>
          </draw:text-box>
        </draw:frame>
        <draw:line draw:style-name="gr310" draw:text-style-name="P143" draw:layer="layout" svg:x1="12.937cm" svg:y1="9.216cm" svg:x2="17.006cm" svg:y2="9.216cm">
          <text:p/>
        </draw:line>
        <draw:frame draw:style-name="gr311" draw:text-style-name="P144" draw:layer="layout" svg:width="3.891cm" svg:height="1.195cm" svg:x="12.937cm" svg:y="8.119cm">
          <draw:text-box>
            <text:p><text:span text:style-name="T94">Redefine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1">
        <office:forms form:automatic-focus="false" form:apply-design-mode="false"/>
        <draw:frame draw:style-name="gr14" draw:text-style-name="P8" draw:layer="layout" svg:width="22.86cm" svg:height="13.64cm" svg:x="0.575cm" svg:y="1.156cm">
          <draw:image xlink:href="Pictures/1000000100000AE8000006823CF27292.png" xlink:type="simple" xlink:show="embed" xlink:actuate="onLoad" draw:mime-type="image/png">
            <text:p/>
          </draw:image>
        </draw:frame>
        <draw:frame draw:style-name="gr318" draw:text-style-name="P146" draw:layer="layout" svg:width="27.94cm" svg:height="1.352cm" svg:x="0cm" svg:y="0.035cm">
          <draw:text-box>
            <text:p text:style-name="P35"><text:span text:style-name="T87">“Imitation learning” – принятие решений на “пред-обученной” модели</text:span></text:p>
          </draw:text-box>
        </draw:frame>
        <draw:path draw:style-name="gr319" draw:text-style-name="P8" draw:layer="layout" svg:width="2.085cm" svg:height="1.803cm" draw:transform="rotate (-0.153763507100701) translate (4.5644135651725cm 1.17274240937913cm)" svg:viewBox="0 0 2086 1804" svg:d="M0 878c1591-2175 1989 298 2086 926">
          <text:p/>
        </draw:path>
        <draw:frame draw:style-name="gr320" draw:text-style-name="P147" draw:layer="layout" svg:width="1.561cm" svg:height="0.962cm" svg:x="5.524cm" svg:y="3.075cm">
          <draw:text-box>
            <text:p><text:span text:style-name="T97">864</text:span></text:p>
          </draw:text-box>
        </draw:frame>
        <draw:frame draw:style-name="gr183" draw:text-style-name="P107" draw:layer="layout" svg:width="6.315cm" svg:height="4.934cm" svg:x="21.591cm" svg:y="7.891cm">
          <draw:image xlink:href="Pictures/10000001000006A4000004F6415F8BBE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 presentation:use-footer-name="ftr1">
        <office:forms form:automatic-focus="false" form:apply-design-mode="false"/>
        <draw:frame draw:style-name="gr318" draw:text-style-name="P148" draw:layer="layout" svg:width="27.94cm" svg:height="1.352cm" svg:x="0cm" svg:y="0.035cm">
          <draw:text-box>
            <text:p text:style-name="P35"><text:span text:style-name="T98">Обучение на собственном опыте – переходы между последовательностями </text:span></text:p>
          </draw:text-box>
        </draw:frame>
        <draw:frame draw:style-name="gr183" draw:text-style-name="P107" draw:layer="layout" svg:width="6.315cm" svg:height="4.934cm" svg:x="21.59cm" svg:y="7.891cm">
          <draw:image xlink:href="Pictures/10000001000006A4000004F6415F8BBE.png" xlink:type="simple" xlink:show="embed" xlink:actuate="onLoad" draw:mime-type="image/png">
            <text:p/>
          </draw:image>
        </draw:frame>
        <draw:frame draw:style-name="gr14" draw:text-style-name="P8" draw:layer="layout" svg:width="21.462cm" svg:height="5.645cm" svg:x="0.208cm" svg:y="2.34cm">
          <draw:image xlink:href="Pictures/1000000100000B7A00000305D1A0E4A0.png" xlink:type="simple" xlink:show="embed" xlink:actuate="onLoad" draw:mime-type="image/png">
            <text:p/>
          </draw:image>
        </draw:frame>
        <draw:frame draw:style-name="gr14" draw:text-style-name="P8" draw:layer="layout" svg:width="21.247cm" svg:height="5.579cm" svg:x="0.343cm" svg:y="9.267cm">
          <draw:image xlink:href="Pictures/1000000100000B7E00000305221BD103.png" xlink:type="simple" xlink:show="embed" xlink:actuate="onLoad" draw:mime-type="image/png">
            <text:p/>
          </draw:image>
        </draw:frame>
        <draw:frame draw:style-name="gr321" draw:text-style-name="P149" draw:layer="layout" svg:width="6.456cm" svg:height="0.962cm" svg:x="20.681cm" svg:y="5.836cm">
          <draw:text-box>
            <text:p><text:span text:style-name="T40">Average human level</text:span></text:p>
          </draw:text-box>
        </draw:frame>
        <draw:frame draw:style-name="gr321" draw:text-style-name="P149" draw:layer="layout" svg:width="6.456cm" svg:height="0.962cm" svg:x="20.683cm" svg:y="4.553cm">
          <draw:text-box>
            <text:p><text:span text:style-name="T40">Average DQN level</text:span></text:p>
          </draw:text-box>
        </draw:frame>
        <draw:line draw:style-name="gr322" draw:text-style-name="P8" draw:layer="layout" svg:x1="1.211cm" svg:y1="6.798cm" svg:x2="20.953cm" svg:y2="6.798cm">
          <text:p/>
        </draw:line>
        <draw:line draw:style-name="gr322" draw:text-style-name="P8" draw:layer="layout" svg:x1="1.212cm" svg:y1="5.549cm" svg:x2="20.954cm" svg:y2="5.549cm">
          <text:p/>
        </draw:line>
        <draw:line draw:style-name="gr322" draw:text-style-name="P8" draw:layer="layout" svg:x1="1.213cm" svg:y1="4.55cm" svg:x2="20.955cm" svg:y2="4.55cm">
          <text:p/>
        </draw:line>
        <draw:frame draw:style-name="gr321" draw:text-style-name="P149" draw:layer="layout" svg:width="6.456cm" svg:height="0.962cm" svg:x="20.684cm" svg:y="3.554cm">
          <draw:text-box>
            <text:p><text:span text:style-name="T40">Top DQN level</text:span></text:p>
          </draw:text-box>
        </draw:frame>
        <draw:frame draw:style-name="gr321" draw:text-style-name="P149" draw:layer="layout" svg:width="6.456cm" svg:height="0.962cm" svg:x="13.282cm" svg:y="12.588cm">
          <draw:text-box>
            <text:p><text:span text:style-name="T40">Average human level</text:span></text:p>
          </draw:text-box>
        </draw:frame>
        <draw:frame draw:style-name="gr321" draw:text-style-name="P149" draw:layer="layout" svg:width="6.456cm" svg:height="0.962cm" svg:x="2.083cm" svg:y="10.739cm">
          <draw:text-box>
            <text:p><text:span text:style-name="T40">Average DQN level</text:span></text:p>
          </draw:text-box>
        </draw:frame>
        <draw:line draw:style-name="gr322" draw:text-style-name="P8" draw:layer="layout" svg:x1="1.312cm" svg:y1="13.55cm" svg:x2="21.054cm" svg:y2="13.55cm">
          <text:p/>
        </draw:line>
        <draw:line draw:style-name="gr322" draw:text-style-name="P8" draw:layer="layout" svg:x1="1.313cm" svg:y1="10.801cm" svg:x2="21.055cm" svg:y2="10.801cm">
          <text:p/>
        </draw:line>
        <presentation:notes draw:style-name="dp2">
          <draw:page-thumbnail draw:style-name="gr16" draw:layer="layout" svg:width="19.798cm" svg:height="11.136cm" svg:x="0.6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 presentation:use-footer-name="ftr1">
        <office:forms form:automatic-focus="false" form:apply-design-mode="false"/>
        <draw:frame draw:style-name="gr318" draw:text-style-name="P148" draw:layer="layout" svg:width="27.94cm" svg:height="1.352cm" svg:x="0cm" svg:y="0.035cm">
          <draw:text-box>
            <text:p text:style-name="P35"><text:span text:style-name="T99">Обучение на собственном опыте – сравнение с “baselines”</text:span></text:p>
          </draw:text-box>
        </draw:frame>
        <draw:frame draw:style-name="gr183" draw:text-style-name="P107" draw:layer="layout" svg:width="6.315cm" svg:height="4.934cm" svg:x="21.59cm" svg:y="7.891cm">
          <draw:image xlink:href="Pictures/10000001000006A4000004F6415F8BBE.png" xlink:type="simple" xlink:show="embed" xlink:actuate="onLoad" draw:mime-type="image/png">
            <text:p/>
          </draw:image>
        </draw:frame>
        <draw:frame draw:style-name="gr14" draw:text-style-name="P8" draw:layer="layout" svg:width="20.871cm" svg:height="13.312cm" svg:x="0.435cm" svg:y="1.47cm">
          <draw:image xlink:href="Pictures/1000000100000AEA000006F6A976D1AF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7" draw:text-style-name="P18" draw:layer="layout" svg:width="28.681cm" svg:height="1.964cm" svg:x="-0.589cm" svg:y="-0.059cm">
          <text:list text:style-name="L1">
            <text:list-header>
              <text:p text:style-name="P17"><text:span text:style-name="T9">Что дальше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3" draw:text-style-name="P152" draw:layer="layout" svg:width="23.555cm" svg:height="12.541cm" svg:x="4.445cm" svg:y="2.54cm">
          <draw:text-box>
            <text:p text:style-name="P150"><text:span text:style-name="T100">1. Стабилизация обучаемости!</text:span></text:p>
            <text:p text:style-name="P150"><text:span text:style-name="T100">2. Интерпретируемое понижение размерности!</text:span></text:p>
            <text:p text:style-name="P150"><text:span text:style-name="T100">3. Больше окружений – хороших и разных!</text:span></text:p>
            <text:p text:style-name="P150"><text:span text:style-name="T100">4. Кластеризация/сегментация пространства состояний и раздельное исполнение сегментов </text:span><text:span text:style-name="T101">(пинг-понг по-македонски)</text:span><text:span text:style-name="T100">?</text:span></text:p>
            <text:p text:style-name="P151"><text:span text:style-name="T100">5. Прикладное применение – промышленная автоматизация? </text:span></text:p>
            <text:p text:style-name="P150"><text:span text:style-name="T100">6. Подержка иерархий/гетерархий пространств состояний?</text:span><text:span text:style-name="T102">*</text:span><text:span text:style-name="T100"> </text:span></text:p>
            <text:p text:style-name="P151"><text:span text:style-name="T103">7. Формализация перевода графов состояний в языки программной логики (“суперкомпиляция”)?</text:span><text:span text:style-name="T104">*</text:span><text:span text:style-name="T102">*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>
        <office:forms form:automatic-focus="false" form:apply-design-mode="false"/>
        <draw:frame draw:style-name="gr318" draw:text-style-name="P148" draw:layer="layout" svg:width="27.94cm" svg:height="1.352cm" svg:x="0cm" svg:y="0.035cm">
          <draw:text-box>
            <text:p text:style-name="P35"><text:span text:style-name="T99">Промышленная автоматизация – постановка эксперимента </text:span></text:p>
          </draw:text-box>
        </draw:frame>
        <draw:frame draw:style-name="gr14" draw:text-style-name="P8" draw:layer="layout" svg:width="15.431cm" svg:height="13.521cm" svg:x="5.644cm" svg:y="1.384cm">
          <draw:image xlink:href="Pictures/10000000000002DF00000284AC45C60E.png" xlink:type="simple" xlink:show="embed" xlink:actuate="onLoad" draw:mime-type="image/png">
            <text:p/>
          </draw:image>
        </draw:frame>
        <draw:custom-shape draw:style-name="gr324" draw:text-style-name="P153" draw:layer="layout" svg:width="2.911cm" svg:height="1.943cm" svg:x="16.274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5" draw:text-style-name="P154" draw:layer="layout" svg:width="2.54cm" svg:height="1.943cm" svg:x="18.949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text-style-name="P103" draw:layer="layout" svg:width="2.434cm" svg:height="1.427cm" svg:x="19.085cm" svg:y="13.181cm">
          <draw:text-box>
            <text:p><text:span text:style-name="T48">Сигналы </text:span></text:p>
            <text:p><text:span text:style-name="T48">“с поля”</text:span></text:p>
          </draw:text-box>
        </draw:frame>
        <draw:line draw:style-name="gr34" draw:text-style-name="P8" draw:layer="layout" svg:x1="17.744cm" svg:y1="12.001cm" svg:x2="17.744cm" svg:y2="13.271cm">
          <text:p/>
        </draw:line>
        <draw:frame draw:style-name="gr174" draw:text-style-name="P103" draw:layer="layout" svg:width="2.911cm" svg:height="1.427cm" svg:x="16.338cm" svg:y="13.144cm">
          <draw:text-box>
            <text:p><text:span text:style-name="T48">Управляющие </text:span></text:p>
            <text:p><text:span text:style-name="T48">воздействия</text:span></text:p>
          </draw:text-box>
        </draw:frame>
        <draw:frame draw:style-name="gr176" draw:text-style-name="P105" draw:layer="layout" svg:width="7.51cm" svg:height="3.851cm" svg:x="20.489cm" svg:y="9.526cm">
          <draw:text-box>
            <text:p><text:span text:style-name="T74">Programmable logic</text:span></text:p>
            <text:p text:style-name="P104"><text:span text:style-name="T75">IEC 61131 </text:span><text:span text:style-name="T76">(synchronous)</text:span></text:p>
            <text:p text:style-name="P104"><text:span text:style-name="T75">IEC 61499 </text:span><text:span text:style-name="T77">(asynchronous)</text:span></text:p>
          </draw:text-box>
        </draw:frame>
        <draw:line draw:style-name="gr34" draw:text-style-name="P8" draw:layer="layout" svg:x1="20.044cm" svg:y1="13.246cm" svg:x2="20.044cm" svg:y2="11.976cm">
          <text:p/>
        </draw:line>
        <draw:frame draw:style-name="gr326" draw:text-style-name="P155" draw:layer="layout" svg:width="4.98cm" svg:height="1.905cm" svg:x="0.635cm" svg:y="3.34cm">
          <draw:text-box>
            <text:p text:style-name="P35">Interpretable <text:span text:style-name="T78">AI</text:span></text:p>
            <text:p text:style-name="P35"><text:span text:style-name="T105">(“верхний уровень”)</text:span></text:p>
          </draw:text-box>
        </draw:frame>
        <draw:custom-shape draw:style-name="gr324" draw:text-style-name="P153" draw:layer="layout" svg:width="2.911cm" svg:height="1.943cm" svg:x="9.23cm" svg:y="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5" draw:text-style-name="P154" draw:layer="layout" svg:width="2.54cm" svg:height="1.943cm" svg:x="11.905cm" svg:y="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text-style-name="P103" draw:layer="layout" svg:width="2.434cm" svg:height="1.427cm" svg:x="12.041cm" svg:y="5.15cm">
          <draw:text-box>
            <text:p><text:span text:style-name="T48">Сигналы </text:span></text:p>
            <text:p><text:span text:style-name="T48">“с поля”</text:span></text:p>
          </draw:text-box>
        </draw:frame>
        <draw:line draw:style-name="gr34" draw:text-style-name="P8" draw:layer="layout" svg:x1="10.7cm" svg:y1="3.97cm" svg:x2="10.7cm" svg:y2="5.24cm">
          <text:p/>
        </draw:line>
        <draw:frame draw:style-name="gr174" draw:text-style-name="P103" draw:layer="layout" svg:width="2.911cm" svg:height="1.427cm" svg:x="9.294cm" svg:y="5.113cm">
          <draw:text-box>
            <text:p><text:span text:style-name="T48">Управляющие </text:span></text:p>
            <text:p><text:span text:style-name="T48">воздействия</text:span></text:p>
          </draw:text-box>
        </draw:frame>
        <draw:line draw:style-name="gr34" draw:text-style-name="P8" draw:layer="layout" svg:x1="13cm" svg:y1="5.215cm" svg:x2="13cm" svg:y2="3.945cm">
          <text:p/>
        </draw:line>
        <draw:line draw:style-name="gr327" draw:text-style-name="P8" draw:layer="layout" svg:x1="17.744cm" svg:y1="12.165cm" svg:x2="5.644cm" svg:y2="12.165cm">
          <text:p/>
        </draw:line>
        <draw:line draw:style-name="gr328" draw:text-style-name="P8" draw:layer="layout" svg:x1="20.044cm" svg:y1="12.528cm" svg:x2="5.67cm" svg:y2="12.528cm">
          <text:p/>
        </draw:line>
        <draw:line draw:style-name="gr327" draw:text-style-name="P8" draw:layer="layout" svg:x1="10.7cm" svg:y1="4.166cm" svg:x2="5.67cm" svg:y2="4.166cm">
          <text:p/>
        </draw:line>
        <draw:line draw:style-name="gr328" draw:text-style-name="P8" draw:layer="layout" svg:x1="13cm" svg:y1="4.529cm" svg:x2="5.696cm" svg:y2="4.529cm">
          <text:p/>
        </draw:line>
        <draw:polyline draw:style-name="gr329" draw:text-style-name="P8" draw:layer="layout" svg:width="1.099cm" svg:height="2.409cm" draw:transform="rotate (-1.5707963267949) translate (5.08cm 5.25cm)" svg:viewBox="0 0 1100 2410" draw:points="0,2410 1100,2410 1100,0">
          <text:p/>
        </draw:polyline>
        <draw:polyline draw:style-name="gr329" draw:text-style-name="P8" draw:layer="layout" svg:width="1.099cm" svg:height="2.409cm" draw:transform="rotate (-1.5707963267949) translate (5.155cm 13.213cm)" svg:viewBox="0 0 1100 2410" draw:points="0,2410 1100,2410 1100,0">
          <text:p/>
        </draw:polyline>
        <draw:polyline draw:style-name="gr330" draw:text-style-name="P8" draw:layer="layout" svg:width="1.099cm" svg:height="2.409cm" draw:transform="rotate (-1.5707963267949) translate (5.13cm 10.276cm)" svg:viewBox="0 0 1100 2410" draw:points="1100,2410 0,2410 0,0">
          <text:p/>
        </draw:polyline>
        <draw:polyline draw:style-name="gr330" draw:text-style-name="P8" draw:layer="layout" svg:width="0.772cm" svg:height="2.409cm" draw:transform="rotate (-1.5707963267949) translate (5.105cm 2.54cm)" svg:viewBox="0 0 773 2410" draw:points="773,2410 0,2410 0,0">
          <text:p/>
        </draw:polyline>
        <draw:frame draw:style-name="gr331" draw:text-style-name="P156" draw:layer="layout" svg:width="9.366cm" svg:height="0.878cm" svg:x="0.84cm" svg:y="1.705cm">
          <draw:text-box>
            <text:p><text:span text:style-name="T106">Рекомендации и предупреждения</text:span></text:p>
          </draw:text-box>
        </draw:frame>
        <draw:frame draw:style-name="gr331" draw:text-style-name="P156" draw:layer="layout" svg:width="9.366cm" svg:height="0.878cm" svg:x="0.84cm" svg:y="9.405cm">
          <draw:text-box>
            <text:p><text:span text:style-name="T106">Рекомендации и предупреждения</text:span></text:p>
          </draw:text-box>
        </draw:frame>
        <draw:frame draw:style-name="gr332" draw:text-style-name="P156" draw:layer="layout" svg:width="1.441cm" svg:height="0.878cm" svg:x="2.94cm" svg:y="6.405cm">
          <draw:text-box>
            <text:p><text:span text:style-name="T106">???</text:span></text:p>
          </draw:text-box>
        </draw:frame>
        <draw:frame draw:style-name="gr332" draw:text-style-name="P156" draw:layer="layout" svg:width="1.441cm" svg:height="0.878cm" svg:x="2.941cm" svg:y="14.305cm">
          <draw:text-box>
            <text:p><text:span text:style-name="T106">???</text:span></text:p>
          </draw:text-box>
        </draw:frame>
        <draw:frame draw:style-name="gr333" draw:text-style-name="P156" draw:layer="layout" svg:width="6.88cm" svg:height="5.267cm" svg:x="21.06cm" svg:y="1.905cm">
          <draw:text-box>
            <text:p><text:span text:style-name="T106">“Суперкомпиляция”</text:span></text:p>
            <text:p><text:span text:style-name="T106">- настройка, оптимизация </text:span></text:p>
            <text:p><text:span text:style-name="T106">и доработка программной логики на основе выученных</text:span></text:p>
            <text:p><text:span text:style-name="T106">(моделей) графов переходов</text:span></text:p>
          </draw:text-box>
        </draw:frame>
        <draw:polyline draw:style-name="gr334" draw:text-style-name="P8" draw:layer="layout" svg:width="20.774cm" svg:height="10.912cm" draw:transform="rotate (-3.14159265358979) translate (21.075cm 12.2cm)" svg:viewBox="0 0 20775 10913" draw:points="20140,0 20775,0 20775,10913 0,10913 0,2674">
          <text:p/>
        </draw:polyline>
        <draw:frame draw:style-name="gr335" draw:text-style-name="P155" draw:layer="layout" svg:width="4.98cm" svg:height="1.905cm" svg:x="0.635cm" svg:y="11.341cm">
          <draw:text-box>
            <text:p text:style-name="P35">Interpretable <text:span text:style-name="T78">AI</text:span></text:p>
            <text:p text:style-name="P35"><text:span text:style-name="T105">(“нижний уровень”)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 presentation:use-footer-name="ftr1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Антон Колонин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frame draw:style-name="gr336" draw:text-style-name="P157" draw:layer="layout" svg:width="28cm" svg:height="2.54cm" svg:x="0cm" svg:y="0cm">
          <draw:text-box>
            <text:p text:style-name="P39"><text:span text:style-name="T107">Спасибо за внимание! Вопросы?</text:span></text:p>
          </draw:text-box>
        </draw:frame>
        <draw:frame draw:style-name="gr337" draw:text-style-name="P158" draw:layer="layout" svg:width="11.43cm" svg:height="2.97cm" svg:x="1.905cm" svg:y="6.22cm">
          <draw:text-box>
            <text:p text:style-name="P39"><text:span text:style-name="T108">Запись семинара по теме доклада</text:span></text:p>
          </draw:text-box>
        </draw:frame>
        <draw:frame draw:style-name="gr338" draw:text-style-name="P159" draw:layer="layout" svg:width="13.335cm" svg:height="5.315cm" svg:x="13.97cm" svg:y="5.911cm">
          <draw:text-box>
            <text:p text:style-name="P39"><text:span text:style-name="T87">Статья по теме доклада, принятая на конференцию Нейроинформатика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8FFC2586.png" xlink:type="simple" xlink:show="embed" xlink:actuate="onLoad" draw:mime-type="image/png">
            <text:p/>
          </draw:image>
        </draw:frame>
        <draw:frame draw:style-name="gr14" draw:text-style-name="P8" draw:layer="layout" svg:width="5.08cm" svg:height="5.08cm" svg:x="4.98cm" svg:y="9.09cm">
          <draw:image xlink:href="Pictures/10000001000002E6000002E6D51B9B10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5" presentation:class="page"/>
          <draw:frame presentation:style-name="pr3" draw:text-style-name="P1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-Roman" svg:font-family="Times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2" draw:display-name="Gradient 2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54" draw:display-name="Arrowheads 54" svg:viewBox="0 0 300 300" svg:d="M150 0l150 300h-300z"/>
    <draw:marker draw:name="Arrowheads_20_55" draw:display-name="Arrowheads 55" svg:viewBox="0 0 300 300" svg:d="M150 0l150 300h-300z"/>
    <draw:marker draw:name="Arrowheads_20_56" draw:display-name="Arrowheads 56" svg:viewBox="0 0 300 300" svg:d="M150 0l150 300h-30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4" draw:display-name="Arrowheads 74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msArrowEnd_20_5" draw:display-name="msArrowEnd 5" svg:viewBox="0 0 264 264" svg:d="M132 0l132 264h-264z"/>
    <draw:marker draw:name="Стили_20_стрелок_20_6" draw:display-name="Стили стрелок 6" svg:viewBox="0 0 900 900" svg:d="M450 0l450 900h-900z"/>
    <draw:marker draw:name="Стили_20_стрелок_20_7" draw:display-name="Стили стрелок 7" svg:viewBox="0 0 900 900" svg:d="M450 0l450 900h-900z"/>
    <draw:marker draw:name="Стили_20_стрелок_20_8" draw:display-name="Стили стрелок 8" svg:viewBox="0 0 900 900" svg:d="M450 0l450 900h-900z"/>
    <draw:marker draw:name="Стили_20_стрелок_20_9" draw:display-name="Стили стрелок 9" svg:viewBox="0 0 900 900" svg:d="M450 0l450 900h-900z"/>
    <draw:stroke-dash draw:name="Dash" draw:style="rect" draw:dots1="1" draw:dots1-length="3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5" style:display-name="Default Drawing Style_5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6" style:display-name="Default Drawing Style_6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" style:family="graphic">
      <style:graphic-properties style:writing-mode="lr-tb"/>
      <style:paragraph-properties fo:margin-top="0.746cm" fo:margin-bottom="0.374cm" fo:text-align="left" style:text-autospace="none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graphic">
      <style:graphic-properties style:writing-mode="lr-tb"/>
      <style:paragraph-properties fo:margin-top="0cm" fo:margin-bottom="0.436cm" fo:line-height="115%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ListLabel_20_10" style:display-name="ListLabel 10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Normal" style:family="graphic">
      <style:graphic-properties style:writing-mode="lr-tb"/>
      <style:paragraph-properties fo:margin-top="0cm" fo:margin-bottom="0cm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Object_20_without_20_fill_5f_2" style:display-name="Object without fill_2" style:family="graphic" style:parent-style-name="Default_20_Drawing_20_Style_5f_2"/>
    <style:style style:name="Object_20_without_20_fill_5f_2_5f_1" style:display-name="Object without fill_2_1" style:family="graphic" style:parent-style-name="Default_5f_6">
      <style:graphic-properties svg:stroke-color="#000000" draw:fill="none"/>
    </style:style>
    <style:style style:name="Object_20_without_20_fill_5f_3" style:display-name="Object without fill_3" style:family="graphic" style:parent-style-name="Default_20_Drawing_20_Style_5f_4">
      <style:graphic-properties svg:stroke-color="#2e8b57" draw:marker-end="Arrow"/>
    </style:style>
    <style:style style:name="Object_20_without_20_fill_5f_4" style:display-name="Object without fill_4" style:family="graphic" style:parent-style-name="Default_20_Drawing_20_Style_5f_5">
      <style:graphic-properties svg:stroke-color="#2e8b57" draw:marker-end="Arrow"/>
    </style:style>
    <style:style style:name="caption" style:family="graphic">
      <style:graphic-properties style:writing-mode="lr-tb"/>
      <style:paragraph-properties fo:margin-top="0.374cm" fo:margin-bottom="0.374cm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lef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1" fo:font-size="14pt" style:font-size-asian="14pt" style:font-size-complex="14pt"/>
    </style:style>
    <style:style style:name="MT3" style:family="text">
      <style:text-properties style:font-name="Arial1" fo:font-size="14pt" style:font-size-asian="14pt" style:font-size-complex="14pt"/>
    </style:style>
    <style:style style:name="MT4" style:family="text">
      <style:text-properties fo:color="#333333" loext:opacity="100%" style:font-name="Arial1" fo:font-size="14pt" style:font-size-asian="14pt" style:font-size-complex="14pt"/>
    </style:style>
    <style:style style:name="MT5" style:family="text">
      <style:text-properties fo:color="#a9a9a9" loext:opacity="100%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1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5T23:23:40.434190962</meta:creation-date>
    <dc:date>2026-03-22T21:12:31.770761000</dc:date>
    <meta:editing-duration>P4DT7H24M41S</meta:editing-duration>
    <meta:editing-cycles>178</meta:editing-cycles>
    <meta:generator>LibreOffice/26.2.1.2$MacOSX_X86_64 LibreOffice_project/8399f6259d8c87f40e7255cdb3c9b958f5e08948</meta:generator>
    <meta:print-date>2026-02-04T01:00:13.704717132</meta:print-date>
    <meta:printed-by>PDF files</meta:printed-by>
    <meta:document-statistic meta:object-count="927"/>
  </office:meta>
</office:document-meta>
</file>